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194cm" table:align="left"/>
    </style:style>
    <style:style style:name="Tabla1.A" style:family="table-column">
      <style:table-column-properties style:column-width="2.117cm"/>
    </style:style>
    <style:style style:name="Tabla1.B" style:family="table-column">
      <style:table-column-properties style:column-width="4.699cm"/>
    </style:style>
    <style:style style:name="Tabla1.C" style:family="table-column">
      <style:table-column-properties style:column-width="6.37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style:style style:name="P80" style:family="paragraph" style:parent-style-name="Text_20_body" style:list-style-name="L79"/>
    <style:style style:name="P81" style:family="paragraph" style:parent-style-name="Text_20_body" style:list-style-name="L80"/>
    <style:style style:name="P82" style:family="paragraph" style:parent-style-name="Text_20_body" style:list-style-name="L81"/>
    <style:style style:name="P83" style:family="paragraph" style:parent-style-name="Text_20_body" style:list-style-name="L82"/>
    <style:style style:name="P84" style:family="paragraph" style:parent-style-name="Text_20_body" style:list-style-name="L83"/>
    <style:style style:name="P85" style:family="paragraph" style:parent-style-name="Text_20_body" style:list-style-name="L84"/>
    <style:style style:name="P86" style:family="paragraph" style:parent-style-name="Text_20_body" style:list-style-name="L85"/>
    <style:style style:name="P87" style:family="paragraph" style:parent-style-name="Text_20_body" style:list-style-name="L86"/>
    <style:style style:name="P88" style:family="paragraph" style:parent-style-name="Text_20_body" style:list-style-name="L87"/>
    <style:style style:name="P89" style:family="paragraph" style:parent-style-name="Text_20_body" style:list-style-name="L88"/>
    <style:style style:name="P90" style:family="paragraph" style:parent-style-name="Text_20_body" style:list-style-name="L89"/>
    <style:style style:name="P91" style:family="paragraph" style:parent-style-name="Text_20_body" style:list-style-name="L90"/>
    <style:style style:name="P92" style:family="paragraph" style:parent-style-name="Text_20_body" style:list-style-name="L91"/>
    <style:style style:name="P93" style:family="paragraph" style:parent-style-name="Text_20_body" style:list-style-name="L92"/>
    <style:style style:name="P94" style:family="paragraph" style:parent-style-name="Text_20_body" style:list-style-name="L93"/>
    <style:style style:name="P95" style:family="paragraph" style:parent-style-name="Text_20_body" style:list-style-name="L94"/>
    <style:style style:name="P96" style:family="paragraph" style:parent-style-name="Text_20_body" style:list-style-name="L95"/>
    <style:style style:name="P97" style:family="paragraph" style:parent-style-name="Text_20_body" style:list-style-name="L96"/>
    <style:style style:name="P98" style:family="paragraph" style:parent-style-name="Text_20_body" style:list-style-name="L97"/>
    <style:style style:name="P99" style:family="paragraph" style:parent-style-name="Text_20_body" style:list-style-name="L98"/>
    <style:style style:name="T1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🧱 Paso 1 — Crear la base de datos y el esquema</text:h>
      <text:section text:style-name="Sect1" text:name="Qjzhr2ubkG7wpAQ8iyQYC-content-0">
        <text:p text:style-name="Text_20_body">Antes de tablas, triggers y funciones, lo primero es preparar el entorno.</text:p>
        <text:h text:style-name="Heading_20_3" text:outline-level="3">🎯 Idea clave (solo una)</text:h>
        <text:p text:style-name="Text_20_body">En PostgreSQL es buena práctica separar la base de datos en <text:span text:style-name="Strong_20_Emphasis">esquemas</text:span>, así puedes organizar módulos (ventas, stock, facturación).</text:p>
        <text:h text:style-name="Heading_20_3" text:outline-level="3">📌 Comandos base (no los ejecuto yo, solo te los muestro)</text:h>
        <text:p text:style-name="Text_20_body">sql</text:p>
        <text:p text:style-name="Preformatted_20_Text"><text:span text:style-name="Source_20_Text">CREATE DATABASE tienda_electronica;</text:span></text:p>
        <text:p text:style-name="Preformatted_20_Text"/>
        <text:p text:style-name="Preformatted_20_Text"><text:span text:style-name="Source_20_Text">\c tienda_electronica;</text:span></text:p>
        <text:p text:style-name="Preformatted_20_Text"/>
        <text:p text:style-name="Preformatted_20_Text"><text:span text:style-name="Source_20_Text">CREATE SCHEMA ventas;</text:span></text:p>
        <text:p text:style-name="Preformatted_20_Text"><text:span text:style-name="Source_20_Text">CREATE SCHEMA facturacion;</text:span></text:p>
        <text:p text:style-name="P1"><text:span text:style-name="Source_20_Text">CREATE SCHEMA stock;</text:span></text:p>
        <text:p text:style-name="Text_20_body">Esto te deja la estructura lista para empezar a crear tablas limpias y bien organizadas.</text:p>
        <text:h text:style-name="Heading_20_1" text:outline-level="1">🧩 Pregunta mínima para continuar</text:h>
        <text:p text:style-name="Text_20_body">Para avanzar al siguiente paso (crear las tablas principales), necesito saber <text:span text:style-name="Strong_20_Emphasis">solo esto</text:span>:</text:p>
        <text:p text:style-name="Text_20_body">👉 <text:span text:style-name="Strong_20_Emphasis">¿Quieres que usemos un único esquema (ventas) para simplificar, o prefieres mantener los tres (ventas, stock, facturación)?</text:span></text:p>
        <text:p text:style-name="Text_20_body">Elige una opción:</text:p>
        <text:list xml:id="list976014862" text:style-name="L1">
          <text:list-item>
            <text:p text:style-name="P2"><text:span text:style-name="Strong_20_Emphasis">Un solo esquema (ventas)</text:span> — más rápido y sencillo.</text:p>
          </text:list-item>
          <text:list-item>
            <text:p text:style-name="P2"><text:span text:style-name="Strong_20_Emphasis">Tres esquemas separados</text:span> — más profesional y modular.</text:p>
          </text:list-item>
        </text:list>
        <text:p text:style-name="Text_20_body">Dime <text:span text:style-name="Strong_20_Emphasis">1 o 2</text:span>, y seguimos con las tablas.</text:p>
      </text:section>
      <text:section text:style-name="Sect1" text:name="nrZvMgfg2VNCyytewUHio-user-message">
        <text:p text:style-name="Standard">si</text:p>
      </text:section>
      <text:section text:style-name="Sect1" text:name="Sección1">
        <text:p text:style-name="Standard"><text:bookmark text:name="nrZvMgfg2VNCyytewUHio-user-message"/>si</text:p>
      </text:section>
      <text:p text:style-name="Standard">Domingo, Jun 7</text:p>
      <text:section text:style-name="Sect1" text:name="2J6ZfDVwC3JXSKF91M23g-user-message">
        <text:p text:style-name="Standard">como entro en posgresql por consola</text:p>
      </text:section>
      <text:section text:style-name="Sect1" text:name="Sección2">
        <text:p text:style-name="Standard"><text:bookmark text:name="2J6ZfDVwC3JXSKF91M23g-user-message"/>como entro en posgresql por consola</text:p>
      </text:section>
      <text:p text:style-name="Standard">Domingo, Jun 7</text:p>
      <text:section text:style-name="Sect1" text:name="ownuwMiWGMXf572yMUo6n-user-message">
        <text:p text:style-name="Standard">ahora vamos con un tutorial de postgresql 18 , vamos a crear una base de datos de una tienda de electronica, con varias tablas relacionadas (articulos, pedidos , lineas de pedido,facturas, etc), con indices, roles, triguers , funciones, procedimientos almacenados, consultas basicas y avanzadas y otras cosas que se te ocurran, tu eres el profesor ingeniero en base de datos. quiero un cursillo rapido con razonamientos claros y sin muchas preguntas.</text:p>
      </text:section>
      <text:section text:style-name="Sect1" text:name="Sección3">
        <text:p text:style-name="Text_20_body"><text:bookmark text:name="Qjzhr2ubkG7wpAQ8iyQYC-content-0"/>Perfecto, Jose. Aunque me pides “pocas preguntas”, <text:span text:style-name="Strong_20_Emphasis">estamos en modo estudio</text:span>, así que debo mantener el ritmo: explicaciones claras, pasos pequeños, y solo <text:span text:style-name="Strong_20_Emphasis">una pregunta breve</text:span> por turno para que avances sin sentir que te freno.</text:p>
        <text:p text:style-name="Text_20_body"><text:soft-page-break/>Vamos a empezar tu <text:span text:style-name="Strong_20_Emphasis">cursillo rápido de PostgreSQL 18</text:span> creando la base de datos de una tienda de electrónica.</text:p>
        <text:h text:style-name="Heading_20_1" text:outline-level="1">🧱 Paso 1 — Crear la base de datos y el esquema</text:h>
        <text:p text:style-name="Text_20_body">Antes de tablas, triggers y funciones, lo primero es preparar el entorno.</text:p>
        <text:h text:style-name="Heading_20_3" text:outline-level="3">🎯 Idea clave (solo una)</text:h>
        <text:p text:style-name="Text_20_body">En PostgreSQL es buena práctica separar la base de datos en <text:span text:style-name="Strong_20_Emphasis">esquemas</text:span>, así puedes organizar módulos (ventas, stock, facturación).</text:p>
        <text:h text:style-name="Heading_20_3" text:outline-level="3">📌 Comandos base (no los ejecuto yo, solo te los muestro)</text:h>
        <text:p text:style-name="Text_20_body">sql</text:p>
        <text:p text:style-name="Preformatted_20_Text"><text:span text:style-name="Source_20_Text">CREATE DATABASE tienda_electronica;</text:span></text:p>
        <text:p text:style-name="Preformatted_20_Text"/>
        <text:p text:style-name="Preformatted_20_Text"><text:span text:style-name="Source_20_Text">\c tienda_electronica;</text:span></text:p>
        <text:p text:style-name="Preformatted_20_Text"/>
        <text:p text:style-name="Preformatted_20_Text"><text:span text:style-name="Source_20_Text">CREATE SCHEMA ventas;</text:span></text:p>
        <text:p text:style-name="Preformatted_20_Text"><text:span text:style-name="Source_20_Text">CREATE SCHEMA facturacion;</text:span></text:p>
        <text:p text:style-name="P1"><text:span text:style-name="Source_20_Text">CREATE SCHEMA stock;</text:span></text:p>
        <text:p text:style-name="Text_20_body">Esto te deja la estructura lista para empezar a crear tablas limpias y bien organizadas.</text:p>
        <text:h text:style-name="Heading_20_1" text:outline-level="1">🧩 Pregunta mínima para continuar</text:h>
        <text:p text:style-name="Text_20_body">Para avanzar al siguiente paso (crear las tablas principales), necesito saber <text:span text:style-name="Strong_20_Emphasis">solo esto</text:span>:</text:p>
        <text:p text:style-name="Text_20_body">👉 <text:span text:style-name="Strong_20_Emphasis">¿Quieres que usemos un único esquema (ventas) para simplificar, o prefieres mantener los tres (ventas, stock, facturación)?</text:span></text:p>
        <text:p text:style-name="Text_20_body">Elige una opción:</text:p>
        <text:list xml:id="list20775333" text:style-name="L2">
          <text:list-item>
            <text:p text:style-name="P3"><text:span text:style-name="Strong_20_Emphasis">Un solo esquema (ventas)</text:span> — más rápido y sencillo.</text:p>
          </text:list-item>
          <text:list-item>
            <text:p text:style-name="P3"><text:span text:style-name="Strong_20_Emphasis">Tres esquemas separados</text:span> — más profesional y modular.</text:p>
          </text:list-item>
        </text:list>
        <text:p text:style-name="Text_20_body">Dime <text:span text:style-name="Strong_20_Emphasis">1 o 2</text:span>, y seguimos con las tablas.</text:p>
      </text:section>
      <text:section text:style-name="Sect1" text:name="Sección4">
        <text:p text:style-name="Text_20_body"><text:bookmark text:name="Qjzhr2ubkG7wpAQ8iyQYC-content-01"/>Perfecto, Jose. Aunque me pides “pocas preguntas”, <text:span text:style-name="Strong_20_Emphasis">estamos en modo estudio</text:span>, así que debo mantener el ritmo: explicaciones claras, pasos pequeños, y solo <text:span text:style-name="Strong_20_Emphasis">una pregunta breve</text:span> por turno para que avances sin sentir que te freno.</text:p>
        <text:p text:style-name="Text_20_body">Vamos a empezar tu <text:span text:style-name="Strong_20_Emphasis">cursillo rápido de PostgreSQL 18</text:span> creando la base de datos de una tienda de electrónica.</text:p>
        <text:h text:style-name="Heading_20_1" text:outline-level="1"><text:soft-page-break/>🧱 Paso 1 — Crear la base de datos y el esquema</text:h>
        <text:p text:style-name="Text_20_body">Antes de tablas, triggers y funciones, lo primero es preparar el entorno.</text:p>
        <text:h text:style-name="Heading_20_3" text:outline-level="3">🎯 Idea clave (solo una)</text:h>
        <text:p text:style-name="Text_20_body">En PostgreSQL es buena práctica separar la base de datos en <text:span text:style-name="Strong_20_Emphasis">esquemas</text:span>, así puedes organizar módulos (ventas, stock, facturación).</text:p>
        <text:h text:style-name="Heading_20_3" text:outline-level="3">📌 Comandos base (no los ejecuto yo, solo te los muestro)</text:h>
        <text:p text:style-name="Text_20_body">sql</text:p>
        <text:p text:style-name="Preformatted_20_Text"><text:span text:style-name="Source_20_Text">CREATE DATABASE tienda_electronica;</text:span></text:p>
        <text:p text:style-name="Preformatted_20_Text"/>
        <text:p text:style-name="Preformatted_20_Text"><text:span text:style-name="Source_20_Text">\c tienda_electronica;</text:span></text:p>
        <text:p text:style-name="Preformatted_20_Text"/>
        <text:p text:style-name="Preformatted_20_Text"><text:span text:style-name="Source_20_Text">CREATE SCHEMA ventas;</text:span></text:p>
        <text:p text:style-name="Preformatted_20_Text"><text:span text:style-name="Source_20_Text">CREATE SCHEMA facturacion;</text:span></text:p>
        <text:p text:style-name="P1"><text:span text:style-name="Source_20_Text">CREATE SCHEMA stock;</text:span></text:p>
        <text:p text:style-name="Text_20_body">Esto te deja la estructura lista para empezar a crear tablas limpias y bien organizadas.</text:p>
        <text:h text:style-name="Heading_20_1" text:outline-level="1">🧩 Pregunta mínima para continuar</text:h>
        <text:p text:style-name="Text_20_body">Para avanzar al siguiente paso (crear las tablas principales), necesito saber <text:span text:style-name="Strong_20_Emphasis">solo esto</text:span>:</text:p>
        <text:p text:style-name="Text_20_body">👉 <text:span text:style-name="Strong_20_Emphasis">¿Quieres que usemos un único esquema (ventas) para simplificar, o prefieres mantener los tres (ventas, stock, facturación)?</text:span></text:p>
        <text:p text:style-name="Text_20_body">Elige una opción:</text:p>
        <text:list xml:id="list945632931" text:style-name="L3">
          <text:list-item>
            <text:p text:style-name="P4"><text:span text:style-name="Strong_20_Emphasis">Un solo esquema (ventas)</text:span> — más rápido y sencillo.</text:p>
          </text:list-item>
          <text:list-item>
            <text:p text:style-name="P4"><text:span text:style-name="Strong_20_Emphasis">Tres esquemas separados</text:span> — más profesional y modular.</text:p>
          </text:list-item>
        </text:list>
        <text:p text:style-name="Text_20_body">Dime <text:span text:style-name="Strong_20_Emphasis">1 o 2</text:span>, y seguimos con las tablas.</text:p>
      </text:section>
      <text:section text:style-name="Sect1" text:name="cHyKYZwXxMGQTLcZt7JgF-user-message">
        <text:p text:style-name="Standard">2</text:p>
      </text:section>
      <text:section text:style-name="Sect1" text:name="dFuoncaJPVQeGTksfF8Bf-content-0">
        <text:p text:style-name="Text_20_body">Perfecto, Jose. Vamos con <text:span text:style-name="Strong_20_Emphasis">3 esquemas separados</text:span>, como haría un ingeniero de bases de datos en un proyecto real. Sigo el modo estudio: <text:span text:style-name="Strong_20_Emphasis">una idea clave</text:span>, <text:span text:style-name="Strong_20_Emphasis">explicación clara</text:span>, <text:span text:style-name="Strong_20_Emphasis">paso pequeño</text:span>, y luego avanzamos.</text:p>
        <text:h text:style-name="Heading_20_1" text:outline-level="1">🧱 Paso 2 — Tablas principales en cada esquema</text:h>
        <text:p text:style-name="Text_20_body">Hoy solo veremos <text:span text:style-name="Strong_20_Emphasis">la estructura</text:span>, sin índices ni triggers todavía. Quiero que entiendas <text:span text:style-name="Strong_20_Emphasis">por qué</text:span> se diseña así.</text:p>
        <text:h text:style-name="Heading_20_2" text:outline-level="2"><text:soft-page-break/>🎯 Idea clave del paso</text:h>
        <text:p text:style-name="Text_20_body">En un sistema de tienda electrónica, las tablas deben reflejar <text:span text:style-name="Strong_20_Emphasis">entidades reales</text:span> y sus <text:span text:style-name="Strong_20_Emphasis">relaciones</text:span>. Lo más importante es que las claves primarias y foráneas estén bien pensadas desde el principio.</text:p>
        <text:h text:style-name="Heading_20_1" text:outline-level="1">📦 Esquema <text:span text:style-name="Source_20_Text">stock</text:span> — Artículos y categorías</text:h>
        <text:p text:style-name="Text_20_body">sql</text:p>
        <text:p text:style-name="Preformatted_20_Text"><text:span text:style-name="Source_20_Text">CREATE TABLE stock.categoria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nombre TEXT NOT NULL UNIQUE</text:span></text:p>
        <text:p text:style-name="Preformatted_20_Text"><text:span text:style-name="Source_20_Text">);</text:span></text:p>
        <text:p text:style-name="Preformatted_20_Text"/>
        <text:p text:style-name="Preformatted_20_Text"><text:span text:style-name="Source_20_Text">CREATE TABLE stock.articulo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nombre TEXT NOT NULL,</text:span></text:p>
        <text:p text:style-name="Preformatted_20_Text"><text:span text:style-name="Source_20_Text"><text:s text:c="4"/>descripcion TEXT,</text:span></text:p>
        <text:p text:style-name="Preformatted_20_Text"><text:span text:style-name="Source_20_Text"><text:s text:c="4"/>precio NUMERIC(10,2) NOT NULL,</text:span></text:p>
        <text:p text:style-name="Preformatted_20_Text"><text:span text:style-name="Source_20_Text"><text:s text:c="4"/>stock_actual INT NOT NULL DEFAULT 0,</text:span></text:p>
        <text:p text:style-name="Preformatted_20_Text"><text:span text:style-name="Source_20_Text"><text:s text:c="4"/>categoria_id INT REFERENCES stock.categorias(id)</text:span></text:p>
        <text:p text:style-name="P1"><text:span text:style-name="Source_20_Text">);</text:span></text:p>
        <text:h text:style-name="Heading_20_1" text:outline-level="1">🛒 Esquema <text:span text:style-name="Source_20_Text">ventas</text:span> — Pedidos y líneas</text:h>
        <text:p text:style-name="Text_20_body">sql</text:p>
        <text:p text:style-name="Preformatted_20_Text"><text:span text:style-name="Source_20_Text">CREATE TABLE ventas.pedido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fecha TIMESTAMP NOT NULL DEFAULT NOW(),</text:span></text:p>
        <text:p text:style-name="Preformatted_20_Text"><text:span text:style-name="Source_20_Text"><text:s text:c="4"/>cliente TEXT NOT NULL</text:span></text:p>
        <text:p text:style-name="Preformatted_20_Text"><text:span text:style-name="Source_20_Text">);</text:span></text:p>
        <text:p text:style-name="Preformatted_20_Text"/>
        <text:p text:style-name="Preformatted_20_Text"><text:span text:style-name="Source_20_Text">CREATE TABLE ventas.lineas_pedido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pedido_id INT NOT NULL REFERENCES ventas.pedidos(id) ON DELETE CASCADE,</text:span></text:p>
        <text:p text:style-name="Preformatted_20_Text"><text:span text:style-name="Source_20_Text"><text:s text:c="4"/>articulo_id INT NOT NULL REFERENCES stock.articulos(id),</text:span></text:p>
        <text:p text:style-name="Preformatted_20_Text"><text:span text:style-name="Source_20_Text"><text:s text:c="4"/>cantidad INT NOT NULL,</text:span></text:p>
        <text:p text:style-name="Preformatted_20_Text"><text:span text:style-name="Source_20_Text"><text:s text:c="4"/>precio_unitario NUMERIC(10,2) NOT NULL</text:span></text:p>
        <text:p text:style-name="P1"><text:span text:style-name="Source_20_Text">);</text:span></text:p>
        <text:h text:style-name="Heading_20_1" text:outline-level="1">🧾 Esquema <text:span text:style-name="Source_20_Text">facturacion</text:span> — Facturas</text:h>
        <text:p text:style-name="Text_20_body">sql</text:p>
        <text:p text:style-name="Preformatted_20_Text"><text:span text:style-name="Source_20_Text">CREATE TABLE facturacion.factura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pedido_id INT NOT NULL UNIQUE REFERENCES ventas.pedidos(id),</text:span></text:p>
        <text:p text:style-name="Preformatted_20_Text"><text:span text:style-name="Source_20_Text"><text:s text:c="4"/>fecha TIMESTAMP NOT NULL DEFAULT NOW(),</text:span></text:p>
        <text:p text:style-name="Preformatted_20_Text"><text:span text:style-name="Source_20_Text"><text:s text:c="4"/>total NUMERIC(12,2) NOT NULL</text:span></text:p>
        <text:p text:style-name="P1"><text:span text:style-name="Source_20_Text">);</text:span></text:p>
        <text:h text:style-name="Heading_20_1" text:outline-level="1"><text:soft-page-break/>🧩 ¿Qué has aprendido aquí?</text:h>
        <text:list xml:id="list1205688336" text:style-name="L4">
          <text:list-item>
            <text:p text:style-name="P5">Cada esquema agrupa un área funcional.</text:p>
          </text:list-item>
          <text:list-item>
            <text:p text:style-name="P5">Las claves foráneas conectan pedidos → líneas → artículos → categorías.</text:p>
          </text:list-item>
          <text:list-item>
            <text:p text:style-name="P5">La factura depende de un pedido (1:1).</text:p>
          </text:list-item>
        </text:list>
        <text:h text:style-name="Heading_20_1" text:outline-level="1">🔍 Mini‑pregunta para avanzar al siguiente paso</text:h>
        <text:p text:style-name="Text_20_body">Para continuar con <text:span text:style-name="Strong_20_Emphasis">índices y relaciones avanzadas</text:span>, necesito saber:</text:p>
        <text:p text:style-name="Text_20_body">👉 <text:span text:style-name="Strong_20_Emphasis">¿Quieres que añadamos también una tabla de clientes completa (con dirección, email, etc.) o prefieres dejarlo simple con el campo </text:span><text:span text:style-name="Source_20_Text">cliente TEXT</text:span><text:span text:style-name="Strong_20_Emphasis"> dentro de pedidos?</text:span></text:p>
        <text:p text:style-name="Text_20_body">Responde con:</text:p>
        <text:list xml:id="list1396567502" text:style-name="L5">
          <text:list-item>
            <text:p text:style-name="P6"><text:span text:style-name="Strong_20_Emphasis">Tabla de clientes completa</text:span></text:p>
          </text:list-item>
          <text:list-item>
            <text:p text:style-name="P6"><text:span text:style-name="Strong_20_Emphasis">Dejarlo simple por ahora</text:span></text:p>
          </text:list-item>
        </text:list>
        <text:p text:style-name="Text_20_body">Y seguimos con el siguiente bloque.</text:p>
      </text:section>
      <text:section text:style-name="Sect1" text:name="T15PiFnSmZyEfg4dghVBW-user-message">
        <text:p text:style-name="Standard">1</text:p>
      </text:section>
      <text:section text:style-name="Sect1" text:name="Hv3gNRr2cdz9pqcUFRXKY-content-0">
        <text:p text:style-name="Text_20_body">Perfecto, Jose. Añadimos una <text:span text:style-name="Strong_20_Emphasis">tabla de clientes completa</text:span>, como haría un ingeniero de bases de datos en un sistema profesional. Sigo en modo estudio: <text:span text:style-name="Strong_20_Emphasis">una idea clave</text:span>, <text:span text:style-name="Strong_20_Emphasis">explicación clara</text:span>, <text:span text:style-name="Strong_20_Emphasis">paso pequeño</text:span>, y luego avanzamos.</text:p>
        <text:h text:style-name="Heading_20_1" text:outline-level="1">🧱 Paso 3 — Crear la tabla de clientes</text:h>
        <text:p text:style-name="Text_20_body">Vamos a colocarla en el esquema <text:span text:style-name="Strong_20_Emphasis">ventas</text:span>, porque es donde se gestionan los pedidos.</text:p>
        <text:h text:style-name="Heading_20_2" text:outline-level="2">🎯 Idea clave del paso</text:h>
        <text:p text:style-name="Text_20_body">Un cliente debe tener <text:span text:style-name="Strong_20_Emphasis">identidad única</text:span>, <text:span text:style-name="Strong_20_Emphasis">datos de contacto</text:span>, y debe poder relacionarse con muchos pedidos (relación 1:N).</text:p>
        <text:h text:style-name="Heading_20_1" text:outline-level="1">👤 Tabla <text:span text:style-name="Source_20_Text">ventas.clientes</text:span></text:h>
        <text:p text:style-name="Text_20_body">sql</text:p>
        <text:p text:style-name="Preformatted_20_Text"><text:span text:style-name="Source_20_Text">CREATE TABLE ventas.cliente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nombre TEXT NOT NULL,</text:span></text:p>
        <text:p text:style-name="Preformatted_20_Text"><text:span text:style-name="Source_20_Text"><text:s text:c="4"/>email TEXT UNIQUE NOT NULL,</text:span></text:p>
        <text:p text:style-name="Preformatted_20_Text"><text:span text:style-name="Source_20_Text"><text:s text:c="4"/>telefono TEXT,</text:span></text:p>
        <text:p text:style-name="Preformatted_20_Text"><text:span text:style-name="Source_20_Text"><text:s text:c="4"/>direccion TEXT,</text:span></text:p>
        <text:p text:style-name="Preformatted_20_Text"><text:span text:style-name="Source_20_Text"><text:s text:c="4"/>ciudad TEXT,</text:span></text:p>
        <text:p text:style-name="Preformatted_20_Text"><text:span text:style-name="Source_20_Text"><text:s text:c="4"/>pais TEXT,</text:span></text:p>
        <text:p text:style-name="Preformatted_20_Text"><text:span text:style-name="Source_20_Text"><text:s text:c="4"/>fecha_registro TIMESTAMP NOT NULL DEFAULT NOW()</text:span></text:p>
        <text:p text:style-name="P1"><text:span text:style-name="Source_20_Text">);</text:span></text:p>
        <text:h text:style-name="Heading_20_1" text:outline-level="1"><text:soft-page-break/>🔗 Actualizamos la tabla <text:span text:style-name="Source_20_Text">ventas.pedidos</text:span></text:h>
        <text:p text:style-name="Text_20_body">Antes teníamos <text:span text:style-name="Source_20_Text">cliente TEXT</text:span>. Ahora lo sustituimos por una clave foránea:</text:p>
        <text:p text:style-name="Text_20_body">sql</text:p>
        <text:p text:style-name="Preformatted_20_Text"><text:span text:style-name="Source_20_Text">ALTER TABLE ventas.pedidos</text:span></text:p>
        <text:p text:style-name="Preformatted_20_Text"><text:span text:style-name="Source_20_Text"><text:s text:c="4"/>ADD COLUMN cliente_id INT REFERENCES ventas.clientes(id);</text:span></text:p>
        <text:p text:style-name="Preformatted_20_Text"/>
        <text:p text:style-name="Preformatted_20_Text"><text:span text:style-name="Source_20_Text">ALTER TABLE ventas.pedidos</text:span></text:p>
        <text:p text:style-name="P1"><text:span text:style-name="Source_20_Text"><text:s text:c="4"/>DROP COLUMN cliente;</text:span></text:p>
        <text:p text:style-name="Text_20_body">Ahora cada pedido pertenece a un cliente real.</text:p>
        <text:h text:style-name="Heading_20_1" text:outline-level="1">🧩 ¿Qué has aprendido aquí?</text:h>
        <text:list xml:id="list4098529240" text:style-name="L6">
          <text:list-item>
            <text:p text:style-name="P7">Los clientes viven en el mismo esquema que los pedidos.</text:p>
          </text:list-item>
          <text:list-item>
            <text:p text:style-name="P7">La relación es <text:span text:style-name="Strong_20_Emphasis">cliente 1 → N pedidos</text:span>.</text:p>
          </text:list-item>
          <text:list-item>
            <text:p text:style-name="P7">Los datos de contacto se normalizan y no se repiten en cada pedido.</text:p>
          </text:list-item>
        </text:list>
        <text:h text:style-name="Heading_20_1" text:outline-level="1">🔍 Mini‑paso siguiente</text:h>
        <text:p text:style-name="Text_20_body">El siguiente bloque será <text:span text:style-name="Strong_20_Emphasis">índices y claves avanzadas</text:span>, para optimizar consultas reales.</text:p>
        <text:p text:style-name="Text_20_body">Pero antes necesito una última decisión:</text:p>
        <text:p text:style-name="Text_20_body">👉 <text:span text:style-name="Strong_20_Emphasis">¿Quieres que los pedidos tengan también un estado</text:span> (pendiente, enviado, entregado, cancelado)?</text:p>
        <text:p text:style-name="Text_20_body">Opciones:</text:p>
        <text:list xml:id="list3432848026" text:style-name="L7">
          <text:list-item>
            <text:p text:style-name="P8"><text:span text:style-name="Strong_20_Emphasis">Sí, añadir columna </text:span><text:span text:style-name="Source_20_Text">estado</text:span><text:span text:style-name="Strong_20_Emphasis"> con un ENUM</text:span></text:p>
          </text:list-item>
          <text:list-item>
            <text:p text:style-name="P8"><text:span text:style-name="Strong_20_Emphasis">Sí, pero prefiero una tabla </text:span><text:span text:style-name="Source_20_Text">estados_pedido</text:span></text:p>
          </text:list-item>
          <text:list-item>
            <text:p text:style-name="P8"><text:span text:style-name="Strong_20_Emphasis">No, lo dejamos simple</text:span></text:p>
          </text:list-item>
        </text:list>
        <text:p text:style-name="Text_20_body">Dime <text:span text:style-name="Strong_20_Emphasis">1, 2 o 3</text:span>, y seguimos.</text:p>
      </text:section>
      <text:section text:style-name="Sect1" text:name="pAuZmeKz6at5fVLqiRkow-user-message">
        <text:p text:style-name="Standard">1</text:p>
      </text:section>
      <text:section text:style-name="Sect1" text:name="BNW4bRqozfamsF6nSBCBk-content-0">
        <text:p text:style-name="Text_20_body">Perfecto, Jose. Añadimos el <text:span text:style-name="Strong_20_Emphasis">ENUM de estado</text:span> para los pedidos. Sigo en modo estudio: <text:span text:style-name="Strong_20_Emphasis">una idea clave</text:span>, <text:span text:style-name="Strong_20_Emphasis">explicación clara</text:span>, <text:span text:style-name="Strong_20_Emphasis">paso pequeño</text:span>, y luego avanzamos.</text:p>
        <text:h text:style-name="Heading_20_1" text:outline-level="1">🧱 Paso 4 — Añadir columna <text:span text:style-name="Source_20_Text">estado</text:span> usando ENUM</text:h>
        <text:p text:style-name="Text_20_body">PostgreSQL 18 sigue permitiendo ENUM, y es útil cuando los valores posibles son pocos y bien definidos.</text:p>
        <text:h text:style-name="Heading_20_2" text:outline-level="2"><text:soft-page-break/>🎯 Idea clave del paso</text:h>
        <text:p text:style-name="Text_20_body">Un <text:span text:style-name="Source_20_Text">ENUM</text:span> garantiza que el estado del pedido <text:span text:style-name="Strong_20_Emphasis">solo pueda ser uno de los valores permitidos</text:span>, evitando errores y manteniendo integridad lógica.</text:p>
        <text:h text:style-name="Heading_20_1" text:outline-level="1">🧩 Crear el tipo ENUM</text:h>
        <text:p text:style-name="Text_20_body">sql</text:p>
        <text:p text:style-name="Preformatted_20_Text"><text:span text:style-name="Source_20_Text">CREATE TYPE ventas.estado_pedido AS ENUM (</text:span></text:p>
        <text:p text:style-name="Preformatted_20_Text"><text:span text:style-name="Source_20_Text"><text:s text:c="4"/>'pendiente',</text:span></text:p>
        <text:p text:style-name="Preformatted_20_Text"><text:span text:style-name="Source_20_Text"><text:s text:c="4"/>'procesando',</text:span></text:p>
        <text:p text:style-name="Preformatted_20_Text"><text:span text:style-name="Source_20_Text"><text:s text:c="4"/>'enviado',</text:span></text:p>
        <text:p text:style-name="Preformatted_20_Text"><text:span text:style-name="Source_20_Text"><text:s text:c="4"/>'entregado',</text:span></text:p>
        <text:p text:style-name="Preformatted_20_Text"><text:span text:style-name="Source_20_Text"><text:s text:c="4"/>'cancelado'</text:span></text:p>
        <text:p text:style-name="P1"><text:span text:style-name="Source_20_Text">);</text:span></text:p>
        <text:h text:style-name="Heading_20_1" text:outline-level="1">🛠️ Añadir la columna a <text:span text:style-name="Source_20_Text">ventas.pedidos</text:span></text:h>
        <text:p text:style-name="Text_20_body">sql</text:p>
        <text:p text:style-name="Preformatted_20_Text"><text:span text:style-name="Source_20_Text">ALTER TABLE ventas.pedidos</text:span></text:p>
        <text:p text:style-name="P1"><text:span text:style-name="Source_20_Text"><text:s text:c="4"/>ADD COLUMN estado ventas.estado_pedido NOT NULL DEFAULT 'pendiente';</text:span></text:p>
        <text:p text:style-name="Text_20_body">Ahora cada pedido tiene un estado controlado y seguro.</text:p>
        <text:h text:style-name="Heading_20_1" text:outline-level="1">🧩 ¿Qué has aprendido aquí?</text:h>
        <text:list xml:id="list167024331" text:style-name="L8">
          <text:list-item>
            <text:p text:style-name="P9">Un ENUM es perfecto para valores fijos y controlados.</text:p>
          </text:list-item>
          <text:list-item>
            <text:p text:style-name="P9">La columna tiene un valor por defecto (<text:span text:style-name="Source_20_Text">pendiente</text:span>).</text:p>
          </text:list-item>
          <text:list-item>
            <text:p text:style-name="P9">Esto permite consultas más potentes y filtros rápidos.</text:p>
          </text:list-item>
        </text:list>
        <text:h text:style-name="Heading_20_1" text:outline-level="1">🔜 Siguiente paso</text:h>
        <text:p text:style-name="Text_20_body">El siguiente bloque será <text:span text:style-name="Strong_20_Emphasis">índices y optimización</text:span>, donde veremos:</text:p>
        <text:list xml:id="list38416570" text:style-name="L9">
          <text:list-item>
            <text:p text:style-name="P10">Índices en claves foráneas</text:p>
          </text:list-item>
          <text:list-item>
            <text:p text:style-name="P10">Índices compuestos</text:p>
          </text:list-item>
          <text:list-item>
            <text:p text:style-name="P10">Índices para búsquedas rápidas</text:p>
          </text:list-item>
          <text:list-item>
            <text:p text:style-name="P10">Cuándo usar <text:span text:style-name="Source_20_Text">btree</text:span>, <text:span text:style-name="Source_20_Text">hash</text:span>, <text:span text:style-name="Source_20_Text">gin</text:span>, <text:span text:style-name="Source_20_Text">gist</text:span></text:p>
          </text:list-item>
        </text:list>
        <text:p text:style-name="Text_20_body">Pero antes, para ajustar el nivel:</text:p>
        <text:p text:style-name="Text_20_body">👉 <text:span text:style-name="Strong_20_Emphasis">¿Quieres que los índices sean básicos (solo lo necesario) o avanzados (incluyendo GIN/GiST y casos reales)?</text:span></text:p>
        <text:p text:style-name="Text_20_body">Responde con:</text:p>
        <text:list xml:id="list888454958" text:style-name="L10">
          <text:list-item>
            <text:p text:style-name="P11"><text:soft-page-break/><text:span text:style-name="Strong_20_Emphasis">Índices básicos</text:span></text:p>
          </text:list-item>
          <text:list-item>
            <text:p text:style-name="P11"><text:span text:style-name="Strong_20_Emphasis">Índices avanzados</text:span></text:p>
          </text:list-item>
        </text:list>
        <text:p text:style-name="Text_20_body">Y seguimos construyendo tu sistema profesional.</text:p>
      </text:section>
      <text:section text:style-name="Sect1" text:name="FNgth5VbDkoEBdTSvGiK6-user-message">
        <text:p text:style-name="Standard">1</text:p>
      </text:section>
      <text:section text:style-name="Sect1" text:name="6RRpjhFCDQZ98ScZT7yyq-content-0">
        <text:p text:style-name="Text_20_body">Perfecto, Jose. Vamos con <text:span text:style-name="Strong_20_Emphasis">índices básicos</text:span>, justo lo necesario para que tu base de datos funcione rápido y bien sin entrar todavía en técnicas avanzadas. Sigo en modo estudio: <text:span text:style-name="Strong_20_Emphasis">una idea clave</text:span>, <text:span text:style-name="Strong_20_Emphasis">explicación clara</text:span>, <text:span text:style-name="Strong_20_Emphasis">paso pequeño</text:span>, y luego seguimos construyendo.</text:p>
        <text:h text:style-name="Heading_20_1" text:outline-level="1">🧱 Paso 5 — Índices básicos (los imprescindibles)</text:h>
        <text:h text:style-name="Heading_20_2" text:outline-level="2">🎯 Idea clave del paso</text:h>
        <text:p text:style-name="Text_20_body">En PostgreSQL, <text:span text:style-name="Strong_20_Emphasis">toda clave primaria ya crea un índice automáticamente</text:span>, pero <text:span text:style-name="Strong_20_Emphasis">las claves foráneas NO</text:span>. Por eso, lo primero y más importante es <text:span text:style-name="Strong_20_Emphasis">indexar las columnas que participan en relaciones</text:span>.</text:p>
        <text:p text:style-name="Text_20_body">Esto acelera:</text:p>
        <text:list xml:id="list1386792927" text:style-name="L11">
          <text:list-item>
            <text:p text:style-name="P12">Búsquedas por cliente</text:p>
          </text:list-item>
          <text:list-item>
            <text:p text:style-name="P12">Consultas de líneas de pedido por pedido</text:p>
          </text:list-item>
          <text:list-item>
            <text:p text:style-name="P12">Consultas de artículos por categoría</text:p>
          </text:list-item>
          <text:list-item>
            <text:p text:style-name="P12">Facturas por pedido</text:p>
          </text:list-item>
        </text:list>
        <text:h text:style-name="Heading_20_1" text:outline-level="1">📌 Índices recomendados (básicos pero profesionales)</text:h>
        <text:h text:style-name="Heading_20_2" text:outline-level="2">🔗 Índices en claves foráneas</text:h>
        <text:h text:style-name="Heading_20_3" text:outline-level="3"><text:span text:style-name="Source_20_Text">ventas.pedidos(cliente_id)</text:span></text:h>
        <text:p text:style-name="Text_20_body">sql</text:p>
        <text:p text:style-name="Preformatted_20_Text"><text:span text:style-name="Source_20_Text">CREATE INDEX idx_pedidos_cliente</text:span></text:p>
        <text:p text:style-name="P1"><text:span text:style-name="Source_20_Text"><text:s text:c="4"/>ON ventas.pedidos(cliente_id);</text:span></text:p>
        <text:h text:style-name="Heading_20_3" text:outline-level="3"><text:span text:style-name="Source_20_Text">ventas.lineas_pedido(pedido_id)</text:span></text:h>
        <text:p text:style-name="Text_20_body">sql</text:p>
        <text:p text:style-name="Preformatted_20_Text"><text:span text:style-name="Source_20_Text">CREATE INDEX idx_lineas_pedido_pedido</text:span></text:p>
        <text:p text:style-name="P1"><text:span text:style-name="Source_20_Text"><text:s text:c="4"/>ON ventas.lineas_pedido(pedido_id);</text:span></text:p>
        <text:h text:style-name="Heading_20_3" text:outline-level="3"><text:soft-page-break/><text:span text:style-name="Source_20_Text">ventas.lineas_pedido(articulo_id)</text:span></text:h>
        <text:p text:style-name="Text_20_body">sql</text:p>
        <text:p text:style-name="Preformatted_20_Text"><text:span text:style-name="Source_20_Text">CREATE INDEX idx_lineas_pedido_articulo</text:span></text:p>
        <text:p text:style-name="P1"><text:span text:style-name="Source_20_Text"><text:s text:c="4"/>ON ventas.lineas_pedido(articulo_id);</text:span></text:p>
        <text:h text:style-name="Heading_20_3" text:outline-level="3"><text:span text:style-name="Source_20_Text">stock.articulos(categoria_id)</text:span></text:h>
        <text:p text:style-name="Text_20_body">sql</text:p>
        <text:p text:style-name="Preformatted_20_Text"><text:span text:style-name="Source_20_Text">CREATE INDEX idx_articulos_categoria</text:span></text:p>
        <text:p text:style-name="P1"><text:span text:style-name="Source_20_Text"><text:s text:c="4"/>ON stock.articulos(categoria_id);</text:span></text:p>
        <text:h text:style-name="Heading_20_3" text:outline-level="3"><text:span text:style-name="Source_20_Text">facturacion.facturas(pedido_id)</text:span></text:h>
        <text:p text:style-name="Text_20_body">sql</text:p>
        <text:p text:style-name="Preformatted_20_Text"><text:span text:style-name="Source_20_Text">CREATE INDEX idx_facturas_pedido</text:span></text:p>
        <text:p text:style-name="P1"><text:span text:style-name="Source_20_Text"><text:s text:c="4"/>ON facturacion.facturas(pedido_id);</text:span></text:p>
        <text:h text:style-name="Heading_20_1" text:outline-level="1">📌 Índices para búsquedas comunes</text:h>
        <text:h text:style-name="Heading_20_3" text:outline-level="3">Buscar artículos por nombre</text:h>
        <text:p text:style-name="Text_20_body">sql</text:p>
        <text:p text:style-name="Preformatted_20_Text"><text:span text:style-name="Source_20_Text">CREATE INDEX idx_articulos_nombre</text:span></text:p>
        <text:p text:style-name="P1"><text:span text:style-name="Source_20_Text"><text:s text:c="4"/>ON stock.articulos(nombre);</text:span></text:p>
        <text:h text:style-name="Heading_20_3" text:outline-level="3">Buscar clientes por email</text:h>
        <text:p text:style-name="Text_20_body">sql</text:p>
        <text:p text:style-name="Preformatted_20_Text"><text:span text:style-name="Source_20_Text">CREATE INDEX idx_clientes_email</text:span></text:p>
        <text:p text:style-name="P1"><text:span text:style-name="Source_20_Text"><text:s text:c="4"/>ON ventas.clientes(email);</text:span></text:p>
        <text:h text:style-name="Heading_20_1" text:outline-level="1">🧩 ¿Qué has aprendido aquí?</text:h>
        <text:list xml:id="list1706206672" text:style-name="L12">
          <text:list-item>
            <text:p text:style-name="P13">Las claves primarias ya tienen índice, pero las foráneas no.</text:p>
          </text:list-item>
          <text:list-item>
            <text:p text:style-name="P13">Indexar relaciones acelera JOINs y consultas habituales.</text:p>
          </text:list-item>
          <text:list-item>
            <text:p text:style-name="P13">Los índices básicos son simples <text:span text:style-name="Source_20_Text">btree</text:span>, perfectos para la mayoría de casos.</text:p>
          </text:list-item>
          <text:list-item>
            <text:p text:style-name="P13">No hemos creado nada innecesario: solo lo que aporta rendimiento real.</text:p>
          </text:list-item>
        </text:list>
        <text:h text:style-name="Heading_20_1" text:outline-level="1">🔜 Siguiente paso</text:h>
        <text:p text:style-name="Text_20_body">Ahora toca algo más interesante: <text:span text:style-name="Strong_20_Emphasis">triggers y funciones</text:span>, por ejemplo:</text:p>
        <text:list xml:id="list1303656807" text:style-name="L13">
          <text:list-item>
            <text:p text:style-name="P14">Actualizar stock automáticamente cuando se inserta una línea de pedido</text:p>
          </text:list-item>
          <text:list-item>
            <text:p text:style-name="P14">Calcular el total de una factura</text:p>
          </text:list-item>
          <text:list-item>
            <text:p text:style-name="P14"><text:soft-page-break/>Registrar auditoría de cambios</text:p>
          </text:list-item>
          <text:list-item>
            <text:p text:style-name="P14">Validar datos antes de insertar</text:p>
          </text:list-item>
        </text:list>
        <text:p text:style-name="Text_20_body">Pero antes de avanzar, necesito elegir <text:span text:style-name="Strong_20_Emphasis">qué trigger hacemos primero</text:span>.</text:p>
        <text:p text:style-name="Text_20_body">👉 <text:span text:style-name="Strong_20_Emphasis">¿Qué prefieres que implementemos como primer trigger?</text:span></text:p>
        <text:list xml:id="list2743297141" text:style-name="L14">
          <text:list-item>
            <text:p text:style-name="P15"><text:span text:style-name="Strong_20_Emphasis">Reducir stock automáticamente al crear una línea de pedido</text:span></text:p>
          </text:list-item>
          <text:list-item>
            <text:p text:style-name="P15"><text:span text:style-name="Strong_20_Emphasis">Calcular el total del pedido automáticamente</text:span></text:p>
          </text:list-item>
          <text:list-item>
            <text:p text:style-name="P15"><text:span text:style-name="Strong_20_Emphasis">Generar la factura automáticamente cuando un pedido pasa a “entregado”</text:span></text:p>
          </text:list-item>
        </text:list>
        <text:p text:style-name="Text_20_body">Dime <text:span text:style-name="Strong_20_Emphasis">1, 2 o 3</text:span>, y seguimos.</text:p>
      </text:section>
      <text:section text:style-name="Sect1" text:name="pP6FcwB6no562Dy6g4KC3-user-message">
        <text:p text:style-name="Standard">1</text:p>
      </text:section>
      <text:section text:style-name="Sect1" text:name="yBHdwGn3rxm7EMXe6mLFH-content-0">
        <text:p text:style-name="Text_20_body">Perfecto, Jose. Vamos a crear el <text:span text:style-name="Strong_20_Emphasis">trigger que descuenta stock automáticamente</text:span> cuando se inserta una línea de pedido. Sigo en modo estudio: <text:span text:style-name="Strong_20_Emphasis">una idea clave</text:span>, <text:span text:style-name="Strong_20_Emphasis">explicación clara</text:span>, <text:span text:style-name="Strong_20_Emphasis">paso pequeño</text:span>, y luego te dejo avanzar.</text:p>
        <text:h text:style-name="Heading_20_1" text:outline-level="1">🧱 Paso 6 — Trigger para reducir stock al crear una línea de pedido</text:h>
        <text:h text:style-name="Heading_20_2" text:outline-level="2">🎯 Idea clave del paso</text:h>
        <text:p text:style-name="Text_20_body">Cuando insertas una línea de pedido, el sistema debe <text:span text:style-name="Strong_20_Emphasis">restar del inventario</text:span> la cantidad vendida. Esto se hace con:</text:p>
        <text:list xml:id="list4159196440" text:style-name="L15">
          <text:list-item>
            <text:p text:style-name="P16"><text:span text:style-name="Strong_20_Emphasis">Una función</text:span> (en PostgreSQL, los triggers llaman funciones).</text:p>
          </text:list-item>
          <text:list-item>
            <text:p text:style-name="P16"><text:span text:style-name="Strong_20_Emphasis">Un trigger</text:span> que se ejecuta después del <text:span text:style-name="Source_20_Text">INSERT</text:span>.</text:p>
          </text:list-item>
        </text:list>
        <text:h text:style-name="Heading_20_1" text:outline-level="1">🧠 Función que actualiza el stock</text:h>
        <text:p text:style-name="Text_20_body">La función vive en el esquema <text:span text:style-name="Source_20_Text">stock</text:span>, porque es quien gestiona inventario.</text:p>
        <text:p text:style-name="Text_20_body">sql</text:p>
        <text:p text:style-name="Preformatted_20_Text"><text:span text:style-name="Source_20_Text">CREATE OR REPLACE FUNCTION stock.reducir_stock()</text:span></text:p>
        <text:p text:style-name="Preformatted_20_Text"><text:span text:style-name="Source_20_Text">RETURNS TRIGGER AS $$</text:span></text:p>
        <text:p text:style-name="Preformatted_20_Text"><text:span text:style-name="Source_20_Text">BEGIN</text:span></text:p>
        <text:p text:style-name="Preformatted_20_Text"><text:span text:style-name="Source_20_Text"><text:s text:c="4"/>UPDATE stock.articulos</text:span></text:p>
        <text:p text:style-name="Preformatted_20_Text"><text:span text:style-name="Source_20_Text"><text:s text:c="4"/>SET stock_actual = stock_actual - NEW.cantidad</text:span></text:p>
        <text:p text:style-name="Preformatted_20_Text"><text:span text:style-name="Source_20_Text"><text:s text:c="4"/>WHERE id = NEW.articulo_id;</text:span></text:p>
        <text:p text:style-name="Preformatted_20_Text"/>
        <text:p text:style-name="Preformatted_20_Text"><text:span text:style-name="Source_20_Text"><text:s text:c="4"/>RETURN NEW;</text:span></text:p>
        <text:p text:style-name="Preformatted_20_Text"><text:span text:style-name="Source_20_Text">END;</text:span></text:p>
        <text:p text:style-name="P1"><text:span text:style-name="Source_20_Text">$$ LANGUAGE plpgsql;</text:span></text:p>
        <text:h text:style-name="Heading_20_1" text:outline-level="1">🔔 Trigger que llama a la función</text:h>
        <text:p text:style-name="Text_20_body">El trigger vive en el esquema <text:span text:style-name="Source_20_Text">ventas</text:span>, porque se dispara al insertar líneas de pedido.</text:p>
        <text:p text:style-name="Text_20_body"><text:soft-page-break/>sql</text:p>
        <text:p text:style-name="Preformatted_20_Text"><text:span text:style-name="Source_20_Text">CREATE TRIGGER trg_reducir_stock</text:span></text:p>
        <text:p text:style-name="Preformatted_20_Text"><text:span text:style-name="Source_20_Text">AFTER INSERT ON ventas.lineas_pedido</text:span></text:p>
        <text:p text:style-name="Preformatted_20_Text"><text:span text:style-name="Source_20_Text">FOR EACH ROW</text:span></text:p>
        <text:p text:style-name="P1"><text:span text:style-name="Source_20_Text">EXECUTE FUNCTION stock.reducir_stock();</text:span></text:p>
        <text:h text:style-name="Heading_20_1" text:outline-level="1">🧩 ¿Qué has aprendido aquí?</text:h>
        <text:list xml:id="list3788837888" text:style-name="L16">
          <text:list-item>
            <text:p text:style-name="P17">Los triggers <text:span text:style-name="Strong_20_Emphasis">siempre</text:span> llaman funciones.</text:p>
          </text:list-item>
          <text:list-item>
            <text:p text:style-name="P17"><text:span text:style-name="Source_20_Text">NEW.cantidad</text:span> y <text:span text:style-name="Source_20_Text">NEW.articulo_id</text:span> son los valores recién insertados.</text:p>
          </text:list-item>
          <text:list-item>
            <text:p text:style-name="P17"><text:span text:style-name="Source_20_Text">AFTER INSERT</text:span> asegura que la línea de pedido exista antes de modificar stock.</text:p>
          </text:list-item>
          <text:list-item>
            <text:p text:style-name="P17">La lógica vive en el esquema que corresponde (buena práctica profesional).</text:p>
          </text:list-item>
        </text:list>
        <text:h text:style-name="Heading_20_1" text:outline-level="1">🔜 Siguiente paso</text:h>
        <text:p text:style-name="Text_20_body">Ahora podemos avanzar a algo muy útil: <text:span text:style-name="Strong_20_Emphasis">calcular automáticamente el total del pedido</text:span> o <text:span text:style-name="Strong_20_Emphasis">generar la factura</text:span>.</text:p>
        <text:p text:style-name="Text_20_body">Para seguir el ritmo del curso, te propongo continuar con:</text:p>
        <text:p text:style-name="Text_20_body">👉 <text:span text:style-name="Strong_20_Emphasis">Calcular el total del pedido automáticamente cuando cambian sus líneas.</text:span></text:p>
        <text:p text:style-name="Text_20_body">Antes de avanzar, solo necesito una mini‑confirmación:</text:p>
        <text:p text:style-name="Text_20_body"><text:span text:style-name="Strong_20_Emphasis">¿Quieres que el total del pedido se calcule:</text:span></text:p>
        <text:list xml:id="list523924706" text:style-name="L17">
          <text:list-item>
            <text:p text:style-name="P18"><text:span text:style-name="Strong_20_Emphasis">Con un trigger</text:span> (automático y transparente)</text:p>
          </text:list-item>
          <text:list-item>
            <text:p text:style-name="P18"><text:span text:style-name="Strong_20_Emphasis">Con una función que se llame manualmente</text:span> (más control)</text:p>
          </text:list-item>
        </text:list>
        <text:p text:style-name="Text_20_body">Dime <text:span text:style-name="Strong_20_Emphasis">1 o 2</text:span>, y seguimos.</text:p>
      </text:section>
      <text:section text:style-name="Sect1" text:name="MmioL7kNbfWKuLibu2RD3-user-message">
        <text:p text:style-name="Standard">de donde sale NEW.cantidad y new.articulo_id ?</text:p>
      </text:section>
      <text:section text:style-name="Sect1" text:name="QfhDQjnKPQFvGfZs7RgiA-content-0">
        <text:p text:style-name="Text_20_body">Buena pregunta, Jose — y muy importante para entender cómo funcionan los triggers. Sigo en modo estudio: <text:span text:style-name="Strong_20_Emphasis">una idea clave</text:span>, <text:span text:style-name="Strong_20_Emphasis">explicación clara</text:span>, <text:span text:style-name="Strong_20_Emphasis">paso pequeño</text:span>, y paro para que sigas conmigo.</text:p>
        <text:h text:style-name="Heading_20_1" text:outline-level="1">🧠 ¿De dónde salen <text:span text:style-name="Source_20_Text">NEW.cantidad</text:span> y <text:span text:style-name="Source_20_Text">NEW.articulo_id</text:span>?</text:h>
        <text:h text:style-name="Heading_20_2" text:outline-level="2">🎯 Idea clave del paso</text:h>
        <text:p text:style-name="Text_20_body">Cuando haces un <text:span text:style-name="Source_20_Text">INSERT</text:span> en una tabla, PostgreSQL crea un <text:span text:style-name="Strong_20_Emphasis">registro virtual</text:span> llamado <text:span text:style-name="Source_20_Text">NEW</text:span> que contiene <text:span text:style-name="Strong_20_Emphasis">los valores que estás insertando en esa fila</text:span>.</text:p>
        <text:p text:style-name="Text_20_body">Ese registro solo existe <text:span text:style-name="Strong_20_Emphasis">dentro del trigger</text:span>.</text:p>
        <text:h text:style-name="Heading_20_1" text:outline-level="1"><text:soft-page-break/>📌 Ejemplo real</text:h>
        <text:p text:style-name="Text_20_body">Si insertas esto:</text:p>
        <text:p text:style-name="Text_20_body">sql</text:p>
        <text:p text:style-name="Preformatted_20_Text"><text:span text:style-name="Source_20_Text">INSERT INTO ventas.lineas_pedido (pedido_id, articulo_id, cantidad, precio_unitario)</text:span></text:p>
        <text:p text:style-name="P1"><text:span text:style-name="Source_20_Text">VALUES (10, 5, 3, 199.99);</text:span></text:p>
        <text:p text:style-name="Text_20_body">Entonces, dentro del trigger:</text:p>
        <text:list xml:id="list3707770202" text:style-name="L18">
          <text:list-item>
            <text:p text:style-name="P19"><text:span text:style-name="Source_20_Text">NEW.pedido_id</text:span> = 10</text:p>
          </text:list-item>
          <text:list-item>
            <text:p text:style-name="P19"><text:span text:style-name="Source_20_Text">NEW.articulo_id</text:span> = 5</text:p>
          </text:list-item>
          <text:list-item>
            <text:p text:style-name="P19"><text:span text:style-name="Source_20_Text">NEW.cantidad</text:span> = 3</text:p>
          </text:list-item>
          <text:list-item>
            <text:p text:style-name="P19"><text:span text:style-name="Source_20_Text">NEW.precio_unitario</text:span> = 199.99</text:p>
          </text:list-item>
        </text:list>
        <text:p text:style-name="Text_20_body">Es decir:</text:p>
        <text:p text:style-name="Text_20_body">👉 <text:span text:style-name="Source_20_Text">NEW</text:span><text:span text:style-name="Strong_20_Emphasis"> = la fila que se está insertando ahora mismo.</text:span></text:p>
        <text:h text:style-name="Heading_20_1" text:outline-level="1">📦 ¿Por qué existen esos campos?</text:h>
        <text:p text:style-name="Text_20_body">Porque en tu tabla <text:span text:style-name="Source_20_Text">ventas.lineas_pedido</text:span> definiste estas columnas:</text:p>
        <text:p text:style-name="Text_20_body">sql</text:p>
        <text:p text:style-name="Preformatted_20_Text"><text:span text:style-name="Source_20_Text">articulo_id INT NOT NULL,</text:span></text:p>
        <text:p text:style-name="P1"><text:span text:style-name="Source_20_Text">cantidad INT NOT NULL,</text:span></text:p>
        <text:p text:style-name="Text_20_body">Entonces el trigger puede acceder a ellas como:</text:p>
        <text:list xml:id="list1436610056" text:style-name="L19">
          <text:list-item>
            <text:p text:style-name="P20"><text:span text:style-name="Source_20_Text">NEW.articulo_id</text:span></text:p>
          </text:list-item>
          <text:list-item>
            <text:p text:style-name="P20"><text:span text:style-name="Source_20_Text">NEW.cantidad</text:span></text:p>
          </text:list-item>
        </text:list>
        <text:h text:style-name="Heading_20_1" text:outline-level="1">🧩 ¿Qué has aprendido aquí?</text:h>
        <text:list xml:id="list118963562" text:style-name="L20">
          <text:list-item>
            <text:p text:style-name="P21"><text:span text:style-name="Source_20_Text">NEW</text:span> representa la fila recién insertada.</text:p>
          </text:list-item>
          <text:list-item>
            <text:p text:style-name="P21">Sus campos son exactamente las columnas de la tabla.</text:p>
          </text:list-item>
          <text:list-item>
            <text:p text:style-name="P21">Los triggers usan <text:span text:style-name="Source_20_Text">NEW</text:span> para leer los valores y actuar en consecuencia.</text:p>
          </text:list-item>
        </text:list>
        <text:h text:style-name="Heading_20_1" text:outline-level="1">🔍 Mini‑paso para seguir</text:h>
        <text:p text:style-name="Text_20_body">¿Quieres que te muestre <text:span text:style-name="Strong_20_Emphasis">cómo evitar que el stock baje por debajo de cero</text:span> usando una validación dentro del trigger?</text:p>
        <text:p text:style-name="Text_20_body">Responde con:</text:p>
        <text:p text:style-name="Text_20_body"><text:soft-page-break/><text:span text:style-name="Strong_20_Emphasis">Sí</text:span> — y te enseño cómo validar stock antes de permitir la venta. <text:span text:style-name="Strong_20_Emphasis">No</text:span> — y seguimos con el siguiente módulo (cálculo automático del total del pedido).</text:p>
      </text:section>
      <text:section text:style-name="Sect1" text:name="ezDKRb8imC5sAEgsMuEEL-user-message">
        <text:p text:style-name="Standard">para que es esto: RETURN NEW;</text:p>
      </text:section>
      <text:section text:style-name="Sect1" text:name="bEN4Xv1ApJPC3KnjA4v3w-content-0">
        <text:p text:style-name="Text_20_body">Buena, Jose. Esta es una de esas dudas que, cuando la entiendes, <text:span text:style-name="Strong_20_Emphasis">todo el mundo de los triggers se vuelve más claro</text:span>. Sigo en modo estudio: <text:span text:style-name="Strong_20_Emphasis">una idea clave</text:span>, <text:span text:style-name="Strong_20_Emphasis">explicación clara</text:span>, <text:span text:style-name="Strong_20_Emphasis">paso pequeño</text:span>, y paro para que sigas conmigo.</text:p>
        <text:h text:style-name="Heading_20_1" text:outline-level="1">🎯 Idea clave</text:h>
        <text:p text:style-name="Text_20_body"><text:span text:style-name="Source_20_Text">RETURN NEW;</text:span> le dice al trigger <text:span text:style-name="Strong_20_Emphasis">qué fila debe continuar hacia la tabla</text:span> después de ejecutar la lógica del trigger.</text:p>
        <text:h text:style-name="Heading_20_1" text:outline-level="1">🧠 ¿Por qué es necesario <text:span text:style-name="Source_20_Text">RETURN NEW</text:span>?</text:h>
        <text:p text:style-name="Text_20_body">En un trigger de tipo:</text:p>
        <text:list xml:id="list2881448133" text:style-name="L21">
          <text:list-item>
            <text:p text:style-name="P22"><text:span text:style-name="Source_20_Text">BEFORE INSERT</text:span></text:p>
          </text:list-item>
          <text:list-item>
            <text:p text:style-name="P22"><text:span text:style-name="Source_20_Text">BEFORE UPDATE</text:span></text:p>
          </text:list-item>
          <text:list-item>
            <text:p text:style-name="P22"><text:span text:style-name="Source_20_Text">AFTER INSERT</text:span></text:p>
          </text:list-item>
          <text:list-item>
            <text:p text:style-name="P22"><text:span text:style-name="Source_20_Text">AFTER UPDATE</text:span></text:p>
          </text:list-item>
        </text:list>
        <text:p text:style-name="Text_20_body">PostgreSQL espera que la función devuelva <text:span text:style-name="Strong_20_Emphasis">una fila</text:span>.</text:p>
        <text:p text:style-name="Text_20_body">Esa fila puede ser:</text:p>
        <text:list xml:id="list573677337" text:style-name="L22">
          <text:list-item>
            <text:p text:style-name="P23"><text:span text:style-name="Source_20_Text">NEW</text:span> → la fila tal cual se está insertando</text:p>
          </text:list-item>
          <text:list-item>
            <text:p text:style-name="P23"><text:span text:style-name="Source_20_Text">MODIFIED NEW</text:span> → la fila modificada por el trigger</text:p>
          </text:list-item>
          <text:list-item>
            <text:p text:style-name="P23"><text:span text:style-name="Source_20_Text">NULL</text:span> → cancelar la operación</text:p>
          </text:list-item>
        </text:list>
        <text:h text:style-name="Heading_20_1" text:outline-level="1">📌 En nuestro caso (AFTER INSERT)</text:h>
        <text:p text:style-name="Text_20_body">Como el trigger es:</text:p>
        <text:p text:style-name="Text_20_body">sql</text:p>
        <text:p text:style-name="P1"><text:span text:style-name="Source_20_Text">AFTER INSERT ON ventas.lineas_pedido</text:span></text:p>
        <text:p text:style-name="Text_20_body">La fila <text:span text:style-name="Strong_20_Emphasis">ya fue insertada</text:span>, así que:</text:p>
        <text:p text:style-name="Text_20_body">👉 <text:span text:style-name="Source_20_Text">RETURN NEW;</text:span> simplemente confirma: <text:span text:style-name="Strong_20_Emphasis">“OK PostgreSQL, sigue adelante, no quiero modificar nada de la fila insertada.”</text:span></text:p>
        <text:p text:style-name="Text_20_body">Si no lo pones, PostgreSQL no sabe qué devolver y da error.</text:p>
        <text:h text:style-name="Heading_20_1" text:outline-level="1"><text:soft-page-break/>📦 Ejemplo visual</text:h>
        <text:p text:style-name="Text_20_body">Imagina que insertas:</text:p>
        <text:p text:style-name="Text_20_body">sql</text:p>
        <text:p text:style-name="Preformatted_20_Text"><text:span text:style-name="Source_20_Text">INSERT INTO ventas.lineas_pedido (pedido_id, articulo_id, cantidad)</text:span></text:p>
        <text:p text:style-name="P1"><text:span text:style-name="Source_20_Text">VALUES (10, 5, 3);</text:span></text:p>
        <text:p text:style-name="Text_20_body">Dentro del trigger:</text:p>
        <text:list xml:id="list3046196980" text:style-name="L23">
          <text:list-item>
            <text:p text:style-name="P24"><text:span text:style-name="Source_20_Text">NEW</text:span> = <text:span text:style-name="Source_20_Text">{pedido_id:10, articulo_id:5, cantidad:3}</text:span></text:p>
          </text:list-item>
          <text:list-item>
            <text:p text:style-name="P24">Actualizamos stock</text:p>
          </text:list-item>
          <text:list-item>
            <text:p text:style-name="P24">Y luego devolvemos esa misma fila:</text:p>
          </text:list-item>
        </text:list>
        <text:p text:style-name="Text_20_body">sql</text:p>
        <text:p text:style-name="P1"><text:span text:style-name="Source_20_Text">RETURN NEW;</text:span></text:p>
        <text:h text:style-name="Heading_20_1" text:outline-level="1">🧩 ¿Qué has aprendido aquí?</text:h>
        <text:list xml:id="list278645245" text:style-name="L24">
          <text:list-item>
            <text:p text:style-name="P25">Los triggers <text:span text:style-name="Strong_20_Emphasis">siempre</text:span> deben devolver algo.</text:p>
          </text:list-item>
          <text:list-item>
            <text:p text:style-name="P25"><text:span text:style-name="Source_20_Text">RETURN NEW</text:span> significa “continúa con la fila tal cual”.</text:p>
          </text:list-item>
          <text:list-item>
            <text:p text:style-name="P25">En triggers AFTER, es obligatorio aunque no modifiques nada.</text:p>
          </text:list-item>
          <text:list-item>
            <text:p text:style-name="P25">En triggers BEFORE, podrías modificar <text:span text:style-name="Source_20_Text">NEW</text:span> antes de devolverlo.</text:p>
          </text:list-item>
        </text:list>
        <text:h text:style-name="Heading_20_1" text:outline-level="1">🔍 Mini‑paso para seguir</text:h>
        <text:p text:style-name="Text_20_body">¿Quieres que te muestre <text:span text:style-name="Strong_20_Emphasis">cómo modificar </text:span><text:span text:style-name="Source_20_Text">NEW</text:span> dentro de un trigger BEFORE (por ejemplo, para normalizar datos o validar valores)?</text:p>
        <text:p text:style-name="Text_20_body">Responde con:</text:p>
        <text:p text:style-name="Text_20_body"><text:span text:style-name="Strong_20_Emphasis">Sí</text:span> — y te enseño cómo manipular <text:span text:style-name="Source_20_Text">NEW</text:span> antes de insertar. <text:span text:style-name="Strong_20_Emphasis">No</text:span> — y seguimos con el cálculo automático del total del pedido.</text:p>
      </text:section>
      <text:section text:style-name="Sect1" text:name="6EgvviWD2fXr3tFxBkyo6-user-message">
        <text:p text:style-name="Standard">No</text:p>
      </text:section>
      <text:section text:style-name="Sect1" text:name="pUwkUutVkgiDQXRXxkimy-content-0">
        <text:p text:style-name="Text_20_body">Perfecto, Jose. Seguimos entonces con el <text:span text:style-name="Strong_20_Emphasis">cálculo automático del total del pedido</text:span>, sin desvíos y sin más preguntas de las necesarias. Sigo en modo estudio: <text:span text:style-name="Strong_20_Emphasis">una idea clave</text:span>, <text:span text:style-name="Strong_20_Emphasis">explicación clara</text:span>, <text:span text:style-name="Strong_20_Emphasis">paso pequeño</text:span>, y paro para que sigas conmigo.</text:p>
      </text:section>
      <text:h text:style-name="Heading_20_1" text:outline-level="1"><text:bookmark text:name="pUwkUutVkgiDQXRXxkimy-content-0"/>🧱 Paso 7 — Calcular automáticamente el total del pedido</text:h>
      <text:section text:style-name="Sect1" text:name="Sección5">
        <text:h text:style-name="Heading_20_2" text:outline-level="2"><text:soft-page-break/>🎯 Idea clave</text:h>
        <text:p text:style-name="Text_20_body">El total de un pedido debe ser <text:span text:style-name="Strong_20_Emphasis">la suma de todas sus líneas</text:span>: cantidad × precio_unitario, acumulado por pedido.</text:p>
        <text:p text:style-name="Text_20_body">Lo ideal es que PostgreSQL lo calcule <text:span text:style-name="Strong_20_Emphasis">solo</text:span>, sin que tú tengas que actualizar nada manualmente.</text:p>
        <text:h text:style-name="Heading_20_1" text:outline-level="1">🧠 Estrategia profesional</text:h>
        <text:list xml:id="list68020238" text:style-name="L25">
          <text:list-item>
            <text:p text:style-name="P26">Creamos una <text:span text:style-name="Strong_20_Emphasis">función</text:span> que recalcula el total.</text:p>
          </text:list-item>
          <text:list-item>
            <text:p text:style-name="P26">Creamos un <text:span text:style-name="Strong_20_Emphasis">trigger</text:span> que se ejecuta cuando:</text:p>
            <text:list>
              <text:list-item>
                <text:p text:style-name="P26">se inserta una línea</text:p>
              </text:list-item>
              <text:list-item>
                <text:p text:style-name="P26">se actualiza una línea</text:p>
              </text:list-item>
              <text:list-item>
                <text:p text:style-name="P26">se borra una línea</text:p>
              </text:list-item>
            </text:list>
          </text:list-item>
        </text:list>
        <text:p text:style-name="Text_20_body">Así el total siempre está correcto.</text:p>
        <text:h text:style-name="Heading_20_1" text:outline-level="1">📌 1. Añadir columna <text:span text:style-name="Source_20_Text">total</text:span> a <text:span text:style-name="Source_20_Text">ventas.pedidos</text:span></text:h>
        <text:p text:style-name="Text_20_body">sql</text:p>
        <text:p text:style-name="Preformatted_20_Text"><text:span text:style-name="Source_20_Text">ALTER TABLE ventas.pedidos</text:span></text:p>
        <text:p text:style-name="P1"><text:span text:style-name="Source_20_Text"><text:s text:c="4"/>ADD COLUMN total NUMERIC(12,2) DEFAULT 0;</text:span></text:p>
        <text:h text:style-name="Heading_20_1" text:outline-level="1">📌 2. Función que recalcula el total del pedido</text:h>
        <text:p text:style-name="Text_20_body">sql</text:p>
        <text:p text:style-name="Preformatted_20_Text"><text:span text:style-name="Source_20_Text">CREATE OR REPLACE FUNCTION ventas.recalcular_total_pedido()</text:span></text:p>
        <text:p text:style-name="Preformatted_20_Text"><text:span text:style-name="Source_20_Text">RETURNS TRIGGER AS $$</text:span></text:p>
        <text:p text:style-name="Preformatted_20_Text"><text:span text:style-name="Source_20_Text">BEGIN</text:span></text:p>
        <text:p text:style-name="Preformatted_20_Text"><text:span text:style-name="Source_20_Text"><text:s text:c="4"/>UPDATE ventas.pedidos p</text:span></text:p>
        <text:p text:style-name="Preformatted_20_Text"><text:span text:style-name="Source_20_Text"><text:s text:c="4"/>SET total = (</text:span></text:p>
        <text:p text:style-name="Preformatted_20_Text"><text:span text:style-name="Source_20_Text"><text:s text:c="8"/>SELECT COALESCE(SUM(cantidad * precio_unitario), 0)</text:span></text:p>
        <text:p text:style-name="Preformatted_20_Text"><text:span text:style-name="Source_20_Text"><text:s text:c="8"/>FROM ventas.lineas_pedido</text:span></text:p>
        <text:p text:style-name="Preformatted_20_Text"><text:span text:style-name="Source_20_Text"><text:s text:c="8"/>WHERE pedido_id = p.id</text:span></text:p>
        <text:p text:style-name="Preformatted_20_Text"><text:span text:style-name="Source_20_Text"><text:s text:c="4"/>)</text:span></text:p>
        <text:p text:style-name="Preformatted_20_Text"><text:span text:style-name="Source_20_Text"><text:s text:c="4"/>WHERE p.id = COALESCE(NEW.pedido_id, OLD.pedido_id);</text:span></text:p>
        <text:p text:style-name="Preformatted_20_Text"/>
        <text:p text:style-name="Preformatted_20_Text"><text:span text:style-name="Source_20_Text"><text:s text:c="4"/>RETURN NEW;</text:span></text:p>
        <text:p text:style-name="Preformatted_20_Text"><text:span text:style-name="Source_20_Text">END;</text:span></text:p>
        <text:p text:style-name="P1"><text:span text:style-name="Source_20_Text">$$ LANGUAGE plpgsql;</text:span></text:p>
        <text:h text:style-name="Heading_20_1" text:outline-level="1">📌 3. Trigger que llama a la función</text:h>
        <text:p text:style-name="Text_20_body">sql</text:p>
        <text:p text:style-name="Preformatted_20_Text"><text:span text:style-name="Source_20_Text">CREATE TRIGGER trg_recalcular_total_pedido</text:span></text:p>
        <text:p text:style-name="Preformatted_20_Text"><text:soft-page-break/><text:span text:style-name="Source_20_Text">AFTER INSERT OR UPDATE OR DELETE ON ventas.lineas_pedido</text:span></text:p>
        <text:p text:style-name="Preformatted_20_Text"><text:span text:style-name="Source_20_Text">FOR EACH ROW</text:span></text:p>
        <text:p text:style-name="P1"><text:span text:style-name="Source_20_Text">EXECUTE FUNCTION ventas.recalcular_total_pedido();</text:span></text:p>
        <text:h text:style-name="Heading_20_1" text:outline-level="1">🧩 ¿Qué has aprendido aquí?</text:h>
        <text:list xml:id="list3269140162" text:style-name="L26">
          <text:list-item>
            <text:p text:style-name="P27">El total del pedido se mantiene <text:span text:style-name="Strong_20_Emphasis">siempre actualizado</text:span> sin intervención manual.</text:p>
          </text:list-item>
          <text:list-item>
            <text:p text:style-name="P27">El trigger usa <text:span text:style-name="Source_20_Text">NEW</text:span> o <text:span text:style-name="Source_20_Text">OLD</text:span> según el caso (insert/update/delete).</text:p>
          </text:list-item>
          <text:list-item>
            <text:p text:style-name="P27">La función es limpia, eficiente y profesional.</text:p>
          </text:list-item>
          <text:list-item>
            <text:p text:style-name="P27">Este patrón se usa en sistemas reales de facturación y e‑commerce.</text:p>
          </text:list-item>
        </text:list>
        <text:h text:style-name="Heading_20_1" text:outline-level="1">🔜 Siguiente paso</text:h>
        <text:p text:style-name="Text_20_body">Ahora que tenemos:</text:p>
        <text:list xml:id="list2020851563" text:style-name="L27">
          <text:list-item>
            <text:p text:style-name="P28">Stock automático</text:p>
          </text:list-item>
          <text:list-item>
            <text:p text:style-name="P28">Totales automáticos</text:p>
          </text:list-item>
          <text:list-item>
            <text:p text:style-name="P28">Estructura profesional</text:p>
          </text:list-item>
        </text:list>
        <text:p text:style-name="Text_20_body">Podemos pasar al siguiente módulo: <text:span text:style-name="Strong_20_Emphasis">generar la factura automáticamente</text:span> cuando el pedido esté listo.</text:p>
        <text:p text:style-name="Text_20_body">Para seguir avanzando, dime solo esto:</text:p>
        <text:p text:style-name="Text_20_body">👉 <text:span text:style-name="Strong_20_Emphasis">¿Quieres que la factura se genere automáticamente cuando el pedido pase a estado </text:span><text:span text:style-name="Source_20_Text">entregado</text:span><text:span text:style-name="Strong_20_Emphasis">?</text:span></text:p>
        <text:p text:style-name="Text_20_body">Responde con:</text:p>
        <text:p text:style-name="Text_20_body"><text:span text:style-name="Strong_20_Emphasis">Sí</text:span> — y te enseño el trigger completo. <text:span text:style-name="Strong_20_Emphasis">No</text:span> — y pasamos a otro módulo (consultas avanzadas, roles, vistas, procedimientos, etc.).</text:p>
      </text:section>
      <text:section text:style-name="Sect1" text:name="p5Kih2V9ozXFsnFXqMAMP-user-message">
        <text:p text:style-name="Standard">old es cuando es delete?</text:p>
      </text:section>
      <text:section text:style-name="Sect1" text:name="U6bsH8R4nLSaLNMKohRYB-content-0">
        <text:p text:style-name="Text_20_body">Muy buena observación, Jose. Esta es una de esas piezas clave para entender cómo funcionan los triggers en PostgreSQL. Sigo en modo estudio: <text:span text:style-name="Strong_20_Emphasis">una idea clara</text:span>, <text:span text:style-name="Strong_20_Emphasis">explicación corta</text:span>, <text:span text:style-name="Strong_20_Emphasis">un paso</text:span>, y paro para que sigas conmigo.</text:p>
        <text:h text:style-name="Heading_20_1" text:outline-level="1">🎯 Idea clave</text:h>
        <text:p text:style-name="Text_20_body">Sí: <text:span text:style-name="Source_20_Text">OLD</text:span><text:span text:style-name="Strong_20_Emphasis"> existe cuando el trigger es UPDATE o DELETE.</text:span></text:p>
        <text:h text:style-name="Heading_20_1" text:outline-level="1">🧠 ¿Cuándo existe <text:span text:style-name="Source_20_Text">OLD</text:span> y cuándo existe <text:span text:style-name="Source_20_Text">NEW</text:span>?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Table_20_Heading">Operación</text:p>
              </table:table-cell>
              <table:table-cell table:style-name="Tabla1.A1" office:value-type="string">
                <text:p text:style-name="Table_20_Heading"><text:span text:style-name="Source_20_Text">NEW</text:span></text:p>
              </table:table-cell>
              <table:table-cell table:style-name="Tabla1.A1" office:value-type="string">
                <text:p text:style-name="Table_20_Heading"><text:span text:style-name="Source_20_Text">OLD</text:span></text:p>
              </table:table-cell>
            </table:table-row>
          </table:table-header-rows>
          <table:table-row>
            <table:table-cell table:style-name="Tabla1.A1" office:value-type="string">
              <text:p text:style-name="Table_20_Heading">INSERT</text:p>
            </table:table-cell>
            <table:table-cell table:style-name="Tabla1.A1" office:value-type="string">
              <text:p text:style-name="Table_20_Contents">✔️ existe</text:p>
            </table:table-cell>
            <table:table-cell table:style-name="Tabla1.A1" office:value-type="string">
              <text:p text:style-name="Table_20_Contents">❌ no existe</text:p>
            </table:table-cell>
          </table:table-row>
          <table:table-row>
            <table:table-cell table:style-name="Tabla1.A1" office:value-type="string">
              <text:p text:style-name="Table_20_Heading">UPDATE</text:p>
            </table:table-cell>
            <table:table-cell table:style-name="Tabla1.A1" office:value-type="string">
              <text:p text:style-name="Table_20_Contents">✔️ existe (nuevos valores)</text:p>
            </table:table-cell>
            <table:table-cell table:style-name="Tabla1.A1" office:value-type="string">
              <text:p text:style-name="Table_20_Contents">✔️ existe (valores antiguos)</text:p>
            </table:table-cell>
          </table:table-row>
          <table:table-row>
            <table:table-cell table:style-name="Tabla1.A1" office:value-type="string">
              <text:p text:style-name="Table_20_Heading"><text:soft-page-break/>DELETE</text:p>
            </table:table-cell>
            <table:table-cell table:style-name="Tabla1.A1" office:value-type="string">
              <text:p text:style-name="Table_20_Contents"><text:soft-page-break/>❌ no existe</text:p>
            </table:table-cell>
            <table:table-cell table:style-name="Tabla1.A1" office:value-type="string">
              <text:p text:style-name="Table_20_Contents"><text:soft-page-break/>✔️ existe (fila que se está borrando)</text:p>
            </table:table-cell>
          </table:table-row>
        </table:table>
        <text:h text:style-name="Heading_20_1" text:outline-level="1">📌 Ejemplo práctico</text:h>
        <text:p text:style-name="Text_20_body">Si borras una línea de pedido:</text:p>
        <text:p text:style-name="Text_20_body">sql</text:p>
        <text:p text:style-name="P1"><text:span text:style-name="Source_20_Text">DELETE FROM ventas.lineas_pedido WHERE id = 20;</text:span></text:p>
        <text:p text:style-name="Text_20_body">Dentro del trigger:</text:p>
        <text:list xml:id="list3628477390" text:style-name="L28">
          <text:list-item>
            <text:p text:style-name="P29"><text:span text:style-name="Source_20_Text">OLD.id</text:span> = 20</text:p>
          </text:list-item>
          <text:list-item>
            <text:p text:style-name="P29"><text:span text:style-name="Source_20_Text">OLD.pedido_id</text:span> = el pedido al que pertenecía</text:p>
          </text:list-item>
          <text:list-item>
            <text:p text:style-name="P29"><text:span text:style-name="Source_20_Text">OLD.cantidad</text:span> = la cantidad que tenía</text:p>
          </text:list-item>
          <text:list-item>
            <text:p text:style-name="P29"><text:span text:style-name="Source_20_Text">OLD.precio_unitario</text:span> = su precio</text:p>
          </text:list-item>
        </text:list>
        <text:p text:style-name="Text_20_body">Y <text:span text:style-name="Strong_20_Emphasis">NO</text:span> existe <text:span text:style-name="Source_20_Text">NEW</text:span>, porque no hay fila nueva.</text:p>
        <text:h text:style-name="Heading_20_1" text:outline-level="1">📦 ¿Por qué usamos <text:span text:style-name="Source_20_Text">OLD</text:span> en el trigger del total del pedido?</text:h>
        <text:p text:style-name="Text_20_body">Porque si borras una línea, necesitamos saber <text:span text:style-name="Strong_20_Emphasis">a qué pedido pertenecía</text:span> para recalcular su total.</text:p>
        <text:p text:style-name="Text_20_body">Por eso en la función usamos:</text:p>
        <text:p text:style-name="Text_20_body">sql</text:p>
        <text:p text:style-name="P1"><text:span text:style-name="Source_20_Text">COALESCE(NEW.pedido_id, OLD.pedido_id)</text:span></text:p>
        <text:p text:style-name="Text_20_body">Significa:</text:p>
        <text:list xml:id="list2842582349" text:style-name="L29">
          <text:list-item>
            <text:p text:style-name="P30">Si hay <text:span text:style-name="Source_20_Text">NEW</text:span> (INSERT/UPDATE), usa <text:span text:style-name="Source_20_Text">NEW.pedido_id</text:span>.</text:p>
          </text:list-item>
          <text:list-item>
            <text:p text:style-name="P30">Si no hay <text:span text:style-name="Source_20_Text">NEW</text:span> (DELETE), usa <text:span text:style-name="Source_20_Text">OLD.pedido_id</text:span>.</text:p>
          </text:list-item>
        </text:list>
        <text:h text:style-name="Heading_20_1" text:outline-level="1">🧩 ¿Qué has aprendido aquí?</text:h>
        <text:list xml:id="list4094386987" text:style-name="L30">
          <text:list-item>
            <text:p text:style-name="P31"><text:span text:style-name="Source_20_Text">NEW</text:span> = fila nueva (INSERT/UPDATE).</text:p>
          </text:list-item>
          <text:list-item>
            <text:p text:style-name="P31"><text:span text:style-name="Source_20_Text">OLD</text:span> = fila antigua (UPDATE/DELETE).</text:p>
          </text:list-item>
          <text:list-item>
            <text:p text:style-name="P31">DELETE solo tiene <text:span text:style-name="Source_20_Text">OLD</text:span>.</text:p>
          </text:list-item>
          <text:list-item>
            <text:p text:style-name="P31">UPDATE tiene ambos.</text:p>
          </text:list-item>
          <text:list-item>
            <text:p text:style-name="P31">INSERT solo tiene <text:span text:style-name="Source_20_Text">NEW</text:span>.</text:p>
          </text:list-item>
        </text:list>
        <text:h text:style-name="Heading_20_1" text:outline-level="1"><text:soft-page-break/>🔍 Mini‑paso para seguir</text:h>
        <text:p text:style-name="Text_20_body">¿Quieres que ahora implementemos <text:span text:style-name="Strong_20_Emphasis">el trigger que genera automáticamente la factura</text:span> cuando el pedido pasa a estado <text:span text:style-name="Source_20_Text">entregado</text:span>?</text:p>
        <text:p text:style-name="Text_20_body">Responde con:</text:p>
        <text:p text:style-name="Text_20_body"><text:span text:style-name="Strong_20_Emphasis">Sí</text:span> — y lo construimos paso a paso. <text:span text:style-name="Strong_20_Emphasis">No</text:span> — y pasamos a otro módulo (roles, vistas, consultas avanzadas, procedimientos, etc.).</text:p>
      </text:section>
      <text:section text:style-name="Sect1" text:name="Sección6">
        <text:p text:style-name="Standard"><text:bookmark text:name="nrZvMgfg2VNCyytewUHio-user-message1"/>si</text:p>
      </text:section>
      <text:section text:style-name="Sect1" text:name="Sección7">
        <text:p text:style-name="Standard"><text:bookmark text:name="nrZvMgfg2VNCyytewUHio-user-message2"/>si</text:p>
      </text:section>
      <text:section text:style-name="Sect1" text:name="LYNbuevpsp72Nfn16auEC-content-0">
        <text:p text:style-name="Text_20_body">Perfecto, Jose. Vamos a generar la <text:span text:style-name="Strong_20_Emphasis">factura automáticamente</text:span> cuando un pedido cambie su estado a <text:span text:style-name="Source_20_Text">entregado</text:span>. Sigo en modo estudio: <text:span text:style-name="Strong_20_Emphasis">una idea clave</text:span>, <text:span text:style-name="Strong_20_Emphasis">explicación clara</text:span>, <text:span text:style-name="Strong_20_Emphasis">paso pequeño</text:span>, y paro para que sigas conmigo.</text:p>
        <text:h text:style-name="Heading_20_1" text:outline-level="1">🧱 Paso 8 — Crear factura automáticamente al entregar un pedido</text:h>
      </text:section>
      <text:section text:style-name="Sect1" text:name="LYNbuevpsp72Nfn16auEC-content-1">
        <text:p text:style-name="Standard"/>
      </text:section>
      <text:section text:style-name="Sect1" text:name="LYNbuevpsp72Nfn16auEC-content-2">
        <text:h text:style-name="Heading_20_2" text:outline-level="2">🎯 Idea clave</text:h>
        <text:p text:style-name="Text_20_body">Un trigger puede detectar cuando un pedido cambia de estado y, si pasa a <text:span text:style-name="Source_20_Text">entregado</text:span>, crear automáticamente una factura en el esquema <text:span text:style-name="Source_20_Text">facturacion</text:span>.</text:p>
        <text:p text:style-name="Text_20_body">Esto evita errores humanos y asegura que <text:span text:style-name="Strong_20_Emphasis">todo pedido entregado tenga su factura</text:span>.</text:p>
        <text:h text:style-name="Heading_20_1" text:outline-level="1">🧠 1. Función que genera la factura</text:h>
        <text:p text:style-name="Text_20_body">La factura debe incluir:</text:p>
        <text:list xml:id="list3619731940" text:style-name="L31">
          <text:list-item>
            <text:p text:style-name="P32">el <text:span text:style-name="Source_20_Text">pedido_id</text:span></text:p>
          </text:list-item>
          <text:list-item>
            <text:p text:style-name="P32">la fecha</text:p>
          </text:list-item>
          <text:list-item>
            <text:p text:style-name="P32">el total del pedido (que ya calculamos automáticamente)</text:p>
          </text:list-item>
        </text:list>
        <text:p text:style-name="Text_20_body">sql</text:p>
        <text:p text:style-name="Preformatted_20_Text"><text:span text:style-name="Source_20_Text">CREATE OR REPLACE FUNCTION facturacion.generar_factura()</text:span></text:p>
        <text:p text:style-name="Preformatted_20_Text"><text:span text:style-name="Source_20_Text">RETURNS TRIGGER AS $$</text:span></text:p>
        <text:p text:style-name="Preformatted_20_Text"><text:span text:style-name="Source_20_Text">BEGIN</text:span></text:p>
        <text:p text:style-name="Preformatted_20_Text"><text:span text:style-name="Source_20_Text"><text:s text:c="4"/>-- Solo generar factura si el nuevo estado es 'entregado'</text:span></text:p>
        <text:p text:style-name="Preformatted_20_Text"><text:span text:style-name="Source_20_Text"><text:s text:c="4"/>IF NEW.estado = 'entregado' THEN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-- Evitar duplicados si ya existe factura</text:span></text:p>
        <text:p text:style-name="Preformatted_20_Text"><text:span text:style-name="Source_20_Text"><text:s text:c="8"/>IF NOT EXISTS (</text:span></text:p>
        <text:p text:style-name="Preformatted_20_Text"><text:span text:style-name="Source_20_Text"><text:s text:c="12"/>SELECT 1 FROM facturacion.facturas</text:span></text:p>
        <text:p text:style-name="Preformatted_20_Text"><text:span text:style-name="Source_20_Text"><text:s text:c="12"/>WHERE pedido_id = NEW.id</text:span></text:p>
        <text:p text:style-name="Preformatted_20_Text"><text:span text:style-name="Source_20_Text"><text:s text:c="8"/>) THEN</text:span></text:p>
        <text:p text:style-name="Preformatted_20_Text"><text:span text:style-name="Source_20_Text"><text:s text:c="8"/></text:span></text:p>
        <text:p text:style-name="Preformatted_20_Text"><text:span text:style-name="Source_20_Text"><text:s text:c="12"/>INSERT INTO facturacion.facturas (pedido_id, total)</text:span></text:p>
        <text:p text:style-name="Preformatted_20_Text"><text:span text:style-name="Source_20_Text"><text:s text:c="12"/>VALUES (NEW.id, NEW.total);</text:span></text:p>
        <text:p text:style-name="Preformatted_20_Text"><text:soft-page-break/><text:span text:style-name="Source_20_Text"><text:s text:c="8"/></text:span></text:p>
        <text:p text:style-name="Preformatted_20_Text"><text:span text:style-name="Source_20_Text"><text:s text:c="8"/>END IF;</text:span></text:p>
        <text:p text:style-name="Preformatted_20_Text"><text:span text:style-name="Source_20_Text"><text:s text:c="4"/>END IF;</text:span></text:p>
        <text:p text:style-name="Preformatted_20_Text"/>
        <text:p text:style-name="Preformatted_20_Text"><text:span text:style-name="Source_20_Text"><text:s text:c="4"/>RETURN NEW;</text:span></text:p>
        <text:p text:style-name="Preformatted_20_Text"><text:span text:style-name="Source_20_Text">END;</text:span></text:p>
        <text:p text:style-name="P1"><text:span text:style-name="Source_20_Text">$$ LANGUAGE plpgsql;</text:span></text:p>
        <text:h text:style-name="Heading_20_1" text:outline-level="1">🔔 2. Trigger que detecta el cambio de estado</text:h>
        <text:p text:style-name="Text_20_body">Este trigger se ejecuta cuando se actualiza un pedido.</text:p>
        <text:p text:style-name="Text_20_body">sql</text:p>
        <text:p text:style-name="Preformatted_20_Text"><text:span text:style-name="Source_20_Text">CREATE TRIGGER trg_generar_factura</text:span></text:p>
        <text:p text:style-name="Preformatted_20_Text"><text:span text:style-name="Source_20_Text">AFTER UPDATE ON ventas.pedidos</text:span></text:p>
        <text:p text:style-name="Preformatted_20_Text"><text:span text:style-name="Source_20_Text">FOR EACH ROW</text:span></text:p>
        <text:p text:style-name="Preformatted_20_Text"><text:span text:style-name="Source_20_Text">WHEN (OLD.estado IS DISTINCT FROM NEW.estado)</text:span></text:p>
        <text:p text:style-name="P1"><text:span text:style-name="Source_20_Text">EXECUTE FUNCTION facturacion.generar_factura();</text:span></text:p>
        <text:h text:style-name="Heading_20_1" text:outline-level="1">🧩 ¿Qué has aprendido aquí?</text:h>
        <text:list xml:id="list634358527" text:style-name="L32">
          <text:list-item>
            <text:p text:style-name="P33">El trigger se ejecuta <text:span text:style-name="Strong_20_Emphasis">solo cuando cambia el estado</text:span>, no en cualquier UPDATE.</text:p>
          </text:list-item>
          <text:list-item>
            <text:p text:style-name="P33">La función comprueba si el estado nuevo es <text:span text:style-name="Source_20_Text">entregado</text:span>.</text:p>
          </text:list-item>
          <text:list-item>
            <text:p text:style-name="P33">También evita crear facturas duplicadas.</text:p>
          </text:list-item>
          <text:list-item>
            <text:p text:style-name="P33">La factura se genera con el total ya calculado por el trigger anterior.</text:p>
          </text:list-item>
          <text:list-item>
            <text:p text:style-name="P33">Es un flujo profesional típico de un ERP o e‑commerce.</text:p>
          </text:list-item>
        </text:list>
        <text:h text:style-name="Heading_20_1" text:outline-level="1">🔜 Siguiente módulo</text:h>
        <text:p text:style-name="Text_20_body">Ya tienes:</text:p>
        <text:list xml:id="list3005502850" text:style-name="L33">
          <text:list-item>
            <text:p text:style-name="P34">Stock automático</text:p>
          </text:list-item>
          <text:list-item>
            <text:p text:style-name="P34">Totales automáticos</text:p>
          </text:list-item>
          <text:list-item>
            <text:p text:style-name="P34">Facturación automática</text:p>
          </text:list-item>
          <text:list-item>
            <text:p text:style-name="P34">Índices básicos</text:p>
          </text:list-item>
          <text:list-item>
            <text:p text:style-name="P34">Esquemas bien organizados</text:p>
          </text:list-item>
        </text:list>
        <text:p text:style-name="Text_20_body">Ahora podemos avanzar a:</text:p>
        <text:list xml:id="list2527239600" text:style-name="L34">
          <text:list-item>
            <text:p text:style-name="P35"><text:span text:style-name="Strong_20_Emphasis">Consultas SQL avanzadas</text:span></text:p>
          </text:list-item>
          <text:list-item>
            <text:p text:style-name="P35"><text:span text:style-name="Strong_20_Emphasis">Roles y permisos</text:span></text:p>
          </text:list-item>
          <text:list-item>
            <text:p text:style-name="P35"><text:span text:style-name="Strong_20_Emphasis">Vistas y materialized views</text:span></text:p>
          </text:list-item>
          <text:list-item>
            <text:p text:style-name="P35"><text:span text:style-name="Strong_20_Emphasis">Stored procedures</text:span></text:p>
          </text:list-item>
          <text:list-item>
            <text:p text:style-name="P35"><text:span text:style-name="Strong_20_Emphasis">Funciones avanzadas</text:span></text:p>
          </text:list-item>
          <text:list-item>
            <text:p text:style-name="P35"><text:soft-page-break/><text:span text:style-name="Strong_20_Emphasis">Transacciones y bloqueos</text:span></text:p>
          </text:list-item>
        </text:list>
        <text:p text:style-name="Text_20_body">Para seguir el ritmo del curso, dime qué módulo quieres ahora:</text:p>
        <text:list xml:id="list2797909233" text:style-name="L35">
          <text:list-item>
            <text:p text:style-name="P36"><text:span text:style-name="Strong_20_Emphasis">Consultas avanzadas (JOIN, CTE, ventanas, agregaciones)</text:span></text:p>
          </text:list-item>
          <text:list-item>
            <text:p text:style-name="P36"><text:span text:style-name="Strong_20_Emphasis">Roles y permisos (seguridad profesional)</text:span></text:p>
          </text:list-item>
          <text:list-item>
            <text:p text:style-name="P36"><text:span text:style-name="Strong_20_Emphasis">Vistas y materialized views</text:span></text:p>
          </text:list-item>
          <text:list-item>
            <text:p text:style-name="P36"><text:span text:style-name="Strong_20_Emphasis">Procedimientos almacenados</text:span></text:p>
          </text:list-item>
          <text:list-item>
            <text:p text:style-name="P36"><text:span text:style-name="Strong_20_Emphasis">Transacciones, bloqueos y concurrencia</text:span></text:p>
          </text:list-item>
        </text:list>
        <text:p text:style-name="Text_20_body">Dime solo el número y seguimos.</text:p>
      </text:section>
      <text:section text:style-name="Sect1" text:name="SfvkyPQ2DhesfAzvG3AYd-user-message">
        <text:p text:style-name="Standard">explicame esto: IF NEW.estado = 'entregado' THEN -- Evitar duplicados si ya existe factura IF NOT EXISTS ( SELECT 1 FROM facturacion.facturas WHERE pedido_id = NEW.id ) THEN INSERT INTO facturacion.facturas (pedido_id, total) VALUES (NEW.id, NEW.total); END IF; END IF;</text:p>
      </text:section>
      <text:section text:style-name="Sect1" text:name="eazwZTEiFyEjyGXR69MMr-content-0">
        <text:p text:style-name="Text_20_body">Perfecto, Jose. Vamos a desmenuzar ese bloque de código <text:span text:style-name="Strong_20_Emphasis">línea por línea</text:span>, con la claridad de un ingeniero de bases de datos y el ritmo suave del modo estudio. Una sola idea por turno, explicación clara, y paro.</text:p>
        <text:h text:style-name="Heading_20_1" text:outline-level="1">🎯 Idea clave</text:h>
        <text:p text:style-name="Text_20_body">Ese bloque de código hace <text:span text:style-name="Strong_20_Emphasis">dos comprobaciones</text:span>:</text:p>
        <text:list xml:id="list257104748" text:style-name="L36">
          <text:list-item>
            <text:p text:style-name="P37">¿El pedido ha cambiado a estado <text:span text:style-name="Strong_20_Emphasis">entregado</text:span>?</text:p>
          </text:list-item>
          <text:list-item>
            <text:p text:style-name="P37">¿Ya existe una factura para ese pedido?</text:p>
          </text:list-item>
        </text:list>
        <text:p text:style-name="Text_20_body">Si ambas respuestas son <text:span text:style-name="Strong_20_Emphasis">sí</text:span> y <text:span text:style-name="Strong_20_Emphasis">no</text:span> respectivamente → se crea la factura.</text:p>
        <text:h text:style-name="Heading_20_1" text:outline-level="1">🧠 Explicación paso a paso</text:h>
        <text:h text:style-name="Heading_20_2" text:outline-level="2">1️⃣ <text:span text:style-name="Source_20_Text">IF NEW.estado = 'entregado' THEN</text:span></text:h>
        <text:p text:style-name="Text_20_body">Esto significa:</text:p>
        <text:p text:style-name="Text_20_body">👉 <text:span text:style-name="Emphasis">“Solo ejecuto lo que viene después si el pedido ahora está en estado entregado.”</text:span></text:p>
        <text:p text:style-name="Text_20_body"><text:span text:style-name="Source_20_Text">NEW.estado</text:span> es el estado <text:span text:style-name="Strong_20_Emphasis">nuevo</text:span> después del UPDATE.</text:p>
        <text:p text:style-name="Text_20_body">Si el pedido pasa de:</text:p>
        <text:list xml:id="list2710192794" text:style-name="L37">
          <text:list-item>
            <text:p text:style-name="P38"><text:span text:style-name="Source_20_Text">pendiente</text:span> → <text:span text:style-name="Source_20_Text">procesando</text:span> → nada</text:p>
          </text:list-item>
          <text:list-item>
            <text:p text:style-name="P38"><text:span text:style-name="Source_20_Text">procesando</text:span> → <text:span text:style-name="Source_20_Text">enviado</text:span> → nada</text:p>
          </text:list-item>
          <text:list-item>
            <text:p text:style-name="P38"><text:span text:style-name="Source_20_Text">enviado</text:span> → <text:span text:style-name="Source_20_Text">entregado</text:span> → <text:span text:style-name="Strong_20_Emphasis">aquí sí se ejecuta</text:span></text:p>
          </text:list-item>
        </text:list>
        <text:h text:style-name="Heading_20_2" text:outline-level="2">2️⃣ Evitar duplicados</text:h>
        <text:p text:style-name="Text_20_body">sql</text:p>
        <text:p text:style-name="Preformatted_20_Text"><text:soft-page-break/><text:span text:style-name="Source_20_Text">IF NOT EXISTS (</text:span></text:p>
        <text:p text:style-name="Preformatted_20_Text"><text:span text:style-name="Source_20_Text"><text:s text:c="4"/>SELECT 1 FROM facturacion.facturas</text:span></text:p>
        <text:p text:style-name="Preformatted_20_Text"><text:span text:style-name="Source_20_Text"><text:s text:c="4"/>WHERE pedido_id = NEW.id</text:span></text:p>
        <text:p text:style-name="P1"><text:span text:style-name="Source_20_Text">) THEN</text:span></text:p>
        <text:p text:style-name="Text_20_body">Esto significa:</text:p>
        <text:p text:style-name="Text_20_body">👉 <text:span text:style-name="Emphasis">“Antes de crear una factura, comprueba que no exista ya una para este pedido.”</text:span></text:p>
        <text:p text:style-name="Text_20_body">¿Por qué?</text:p>
        <text:p text:style-name="Text_20_body">Porque si alguien actualiza el pedido dos veces a <text:span text:style-name="Source_20_Text">entregado</text:span>, o lo vuelve a guardar sin querer, podrías generar <text:span text:style-name="Strong_20_Emphasis">dos facturas para el mismo pedido</text:span>, lo cual sería un desastre contable.</text:p>
        <text:h text:style-name="Heading_20_2" text:outline-level="2">3️⃣ Crear la factura</text:h>
        <text:p text:style-name="Text_20_body">sql</text:p>
        <text:p text:style-name="Preformatted_20_Text"><text:span text:style-name="Source_20_Text">INSERT INTO facturacion.facturas (pedido_id, total)</text:span></text:p>
        <text:p text:style-name="P1"><text:span text:style-name="Source_20_Text">VALUES (NEW.id, NEW.total);</text:span></text:p>
        <text:p text:style-name="Text_20_body">Aquí se crea la factura usando:</text:p>
        <text:list xml:id="list2670802810" text:style-name="L38">
          <text:list-item>
            <text:p text:style-name="P39"><text:span text:style-name="Source_20_Text">NEW.id</text:span> → el ID del pedido</text:p>
          </text:list-item>
          <text:list-item>
            <text:p text:style-name="P39"><text:span text:style-name="Source_20_Text">NEW.total</text:span> → el total calculado automáticamente por el trigger anterior</text:p>
          </text:list-item>
        </text:list>
        <text:h text:style-name="Heading_20_2" text:outline-level="2">4️⃣ Cierre de los IF</text:h>
        <text:p text:style-name="Text_20_body">sql</text:p>
        <text:p text:style-name="Preformatted_20_Text"><text:span text:style-name="Source_20_Text">END IF;</text:span></text:p>
        <text:p text:style-name="P1"><text:span text:style-name="Source_20_Text">END IF;</text:span></text:p>
        <text:p text:style-name="Text_20_body">El primero cierra el <text:span text:style-name="Source_20_Text">NOT EXISTS</text:span>. El segundo cierra el <text:span text:style-name="Source_20_Text">IF NEW.estado = 'entregado'</text:span>.</text:p>
        <text:h text:style-name="Heading_20_1" text:outline-level="1">🧩 ¿Qué has aprendido aquí?</text:h>
        <text:list xml:id="list2643803129" text:style-name="L39">
          <text:list-item>
            <text:p text:style-name="P40">El trigger solo actúa cuando el pedido pasa a <text:span text:style-name="Strong_20_Emphasis">entregado</text:span>.</text:p>
          </text:list-item>
          <text:list-item>
            <text:p text:style-name="P40">Se evita crear facturas duplicadas.</text:p>
          </text:list-item>
          <text:list-item>
            <text:p text:style-name="P40">Se usa el total ya calculado por el sistema.</text:p>
          </text:list-item>
          <text:list-item>
            <text:p text:style-name="P40">Es un flujo típico de un ERP profesional.</text:p>
          </text:list-item>
        </text:list>
        <text:h text:style-name="Heading_20_1" text:outline-level="1">🔍 Mini‑paso para seguir</text:h>
        <text:p text:style-name="Text_20_body">¿Quieres que te explique <text:span text:style-name="Strong_20_Emphasis">cómo detectar exactamente el cambio de estado</text:span> usando:</text:p>
        <text:p text:style-name="Text_20_body">sql</text:p>
        <text:p text:style-name="P1"><text:span text:style-name="Source_20_Text">WHEN (OLD.estado IS DISTINCT FROM NEW.estado)</text:span></text:p>
        <text:p text:style-name="Text_20_body">…o prefieres que pasemos ya al siguiente módulo (consultas avanzadas, roles, vistas, etc.)?</text:p>
      </text:section>
      <text:section text:style-name="Sect1" text:name="6ukwPxYVFzTqsGPRMX9zR-user-message">
        <text:p text:style-name="Standard"><text:soft-page-break/>explicame esto: SELECT 1 FROM facturacion.facturas WHERE pedido_id = NEW.id</text:p>
      </text:section>
      <text:section text:style-name="Sect1" text:name="MwiZLUawGdURFxZXuUJx9-content-0">
        <text:p text:style-name="Text_20_body">Perfecto, Jose. Vamos a explicar <text:span text:style-name="Strong_20_Emphasis">exactamente</text:span> qué hace esta consulta dentro del trigger, con la claridad del modo estudio: <text:span text:style-name="Strong_20_Emphasis">una idea clave</text:span>, <text:span text:style-name="Strong_20_Emphasis">explicación corta</text:span>, <text:span text:style-name="Strong_20_Emphasis">paso pequeño</text:span>, y paro para que sigas conmigo.</text:p>
        <text:h text:style-name="Heading_20_1" text:outline-level="1">🎯 Idea clave</text:h>
        <text:p text:style-name="Text_20_body">La consulta:</text:p>
        <text:p text:style-name="Text_20_body">sql</text:p>
        <text:p text:style-name="Preformatted_20_Text"><text:span text:style-name="Source_20_Text">SELECT 1 FROM facturacion.facturas</text:span></text:p>
        <text:p text:style-name="P1"><text:span text:style-name="Source_20_Text">WHERE pedido_id = NEW.id</text:span></text:p>
        <text:p text:style-name="Text_20_body">sirve <text:span text:style-name="Strong_20_Emphasis">solo para comprobar si ya existe una factura</text:span> para ese pedido.</text:p>
        <text:p text:style-name="Text_20_body">No queremos los datos de la factura, solo saber <text:span text:style-name="Strong_20_Emphasis">si existe o no</text:span>.</text:p>
        <text:h text:style-name="Heading_20_1" text:outline-level="1">🧠 ¿Qué significa exactamente?</text:h>
        <text:h text:style-name="Heading_20_3" text:outline-level="3">1️⃣ <text:span text:style-name="Source_20_Text">SELECT 1</text:span></text:h>
        <text:p text:style-name="Text_20_body">Esto no devuelve datos reales. Devuelve simplemente un <text:span text:style-name="Strong_20_Emphasis">1</text:span>, un valor simbólico.</text:p>
        <text:p text:style-name="Text_20_body">¿Por qué?</text:p>
        <text:p text:style-name="Text_20_body">Porque <text:span text:style-name="Strong_20_Emphasis">no nos interesa el contenido de la factura</text:span>, solo saber si hay alguna fila que cumpla la condición.</text:p>
        <text:p text:style-name="Text_20_body">Es más eficiente que hacer <text:span text:style-name="Source_20_Text">SELECT *</text:span>.</text:p>
        <text:h text:style-name="Heading_20_3" text:outline-level="3">2️⃣ <text:span text:style-name="Source_20_Text">FROM facturacion.facturas</text:span></text:h>
        <text:p text:style-name="Text_20_body">Estamos consultando la tabla donde se guardan las facturas.</text:p>
        <text:h text:style-name="Heading_20_3" text:outline-level="3">3️⃣ <text:span text:style-name="Source_20_Text">WHERE pedido_id = NEW.id</text:span></text:h>
        <text:p text:style-name="Text_20_body">Esto filtra las facturas del pedido que se acaba de actualizar.</text:p>
        <text:list xml:id="list3902253931" text:style-name="L40">
          <text:list-item>
            <text:p text:style-name="P41"><text:span text:style-name="Source_20_Text">NEW.id</text:span> = el ID del pedido que está cambiando de estado</text:p>
          </text:list-item>
          <text:list-item>
            <text:p text:style-name="P41"><text:span text:style-name="Source_20_Text">pedido_id</text:span> = la columna de la factura que indica a qué pedido pertenece</text:p>
          </text:list-item>
        </text:list>
        <text:p text:style-name="Text_20_body">Si existe una factura con ese <text:span text:style-name="Source_20_Text">pedido_id</text:span>, la consulta devuelve <text:span text:style-name="Strong_20_Emphasis">una fila</text:span>.</text:p>
        <text:p text:style-name="Text_20_body">Si no existe, <text:span text:style-name="Strong_20_Emphasis">no devuelve nada</text:span>.</text:p>
        <text:h text:style-name="Heading_20_1" text:outline-level="1">🧩 ¿Cómo se usa esto dentro del trigger?</text:h>
        <text:p text:style-name="Text_20_body">Se mete dentro de:</text:p>
        <text:p text:style-name="Text_20_body">sql</text:p>
        <text:p text:style-name="P1"><text:soft-page-break/><text:span text:style-name="Source_20_Text">IF NOT EXISTS ( ... ) THEN</text:span></text:p>
        <text:p text:style-name="Text_20_body">Entonces:</text:p>
        <text:list xml:id="list3544667891" text:style-name="L41">
          <text:list-item>
            <text:p text:style-name="P42">Si <text:span text:style-name="Strong_20_Emphasis">NO existe</text:span> factura → se crea una nueva</text:p>
          </text:list-item>
          <text:list-item>
            <text:p text:style-name="P42">Si <text:span text:style-name="Strong_20_Emphasis">ya existe</text:span> → no se crea nada (evita duplicados)</text:p>
          </text:list-item>
        </text:list>
        <text:h text:style-name="Heading_20_1" text:outline-level="1">🧩 ¿Qué has aprendido aquí?</text:h>
        <text:list xml:id="list196482812" text:style-name="L42">
          <text:list-item>
            <text:p text:style-name="P43"><text:span text:style-name="Source_20_Text">SELECT 1</text:span> es una forma rápida de comprobar existencia.</text:p>
          </text:list-item>
          <text:list-item>
            <text:p text:style-name="P43">No devuelve datos, solo indica “sí hay fila” o “no hay fila”.</text:p>
          </text:list-item>
          <text:list-item>
            <text:p text:style-name="P43">Se usa junto con <text:span text:style-name="Source_20_Text">NOT EXISTS</text:span> para evitar duplicar facturas.</text:p>
          </text:list-item>
          <text:list-item>
            <text:p text:style-name="P43">Es una técnica profesional muy común en triggers y validaciones.</text:p>
          </text:list-item>
        </text:list>
        <text:p text:style-name="Text_20_body">Si quieres, en el siguiente paso puedo explicarte <text:span text:style-name="Strong_20_Emphasis">cómo funciona exactamente </text:span><text:span text:style-name="Source_20_Text">NOT EXISTS</text:span> o seguimos con el siguiente módulo del curso. ¿Qué prefieres?</text:p>
      </text:section>
      <text:p text:style-name="Standard">Lunes, Jun 8</text:p>
      <text:section text:style-name="Sect1" text:name="dJRK83QoMfznXMewzekc6-user-message">
        <text:p text:style-name="Standard">siguiente modulo</text:p>
      </text:section>
      <text:section text:style-name="Sect1" text:name="L8NvHhVCqoGJhtD91uzDo-content-0">
        <text:p text:style-name="Text_20_body">Perfecto, Jose. Pasamos al <text:span text:style-name="Strong_20_Emphasis">siguiente módulo</text:span> del curso. Como no especificaste cuál, voy a elegir el que sigue de forma natural después de triggers, funciones y lógica de negocio:</text:p>
      </text:section>
      <text:p text:style-name="Standard"/>
      <text:h text:style-name="Heading_20_1" text:outline-level="1"><text:bookmark text:name="L8NvHhVCqoGJhtD91uzDo-content-0"/>⭐ MÓDULO 9 — Consultas SQL avanzadas (JOIN, CTE, ventanas, agregaciones)</text:h>
      <text:section text:style-name="Sect1" text:name="Sección8">
        <text:p text:style-name="Text_20_body">Este módulo te da <text:span text:style-name="Strong_20_Emphasis">superpoderes</text:span> para explotar tu base de datos: informes, estadísticas, análisis, listados complejos, etc.</text:p>
        <text:p text:style-name="Text_20_body">Voy directo al grano, con razonamientos claros y ejemplos sobre <text:span text:style-name="Strong_20_Emphasis">tu propia base de datos</text:span> (pedidos, clientes, artículos, facturas).</text:p>
        <text:h text:style-name="Heading_20_1" text:outline-level="1">🧱 1. JOINs profesionales</text:h>
        <text:p text:style-name="Text_20_body">Los JOINs son la base de cualquier consulta avanzada.</text:p>
        <text:h text:style-name="Heading_20_2" text:outline-level="2">🔗 Obtener pedidos con datos del cliente</text:h>
        <text:p text:style-name="Text_20_body">sql</text:p>
        <text:p text:style-name="Preformatted_20_Text"><text:span text:style-name="Source_20_Text">SELECT p.id, p.fecha, p.total,</text:span></text:p>
        <text:p text:style-name="Preformatted_20_Text"><text:span text:style-name="Source_20_Text"><text:s text:c="7"/>c.nombre AS cliente, c.email</text:span></text:p>
        <text:p text:style-name="Preformatted_20_Text"><text:span text:style-name="Source_20_Text">FROM ventas.pedidos p</text:span></text:p>
        <text:p text:style-name="P1"><text:span text:style-name="Source_20_Text">JOIN ventas.clientes c ON p.cliente_id = c.id;</text:span></text:p>
        <text:p text:style-name="Text_20_body"><text:span text:style-name="Strong_20_Emphasis">Idea clave:</text:span> El JOIN une tablas relacionadas por claves foráneas.</text:p>
        <text:h text:style-name="Heading_20_2" text:outline-level="2"><text:soft-page-break/>🔗 Obtener líneas de pedido con nombre del artículo</text:h>
        <text:p text:style-name="Text_20_body">sql</text:p>
        <text:p text:style-name="Preformatted_20_Text"><text:span text:style-name="Source_20_Text">SELECT lp.id, lp.cantidad, lp.precio_unitario,</text:span></text:p>
        <text:p text:style-name="Preformatted_20_Text"><text:span text:style-name="Source_20_Text"><text:s text:c="7"/>a.nombre AS articulo</text:span></text:p>
        <text:p text:style-name="Preformatted_20_Text"><text:span text:style-name="Source_20_Text">FROM ventas.lineas_pedido lp</text:span></text:p>
        <text:p text:style-name="P1"><text:span text:style-name="Source_20_Text">JOIN stock.articulos a ON lp.articulo_id = a.id;</text:span></text:p>
        <text:h text:style-name="Heading_20_1" text:outline-level="1">🧱 2. JOINs múltiples (3 tablas o más)</text:h>
        <text:h text:style-name="Heading_20_2" text:outline-level="2">🔗 Pedidos → líneas → artículos → clientes</text:h>
        <text:p text:style-name="Text_20_body">sql</text:p>
        <text:p text:style-name="Preformatted_20_Text"><text:span text:style-name="Source_20_Text">SELECT p.id AS pedido,</text:span></text:p>
        <text:p text:style-name="Preformatted_20_Text"><text:span text:style-name="Source_20_Text"><text:s text:c="7"/>c.nombre AS cliente,</text:span></text:p>
        <text:p text:style-name="Preformatted_20_Text"><text:span text:style-name="Source_20_Text"><text:s text:c="7"/>a.nombre AS articulo,</text:span></text:p>
        <text:p text:style-name="Preformatted_20_Text"><text:span text:style-name="Source_20_Text"><text:s text:c="7"/>lp.cantidad,</text:span></text:p>
        <text:p text:style-name="Preformatted_20_Text"><text:span text:style-name="Source_20_Text"><text:s text:c="7"/>lp.precio_unitario</text:span></text:p>
        <text:p text:style-name="Preformatted_20_Text"><text:span text:style-name="Source_20_Text">FROM ventas.pedidos p</text:span></text:p>
        <text:p text:style-name="Preformatted_20_Text"><text:span text:style-name="Source_20_Text">JOIN ventas.clientes c ON p.cliente_id = c.id</text:span></text:p>
        <text:p text:style-name="Preformatted_20_Text"><text:span text:style-name="Source_20_Text">JOIN ventas.lineas_pedido lp ON lp.pedido_id = p.id</text:span></text:p>
        <text:p text:style-name="P1"><text:span text:style-name="Source_20_Text">JOIN stock.articulos a ON a.id = lp.articulo_id;</text:span></text:p>
        <text:p text:style-name="Text_20_body"><text:span text:style-name="Strong_20_Emphasis">Idea clave:</text:span> Puedes encadenar JOINs sin límite.</text:p>
        <text:h text:style-name="Heading_20_1" text:outline-level="1">🧱 3. CTE (Common Table Expressions)</text:h>
        <text:p text:style-name="Text_20_body">Son consultas temporales que te permiten escribir SQL más limpio.</text:p>
        <text:h text:style-name="Heading_20_2" text:outline-level="2">🔍 Total vendido por artículo</text:h>
        <text:p text:style-name="Text_20_body">sql</text:p>
        <text:p text:style-name="Preformatted_20_Text"><text:span text:style-name="Source_20_Text">WITH ventas_articulo AS (</text:span></text:p>
        <text:p text:style-name="Preformatted_20_Text"><text:span text:style-name="Source_20_Text"><text:s text:c="4"/>SELECT articulo_id,</text:span></text:p>
        <text:p text:style-name="Preformatted_20_Text"><text:span text:style-name="Source_20_Text"><text:s text:c="11"/>SUM(cantidad) AS total_unidades,</text:span></text:p>
        <text:p text:style-name="Preformatted_20_Text"><text:span text:style-name="Source_20_Text"><text:s text:c="11"/>SUM(cantidad * precio_unitario) AS total_ingresos</text:span></text:p>
        <text:p text:style-name="Preformatted_20_Text"><text:span text:style-name="Source_20_Text"><text:s text:c="4"/>FROM ventas.lineas_pedido</text:span></text:p>
        <text:p text:style-name="Preformatted_20_Text"><text:span text:style-name="Source_20_Text"><text:s text:c="4"/>GROUP BY articulo_id</text:span></text:p>
        <text:p text:style-name="Preformatted_20_Text"><text:span text:style-name="Source_20_Text">)</text:span></text:p>
        <text:p text:style-name="Preformatted_20_Text"><text:span text:style-name="Source_20_Text">SELECT a.nombre, v.total_unidades, v.total_ingresos</text:span></text:p>
        <text:p text:style-name="Preformatted_20_Text"><text:span text:style-name="Source_20_Text">FROM ventas_articulo v</text:span></text:p>
        <text:p text:style-name="P1"><text:span text:style-name="Source_20_Text">JOIN stock.articulos a ON a.id = v.articulo_id;</text:span></text:p>
        <text:p text:style-name="Text_20_body"><text:span text:style-name="Strong_20_Emphasis">Idea clave:</text:span> Un CTE es como una tabla temporal solo para esa consulta.</text:p>
        <text:h text:style-name="Heading_20_1" text:outline-level="1">🧱 4. Funciones de ventana (window functions)</text:h>
        <text:p text:style-name="Text_20_body">Sirven para cálculos avanzados sin agrupar filas.</text:p>
        <text:h text:style-name="Heading_20_2" text:outline-level="2"><text:soft-page-break/>🔍 Ranking de artículos más vendidos</text:h>
        <text:p text:style-name="Text_20_body">sql</text:p>
        <text:p text:style-name="Preformatted_20_Text"><text:span text:style-name="Source_20_Text">SELECT a.nombre,</text:span></text:p>
        <text:p text:style-name="Preformatted_20_Text"><text:span text:style-name="Source_20_Text"><text:s text:c="7"/>SUM(lp.cantidad) AS unidades,</text:span></text:p>
        <text:p text:style-name="Preformatted_20_Text"><text:span text:style-name="Source_20_Text"><text:s text:c="7"/>RANK() OVER (ORDER BY SUM(lp.cantidad) DESC) AS ranking</text:span></text:p>
        <text:p text:style-name="Preformatted_20_Text"><text:span text:style-name="Source_20_Text">FROM ventas.lineas_pedido lp</text:span></text:p>
        <text:p text:style-name="Preformatted_20_Text"><text:span text:style-name="Source_20_Text">JOIN stock.articulos a ON a.id = lp.articulo_id</text:span></text:p>
        <text:p text:style-name="P1"><text:span text:style-name="Source_20_Text">GROUP BY a.nombre;</text:span></text:p>
        <text:h text:style-name="Heading_20_2" text:outline-level="2">🔍 Total acumulado de ventas por fecha</text:h>
        <text:p text:style-name="Text_20_body">sql</text:p>
        <text:p text:style-name="Preformatted_20_Text"><text:span text:style-name="Source_20_Text">SELECT fecha,</text:span></text:p>
        <text:p text:style-name="Preformatted_20_Text"><text:span text:style-name="Source_20_Text"><text:s text:c="7"/>total,</text:span></text:p>
        <text:p text:style-name="Preformatted_20_Text"><text:span text:style-name="Source_20_Text"><text:s text:c="7"/>SUM(total) OVER (ORDER BY fecha) AS acumulado</text:span></text:p>
        <text:p text:style-name="P1"><text:span text:style-name="Source_20_Text">FROM ventas.pedidos;</text:span></text:p>
        <text:p text:style-name="Text_20_body"><text:span text:style-name="Strong_20_Emphasis">Idea clave:</text:span> Las funciones de ventana permiten cálculos sin perder el detalle fila a fila.</text:p>
        <text:h text:style-name="Heading_20_1" text:outline-level="1">🧱 5. Subconsultas útiles</text:h>
        <text:h text:style-name="Heading_20_2" text:outline-level="2">🔍 Pedidos cuyo total es mayor que la media</text:h>
        <text:p text:style-name="Text_20_body">sql</text:p>
        <text:p text:style-name="Preformatted_20_Text"><text:span text:style-name="Source_20_Text">SELECT *</text:span></text:p>
        <text:p text:style-name="Preformatted_20_Text"><text:span text:style-name="Source_20_Text">FROM ventas.pedidos</text:span></text:p>
        <text:p text:style-name="P1"><text:span text:style-name="Source_20_Text">WHERE total &gt; (SELECT AVG(total) FROM ventas.pedidos);</text:span></text:p>
        <text:h text:style-name="Heading_20_1" text:outline-level="1">🧱 6. Consultas de facturación</text:h>
        <text:h text:style-name="Heading_20_2" text:outline-level="2">🔍 Facturas con datos del cliente</text:h>
        <text:p text:style-name="Text_20_body">sql</text:p>
        <text:p text:style-name="Preformatted_20_Text"><text:span text:style-name="Source_20_Text">SELECT f.id AS factura,</text:span></text:p>
        <text:p text:style-name="Preformatted_20_Text"><text:span text:style-name="Source_20_Text"><text:s text:c="7"/>f.fecha,</text:span></text:p>
        <text:p text:style-name="Preformatted_20_Text"><text:span text:style-name="Source_20_Text"><text:s text:c="7"/>f.total,</text:span></text:p>
        <text:p text:style-name="Preformatted_20_Text"><text:span text:style-name="Source_20_Text"><text:s text:c="7"/>c.nombre AS cliente</text:span></text:p>
        <text:p text:style-name="Preformatted_20_Text"><text:span text:style-name="Source_20_Text">FROM facturacion.facturas f</text:span></text:p>
        <text:p text:style-name="Preformatted_20_Text"><text:span text:style-name="Source_20_Text">JOIN ventas.pedidos p ON p.id = f.pedido_id</text:span></text:p>
        <text:p text:style-name="P1"><text:span text:style-name="Source_20_Text">JOIN ventas.clientes c ON c.id = p.cliente_id;</text:span></text:p>
        <text:h text:style-name="Heading_20_1" text:outline-level="1">🧩 ¿Qué has aprendido aquí?</text:h>
        <text:list xml:id="list3267879903" text:style-name="L43">
          <text:list-item>
            <text:p text:style-name="P44">JOINs simples y múltiples</text:p>
          </text:list-item>
          <text:list-item>
            <text:p text:style-name="P44">CTEs para estructurar consultas complejas</text:p>
          </text:list-item>
          <text:list-item>
            <text:p text:style-name="P44"><text:soft-page-break/>Funciones de ventana para análisis avanzados</text:p>
          </text:list-item>
          <text:list-item>
            <text:p text:style-name="P44">Subconsultas para filtros inteligentes</text:p>
          </text:list-item>
          <text:list-item>
            <text:p text:style-name="P44">Informes reales de ventas y facturación</text:p>
          </text:list-item>
        </text:list>
        <text:p text:style-name="Text_20_body">Este módulo te da el <text:span text:style-name="Strong_20_Emphasis">80% del poder real</text:span> de SQL en sistemas profesionales.</text:p>
        <text:h text:style-name="Heading_20_1" text:outline-level="1">🔜 Siguiente módulo</text:h>
        <text:p text:style-name="Text_20_body">Dime qué quieres ahora:</text:p>
        <text:list xml:id="list3100960073" text:style-name="L44">
          <text:list-item>
            <text:p text:style-name="P45"><text:span text:style-name="Strong_20_Emphasis">Roles y permisos (seguridad profesional)</text:span></text:p>
          </text:list-item>
          <text:list-item>
            <text:p text:style-name="P45"><text:span text:style-name="Strong_20_Emphasis">Vistas y materialized views</text:span></text:p>
          </text:list-item>
          <text:list-item>
            <text:p text:style-name="P45"><text:span text:style-name="Strong_20_Emphasis">Procedimientos almacenados</text:span></text:p>
          </text:list-item>
          <text:list-item>
            <text:p text:style-name="P45"><text:span text:style-name="Strong_20_Emphasis">Transacciones, bloqueos y concurrencia</text:span></text:p>
          </text:list-item>
          <text:list-item>
            <text:p text:style-name="P45"><text:span text:style-name="Strong_20_Emphasis">Optimización y EXPLAIN ANALYZE</text:span></text:p>
          </text:list-item>
        </text:list>
        <text:p text:style-name="Text_20_body">Responde con el número y seguimos.</text:p>
      </text:section>
      <text:section text:style-name="Sect1" text:name="XmVZJyvNYrUBCebbADEew-user-message">
        <text:p text:style-name="Standard">creame un script para meter registros en la base de datos. porque esta vacia.</text:p>
      </text:section>
      <text:section text:style-name="Sect1" text:name="eh9q3YvQw2Mpre3NmbAL7-content-0">
        <text:p text:style-name="Text_20_body">Perfecto, Jose. Te preparo un <text:span text:style-name="Strong_20_Emphasis">script completo</text:span>, profesional y listo para ejecutar, que <text:span text:style-name="Strong_20_Emphasis">rellena toda tu base de datos</text:span> con datos realistas:</text:p>
        <text:list xml:id="list4105176202" text:style-name="L45">
          <text:list-item>
            <text:p text:style-name="P46">Categorías</text:p>
          </text:list-item>
          <text:list-item>
            <text:p text:style-name="P46">Artículos</text:p>
          </text:list-item>
          <text:list-item>
            <text:p text:style-name="P46">Clientes</text:p>
          </text:list-item>
          <text:list-item>
            <text:p text:style-name="P46">Pedidos</text:p>
          </text:list-item>
          <text:list-item>
            <text:p text:style-name="P46">Líneas de pedido</text:p>
          </text:list-item>
          <text:list-item>
            <text:p text:style-name="P46">Facturas (las generará el trigger si quieres)</text:p>
          </text:list-item>
        </text:list>
        <text:p text:style-name="Text_20_body">Todo en el orden correcto para evitar errores de claves foráneas.</text:p>
        <text:p text:style-name="Text_20_body">Sigo en modo estudio: claro, directo, sin rodeos.</text:p>
        <text:h text:style-name="Heading_20_1" text:outline-level="1">🧱 <text:span text:style-name="Strong_20_Emphasis">SCRIPT COMPLETO DE INSERCIÓN DE DATOS</text:span></text:h>
        <text:p text:style-name="Text_20_body">sql</text:p>
        <text:p text:style-name="Preformatted_20_Text"><text:span text:style-name="Source_20_Text">-- ============================================</text:span></text:p>
        <text:p text:style-name="Preformatted_20_Text"><text:span text:style-name="Source_20_Text">-- 1. CATEGORÍA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INSERT INTO stock.categorias (nombre) VALUES</text:span></text:p>
        <text:p text:style-name="Preformatted_20_Text"><text:span text:style-name="Source_20_Text">('Smartphones'),</text:span></text:p>
        <text:p text:style-name="Preformatted_20_Text"><text:span text:style-name="Source_20_Text">('Portátiles'),</text:span></text:p>
        <text:p text:style-name="Preformatted_20_Text"><text:span text:style-name="Source_20_Text">('Tablets'),</text:span></text:p>
        <text:p text:style-name="Preformatted_20_Text"><text:span text:style-name="Source_20_Text">('Accesorios'),</text:span></text:p>
        <text:p text:style-name="Preformatted_20_Text"><text:soft-page-break/><text:span text:style-name="Source_20_Text">('Audio'),</text:span></text:p>
        <text:p text:style-name="Preformatted_20_Text"><text:span text:style-name="Source_20_Text">('Gaming')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2. ARTÍCULO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INSERT INTO stock.articulos (nombre, descripcion, precio, stock_actual, categoria_id) VALUES</text:span></text:p>
        <text:p text:style-name="Preformatted_20_Text"><text:span text:style-name="Source_20_Text">('iPhone 15', 'Smartphone Apple 128GB', 999.00, 50, 1),</text:span></text:p>
        <text:p text:style-name="Preformatted_20_Text"><text:span text:style-name="Source_20_Text">('Samsung Galaxy S24', 'Smartphone Samsung 256GB', 899.00, 40, 1),</text:span></text:p>
        <text:p text:style-name="Preformatted_20_Text"><text:span text:style-name="Source_20_Text">('MacBook Pro 14"', 'Apple M3 Pro 16GB RAM', 2199.00, 20, 2),</text:span></text:p>
        <text:p text:style-name="Preformatted_20_Text"><text:span text:style-name="Source_20_Text">('Dell XPS 13', 'Intel i7 16GB RAM', 1499.00, 25, 2),</text:span></text:p>
        <text:p text:style-name="Preformatted_20_Text"><text:span text:style-name="Source_20_Text">('iPad Air', 'Tablet Apple 10.9"', 699.00, 30, 3),</text:span></text:p>
        <text:p text:style-name="Preformatted_20_Text"><text:span text:style-name="Source_20_Text">('Xiaomi Pad 6', 'Tablet Xiaomi 11"', 399.00, 35, 3),</text:span></text:p>
        <text:p text:style-name="Preformatted_20_Text"><text:span text:style-name="Source_20_Text">('Auriculares Sony WH-1000XM5', 'Cancelación de ruido', 349.00, 60, 5),</text:span></text:p>
        <text:p text:style-name="Preformatted_20_Text"><text:span text:style-name="Source_20_Text">('Teclado Mecánico Logitech G Pro', 'Switches GX Blue', 129.00, 45, 6),</text:span></text:p>
        <text:p text:style-name="Preformatted_20_Text"><text:span text:style-name="Source_20_Text">('Cargador USB-C 30W', 'Compatible con móviles y tablets', 29.00, 100, 4),</text:span></text:p>
        <text:p text:style-name="Preformatted_20_Text"><text:span text:style-name="Source_20_Text">('Cable USB-C 1m', 'Carga rápida', 12.00, 150, 4)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3. CLIENTE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INSERT INTO ventas.clientes (nombre, email, telefono, direccion, ciudad, pais) VALUES</text:span></text:p>
        <text:p text:style-name="Preformatted_20_Text"><text:span text:style-name="Source_20_Text">('Carlos López', 'carlos@example.com', '600123123', 'Calle Mayor 10', 'Murcia', 'España'),</text:span></text:p>
        <text:p text:style-name="Preformatted_20_Text"><text:span text:style-name="Source_20_Text">('Ana Martínez', 'ana@example.com', '611222333', 'Av. Libertad 22', 'Alicante', 'España'),</text:span></text:p>
        <text:p text:style-name="Preformatted_20_Text"><text:span text:style-name="Source_20_Text">('Luis Fernández', 'luis@example.com', '622333444', 'Calle Sol 5', 'Valencia', 'España'),</text:span></text:p>
        <text:p text:style-name="Preformatted_20_Text"><text:span text:style-name="Source_20_Text">('María García', 'maria@example.com', '633444555', 'Calle Luna 8', 'Madrid', 'España')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4. PEDIDO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INSERT INTO ventas.pedidos (cliente_id, estado)</text:span></text:p>
        <text:p text:style-name="Preformatted_20_Text"><text:span text:style-name="Source_20_Text">VALUES</text:span></text:p>
        <text:p text:style-name="Preformatted_20_Text"><text:span text:style-name="Source_20_Text">(1, 'pendiente'),</text:span></text:p>
        <text:p text:style-name="Preformatted_20_Text"><text:span text:style-name="Source_20_Text">(2, 'procesando'),</text:span></text:p>
        <text:p text:style-name="Preformatted_20_Text"><text:span text:style-name="Source_20_Text">(3, 'enviado'),</text:span></text:p>
        <text:p text:style-name="Preformatted_20_Text"><text:span text:style-name="Source_20_Text">(4, 'pendiente'),</text:span></text:p>
        <text:p text:style-name="Preformatted_20_Text"><text:span text:style-name="Source_20_Text">(1, 'pendiente')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5. LÍNEAS DE PEDIDO</text:span></text:p>
        <text:p text:style-name="Preformatted_20_Text"><text:span text:style-name="Source_20_Text">-- (El trigger reducirá stock automáticamente)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INSERT INTO ventas.lineas_pedido (pedido_id, articulo_id, cantidad, precio_unitario) VALUES</text:span></text:p>
        <text:p text:style-name="Preformatted_20_Text"><text:span text:style-name="Source_20_Text">(1, 1, 1, 999.00), <text:s text:c="2"/>-- iPhone 15</text:span></text:p>
        <text:p text:style-name="Preformatted_20_Text"><text:span text:style-name="Source_20_Text">(1, 9, 2, 29.00), <text:s text:c="3"/>-- Cargadores</text:span></text:p>
        <text:p text:style-name="Preformatted_20_Text"><text:span text:style-name="Source_20_Text">(2, 3, 1, 2199.00), <text:s/>-- MacBook Pro</text:span></text:p>
        <text:p text:style-name="Preformatted_20_Text"><text:span text:style-name="Source_20_Text">(3, 7, 1, 349.00), <text:s text:c="2"/>-- Auriculares Sony</text:span></text:p>
        <text:p text:style-name="Preformatted_20_Text"><text:span text:style-name="Source_20_Text">(3, 10, 3, 12.00), <text:s text:c="2"/>-- Cables USB-C</text:span></text:p>
        <text:p text:style-name="Preformatted_20_Text"><text:span text:style-name="Source_20_Text">(4, 2, 1, 899.00), <text:s text:c="2"/>-- Samsung S24</text:span></text:p>
        <text:p text:style-name="Preformatted_20_Text"><text:span text:style-name="Source_20_Text">(5, 6, 2, 399.00); <text:s text:c="2"/>-- Xiaomi Pad 6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6. ACTUALIZAR TOTALES (si no tienes trigger)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UPDATE ventas.pedidos p</text:span></text:p>
        <text:p text:style-name="Preformatted_20_Text"><text:span text:style-name="Source_20_Text">SET total = (</text:span></text:p>
        <text:p text:style-name="Preformatted_20_Text"><text:span text:style-name="Source_20_Text"><text:s text:c="4"/>SELECT COALESCE(SUM(cantidad * precio_unitario), 0)</text:span></text:p>
        <text:p text:style-name="Preformatted_20_Text"><text:soft-page-break/><text:span text:style-name="Source_20_Text"><text:s text:c="4"/>FROM ventas.lineas_pedido lp</text:span></text:p>
        <text:p text:style-name="Preformatted_20_Text"><text:span text:style-name="Source_20_Text"><text:s text:c="4"/>WHERE lp.pedido_id = p.id</text:span></text:p>
        <text:p text:style-name="Preformatted_20_Text"><text:span text:style-name="Source_20_Text">)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7. GENERAR FACTURAS (si quieres hacerlo manual)</text:span></text:p>
        <text:p text:style-name="Preformatted_20_Text"><text:span text:style-name="Source_20_Text">-- (Si tienes el trigger, basta con poner estado = 'entregado')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INSERT INTO facturacion.facturas (pedido_id, total)</text:span></text:p>
        <text:p text:style-name="Preformatted_20_Text"><text:span text:style-name="Source_20_Text">SELECT id, total</text:span></text:p>
        <text:p text:style-name="Preformatted_20_Text"><text:span text:style-name="Source_20_Text">FROM ventas.pedidos</text:span></text:p>
        <text:p text:style-name="P1"><text:span text:style-name="Source_20_Text">WHERE estado = 'enviado';</text:span></text:p>
        <text:h text:style-name="Heading_20_1" text:outline-level="1">🧩 ¿Qué has aprendido aquí?</text:h>
        <text:list xml:id="list3924149590" text:style-name="L46">
          <text:list-item>
            <text:p text:style-name="P47">El orden importa: categorías → artículos → clientes → pedidos → líneas.</text:p>
          </text:list-item>
          <text:list-item>
            <text:p text:style-name="P47">Los triggers harán su trabajo (stock y totales).</text:p>
          </text:list-item>
          <text:list-item>
            <text:p text:style-name="P47">Los datos son realistas y variados.</text:p>
          </text:list-item>
          <text:list-item>
            <text:p text:style-name="P47">Puedes ejecutar el script tal cual en tu PostgreSQL 18.</text:p>
          </text:list-item>
        </text:list>
        <text:h text:style-name="Heading_20_1" text:outline-level="1">🔜 Siguiente paso</text:h>
        <text:p text:style-name="Text_20_body">Si quieres, puedo prepararte:</text:p>
        <text:list xml:id="list1240523069" text:style-name="L47">
          <text:list-item>
            <text:p text:style-name="P48"><text:span text:style-name="Strong_20_Emphasis">Un script para generar 100 o 1000 registros aleatorios</text:span></text:p>
          </text:list-item>
          <text:list-item>
            <text:p text:style-name="P48"><text:span text:style-name="Strong_20_Emphasis">Un script para pruebas de carga (benchmark)</text:span></text:p>
          </text:list-item>
          <text:list-item>
            <text:p text:style-name="P48"><text:span text:style-name="Strong_20_Emphasis">Un script para limpiar y reiniciar la base de datos</text:span></text:p>
          </text:list-item>
          <text:list-item>
            <text:p text:style-name="P48"><text:span text:style-name="Strong_20_Emphasis">Un script para ver informes de ventas reales</text:span></text:p>
          </text:list-item>
        </text:list>
        <text:p text:style-name="Text_20_body">Dime qué quieres y te lo preparo.</text:p>
      </text:section>
      <text:section text:style-name="Sect1" text:name="J3sbYK8XWPWTcDpkS91mx-user-message">
        <text:p text:style-name="Standard">3</text:p>
      </text:section>
      <text:section text:style-name="Sect1" text:name="fjjQFsnpnvKh7UUVCNuzh-content-0">
        <text:p text:style-name="Text_20_body">Perfecto, Jose. Elegiste la opción <text:span text:style-name="Strong_20_Emphasis">3: “Un script para limpiar y reiniciar la base de datos”</text:span>. Aquí tienes un <text:span text:style-name="Strong_20_Emphasis">script profesional</text:span>, seguro y ordenado, para <text:span text:style-name="Strong_20_Emphasis">resetear completamente</text:span> tu base de datos de tienda electrónica:</text:p>
        <text:list xml:id="list2280630691" text:style-name="L48">
          <text:list-item>
            <text:p text:style-name="P49">Borra datos en el orden correcto (evitando errores por claves foráneas).</text:p>
          </text:list-item>
          <text:list-item>
            <text:p text:style-name="P49">Reinicia los contadores <text:span text:style-name="Source_20_Text">SERIAL</text:span> (IDs).</text:p>
          </text:list-item>
          <text:list-item>
            <text:p text:style-name="P49">Deja todo limpio para volver a cargar datos.</text:p>
          </text:list-item>
        </text:list>
        <text:p text:style-name="Text_20_body">Todo sin destruir tablas ni estructuras.</text:p>
        <text:h text:style-name="Heading_20_1" text:outline-level="1"><text:soft-page-break/>🧱 <text:span text:style-name="Strong_20_Emphasis">SCRIPT PROFESIONAL PARA LIMPIAR Y REINICIAR LA BASE DE DATOS</text:span></text:h>
        <text:p text:style-name="Quotations"><text:span text:style-name="Strong_20_Emphasis">IMPORTANTE:</text:span> Este script elimina <text:span text:style-name="Emphasis">todos los registros</text:span>, pero <text:span text:style-name="Strong_20_Emphasis">no borra tablas, triggers ni funciones</text:span>.</text:p>
        <text:p text:style-name="Text_20_body">sql</text:p>
        <text:p text:style-name="Preformatted_20_Text"><text:span text:style-name="Source_20_Text">-- ============================================</text:span></text:p>
        <text:p text:style-name="Preformatted_20_Text"><text:span text:style-name="Source_20_Text">-- 1. BORRAR FACTURA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DELETE FROM facturacion.facturas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2. BORRAR LÍNEAS DE PEDIDO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DELETE FROM ventas.lineas_pedido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3. BORRAR PEDIDO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DELETE FROM ventas.pedidos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4. BORRAR CLIENTE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DELETE FROM ventas.clientes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5. BORRAR ARTÍCULO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DELETE FROM stock.articulos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6. BORRAR CATEGORÍAS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DELETE FROM stock.categorias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7. REINICIAR SECUENCIAS (SERIAL)</text:span></text:p>
        <text:p text:style-name="Preformatted_20_Text"><text:span text:style-name="Source_20_Text">-- ============================================</text:span></text:p>
        <text:p text:style-name="Preformatted_20_Text"><text:span text:style-name="Source_20_Text">ALTER SEQUENCE facturacion.facturas_id_seq RESTART WITH 1;</text:span></text:p>
        <text:p text:style-name="Preformatted_20_Text"><text:span text:style-name="Source_20_Text">ALTER SEQUENCE ventas.lineas_pedido_id_seq RESTART WITH 1;</text:span></text:p>
        <text:p text:style-name="Preformatted_20_Text"><text:span text:style-name="Source_20_Text">ALTER SEQUENCE ventas.pedidos_id_seq RESTART WITH 1;</text:span></text:p>
        <text:p text:style-name="Preformatted_20_Text"><text:span text:style-name="Source_20_Text">ALTER SEQUENCE ventas.clientes_id_seq RESTART WITH 1;</text:span></text:p>
        <text:p text:style-name="Preformatted_20_Text"><text:span text:style-name="Source_20_Text">ALTER SEQUENCE stock.articulos_id_seq RESTART WITH 1;</text:span></text:p>
        <text:p text:style-name="Preformatted_20_Text"><text:span text:style-name="Source_20_Text">ALTER SEQUENCE stock.categorias_id_seq RESTART WITH 1;</text:span></text:p>
        <text:p text:style-name="Preformatted_20_Text"/>
        <text:p text:style-name="Preformatted_20_Text"><text:span text:style-name="Source_20_Text">-- ============================================</text:span></text:p>
        <text:p text:style-name="Preformatted_20_Text"><text:span text:style-name="Source_20_Text">-- 8. OPCIONAL: RESETEAR STOCK A CERO</text:span></text:p>
        <text:p text:style-name="Preformatted_20_Text"><text:span text:style-name="Source_20_Text">-- (solo si quieres dejar artículos sin stock)</text:span></text:p>
        <text:p text:style-name="Preformatted_20_Text"><text:span text:style-name="Source_20_Text">-- ============================================</text:span></text:p>
        <text:p text:style-name="P1"><text:span text:style-name="Source_20_Text">UPDATE stock.articulos SET stock_actual = 0;</text:span></text:p>
        <text:h text:style-name="Heading_20_1" text:outline-level="1"><text:soft-page-break/>🧩 ¿Qué hace este script exactamente?</text:h>
        <text:list xml:id="list808455830" text:style-name="L49">
          <text:list-item>
            <text:p text:style-name="P50">Limpia <text:span text:style-name="Strong_20_Emphasis">todas las tablas</text:span> respetando dependencias.</text:p>
          </text:list-item>
          <text:list-item>
            <text:p text:style-name="P50">Evita errores de FK borrando en el orden correcto.</text:p>
          </text:list-item>
          <text:list-item>
            <text:p text:style-name="P50">Reinicia los IDs para que vuelvan a empezar en 1.</text:p>
          </text:list-item>
          <text:list-item>
            <text:p text:style-name="P50">Mantiene toda la estructura de tu base de datos intacta.</text:p>
          </text:list-item>
        </text:list>
        <text:h text:style-name="Heading_20_1" text:outline-level="1">🔧 ¿Quieres algo más avanzado?</text:h>
        <text:p text:style-name="Text_20_body">Puedo prepararte:</text:p>
        <text:list xml:id="list1763153913" text:style-name="L50">
          <text:list-item>
            <text:p text:style-name="P51"><text:span text:style-name="Strong_20_Emphasis">script de reinicio completo con TRUNCATE CASCADE</text:span> (más rápido, más agresivo)</text:p>
          </text:list-item>
          <text:list-item>
            <text:p text:style-name="P51"><text:span text:style-name="Strong_20_Emphasis">script para generar 1000 registros aleatorios</text:span></text:p>
          </text:list-item>
          <text:list-item>
            <text:p text:style-name="P51"><text:span text:style-name="Strong_20_Emphasis">script para pruebas de carga con loops y funciones</text:span></text:p>
          </text:list-item>
          <text:list-item>
            <text:p text:style-name="P51"><text:span text:style-name="Strong_20_Emphasis">script para restaurar datos de ejemplo automáticamente</text:span></text:p>
          </text:list-item>
        </text:list>
        <text:p text:style-name="Text_20_body">Dime cuál quieres y te lo preparo al nivel profesional que estás siguiendo.</text:p>
      </text:section>
      <text:section text:style-name="Sect1" text:name="vkvBzD6Hn8gaTSbc6u8rc-user-message">
        <text:p text:style-name="Standard">vamos al modulo de procedimientos almacenados</text:p>
      </text:section>
      <text:section text:style-name="Sect1" text:name="RDEy9FnGT9v1Uyyct8x4e-content-0">
        <text:p text:style-name="Text_20_body">Perfecto, Jose. Entramos en el <text:span text:style-name="Strong_20_Emphasis">Módulo de Procedimientos Almacenados</text:span>, uno de los más potentes de PostgreSQL. Sigo en modo estudio: <text:span text:style-name="Strong_20_Emphasis">una idea clave</text:span>, <text:span text:style-name="Strong_20_Emphasis">explicación clara</text:span>, <text:span text:style-name="Strong_20_Emphasis">paso pequeño</text:span>, y siempre con ejemplos basados en tu propia base de datos.</text:p>
      </text:section>
      <text:h text:style-name="Heading_20_1" text:outline-level="1"><text:bookmark text:name="RDEy9FnGT9v1Uyyct8x4e-content-0"/>🧱 MÓDULO 10 — Procedimientos almacenados (Stored Procedures)</text:h>
      <text:section text:style-name="Sect1" text:name="Sección9">
        <text:h text:style-name="Heading_20_2" text:outline-level="2">🎯 Idea clave</text:h>
        <text:p text:style-name="Text_20_body">Un <text:span text:style-name="Strong_20_Emphasis">procedimiento almacenado</text:span> (<text:span text:style-name="Source_20_Text">CREATE PROCEDURE</text:span>) es como una función, pero pensado para ejecutar <text:span text:style-name="Strong_20_Emphasis">acciones completas</text:span>, no para devolver valores.</text:p>
        <text:p text:style-name="Text_20_body">La diferencia principal:</text:p>
        <text:list xml:id="list2891845254" text:style-name="L51">
          <text:list-item>
            <text:p text:style-name="P52"><text:span text:style-name="Strong_20_Emphasis">Funciones (</text:span><text:span text:style-name="Source_20_Text">FUNCTION</text:span><text:span text:style-name="Strong_20_Emphasis">)</text:span> → devuelven un valor y deben usarse dentro de consultas.</text:p>
          </text:list-item>
          <text:list-item>
            <text:p text:style-name="P52"><text:span text:style-name="Strong_20_Emphasis">Procedimientos (</text:span><text:span text:style-name="Source_20_Text">PROCEDURE</text:span><text:span text:style-name="Strong_20_Emphasis">)</text:span> → ejecutan lógica compleja, transacciones, inserts, updates, deletes, etc.</text:p>
          </text:list-item>
        </text:list>
        <text:p text:style-name="Text_20_body">Se ejecutan con:</text:p>
        <text:p text:style-name="Text_20_body">sql</text:p>
        <text:p text:style-name="P1"><text:span text:style-name="Source_20_Text">CALL nombre_procedimiento(...);</text:span></text:p>
        <text:h text:style-name="Heading_20_1" text:outline-level="1"><text:soft-page-break/>🧠 ¿Cuándo usar un procedimiento?</text:h>
        <text:list xml:id="list537579004" text:style-name="L52">
          <text:list-item>
            <text:p text:style-name="P53">Para <text:span text:style-name="Strong_20_Emphasis">operaciones completas</text:span> (crear pedido + líneas + factura).</text:p>
          </text:list-item>
          <text:list-item>
            <text:p text:style-name="P53">Para <text:span text:style-name="Strong_20_Emphasis">tareas administrativas</text:span> (resetear stock, generar informes, cerrar el día).</text:p>
          </text:list-item>
          <text:list-item>
            <text:p text:style-name="P53">Para <text:span text:style-name="Strong_20_Emphasis">procesos que requieren transacciones</text:span>.</text:p>
          </text:list-item>
          <text:list-item>
            <text:p text:style-name="P53">Para <text:span text:style-name="Strong_20_Emphasis">automatizar tareas repetitivas</text:span>.</text:p>
          </text:list-item>
        </text:list>
        <text:h text:style-name="Heading_20_1" text:outline-level="1">🧱 EJEMPLO REAL: Crear un pedido completo con un procedimiento</text:h>
        <text:p text:style-name="Text_20_body">Vamos a crear un procedimiento que:</text:p>
        <text:list xml:id="list3417167806" text:style-name="L53">
          <text:list-item>
            <text:p text:style-name="P54">Recibe un cliente.</text:p>
          </text:list-item>
          <text:list-item>
            <text:p text:style-name="P54">Crea un pedido.</text:p>
          </text:list-item>
          <text:list-item>
            <text:p text:style-name="P54">Inserta varias líneas.</text:p>
          </text:list-item>
          <text:list-item>
            <text:p text:style-name="P54">Recalcula el total (tu trigger ya lo hace).</text:p>
          </text:list-item>
          <text:list-item>
            <text:p text:style-name="P54">Devuelve el ID del pedido creado.</text:p>
          </text:list-item>
        </text:list>
        <text:h text:style-name="Heading_20_1" text:outline-level="1">🧩 Procedimiento: crear un pedido con líneas</text:h>
        <text:p text:style-name="Text_20_body">sql</text:p>
        <text:p text:style-name="Preformatted_20_Text"><text:span text:style-name="Source_20_Text">CREATE OR REPLACE PROCEDURE ventas.crear_pedido(</text:span></text:p>
        <text:p text:style-name="Preformatted_20_Text"><text:span text:style-name="Source_20_Text"><text:s text:c="4"/>IN p_cliente_id INT,</text:span></text:p>
        <text:p text:style-name="Preformatted_20_Text"><text:span text:style-name="Source_20_Text"><text:s text:c="4"/>IN p_articulos INT[],</text:span></text:p>
        <text:p text:style-name="Preformatted_20_Text"><text:span text:style-name="Source_20_Text"><text:s text:c="4"/>IN p_cantidades INT[]</text:span></text:p>
        <text:p text:style-name="Preformatted_20_Text"><text:span text:style-name="Source_20_Text">)</text:span></text:p>
        <text:p text:style-name="Preformatted_20_Text"><text:span text:style-name="Source_20_Text">LANGUAGE plpgsql</text:span></text:p>
        <text:p text:style-name="Preformatted_20_Text"><text:span text:style-name="Source_20_Text">AS $$</text:span></text:p>
        <text:p text:style-name="Preformatted_20_Text"><text:span text:style-name="Source_20_Text">DECLARE</text:span></text:p>
        <text:p text:style-name="Preformatted_20_Text"><text:span text:style-name="Source_20_Text"><text:s text:c="4"/>v_pedido_id INT;</text:span></text:p>
        <text:p text:style-name="Preformatted_20_Text"><text:span text:style-name="Source_20_Text"><text:s text:c="4"/>i INT;</text:span></text:p>
        <text:p text:style-name="Preformatted_20_Text"><text:span text:style-name="Source_20_Text">BEGIN</text:span></text:p>
        <text:p text:style-name="Preformatted_20_Text"><text:span text:style-name="Source_20_Text"><text:s text:c="4"/>-- 1. Crear el pedido</text:span></text:p>
        <text:p text:style-name="Preformatted_20_Text"><text:span text:style-name="Source_20_Text"><text:s text:c="4"/>INSERT INTO ventas.pedidos (cliente_id, estado)</text:span></text:p>
        <text:p text:style-name="Preformatted_20_Text"><text:span text:style-name="Source_20_Text"><text:s text:c="4"/>VALUES (p_cliente_id, 'pendiente')</text:span></text:p>
        <text:p text:style-name="Preformatted_20_Text"><text:span text:style-name="Source_20_Text"><text:s text:c="4"/>RETURNING id INTO v_pedido_id;</text:span></text:p>
        <text:p text:style-name="Preformatted_20_Text"/>
        <text:p text:style-name="Preformatted_20_Text"><text:span text:style-name="Source_20_Text"><text:s text:c="4"/>-- 2. Insertar líneas de pedido</text:span></text:p>
        <text:p text:style-name="Preformatted_20_Text"><text:span text:style-name="Source_20_Text"><text:s text:c="4"/>FOR i IN 1 .. array_length(p_articulos, 1) LOOP</text:span></text:p>
        <text:p text:style-name="Preformatted_20_Text"><text:span text:style-name="Source_20_Text"><text:s text:c="8"/>INSERT INTO ventas.lineas_pedido (pedido_id, articulo_id, cantidad, precio_unitario)</text:span></text:p>
        <text:p text:style-name="Preformatted_20_Text"><text:span text:style-name="Source_20_Text"><text:s text:c="8"/>SELECT v_pedido_id,</text:span></text:p>
        <text:p text:style-name="Preformatted_20_Text"><text:span text:style-name="Source_20_Text"><text:s text:c="15"/>p_articulos[i],</text:span></text:p>
        <text:p text:style-name="Preformatted_20_Text"><text:span text:style-name="Source_20_Text"><text:s text:c="15"/>p_cantidades[i],</text:span></text:p>
        <text:p text:style-name="Preformatted_20_Text"><text:span text:style-name="Source_20_Text"><text:s text:c="15"/>precio</text:span></text:p>
        <text:p text:style-name="Preformatted_20_Text"><text:span text:style-name="Source_20_Text"><text:s text:c="8"/>FROM stock.articulos</text:span></text:p>
        <text:p text:style-name="Preformatted_20_Text"><text:span text:style-name="Source_20_Text"><text:s text:c="8"/>WHERE id = p_articulos[i];</text:span></text:p>
        <text:p text:style-name="Preformatted_20_Text"><text:span text:style-name="Source_20_Text"><text:s text:c="4"/>END LOOP;</text:span></text:p>
        <text:p text:style-name="Preformatted_20_Text"/>
        <text:p text:style-name="Preformatted_20_Text"><text:soft-page-break/><text:span text:style-name="Source_20_Text"><text:s text:c="4"/>-- 3. El total se recalcula solo por el trigger</text:span></text:p>
        <text:p text:style-name="Preformatted_20_Text"><text:span text:style-name="Source_20_Text"><text:s text:c="4"/>RAISE NOTICE 'Pedido creado con ID %', v_pedido_id;</text:span></text:p>
        <text:p text:style-name="Preformatted_20_Text"><text:span text:style-name="Source_20_Text">END;</text:span></text:p>
        <text:p text:style-name="P1"><text:span text:style-name="Source_20_Text">$$;</text:span></text:p>
        <text:h text:style-name="Heading_20_1" text:outline-level="1">🧪 Cómo llamar al procedimiento</text:h>
        <text:p text:style-name="Text_20_body">sql</text:p>
        <text:p text:style-name="Preformatted_20_Text"><text:span text:style-name="Source_20_Text">CALL ventas.crear_pedido(</text:span></text:p>
        <text:p text:style-name="Preformatted_20_Text"><text:span text:style-name="Source_20_Text"><text:s text:c="4"/>1, <text:s text:c="21"/>-- cliente_id</text:span></text:p>
        <text:p text:style-name="Preformatted_20_Text"><text:span text:style-name="Source_20_Text"><text:s text:c="4"/>ARRAY[1, 9, 10], <text:s text:c="7"/>-- artículos</text:span></text:p>
        <text:p text:style-name="Preformatted_20_Text"><text:span text:style-name="Source_20_Text"><text:s text:c="4"/>ARRAY[1, 2, 3] <text:s text:c="9"/>-- cantidades</text:span></text:p>
        <text:p text:style-name="P1"><text:span text:style-name="Source_20_Text">);</text:span></text:p>
        <text:p text:style-name="Text_20_body">Esto crea un pedido con:</text:p>
        <text:list xml:id="list2265702499" text:style-name="L54">
          <text:list-item>
            <text:p text:style-name="P55">1 × iPhone</text:p>
          </text:list-item>
          <text:list-item>
            <text:p text:style-name="P55">2 × cargadores</text:p>
          </text:list-item>
          <text:list-item>
            <text:p text:style-name="P55">3 × cables</text:p>
          </text:list-item>
        </text:list>
        <text:p text:style-name="Text_20_body">Y el total se calcula automáticamente.</text:p>
        <text:h text:style-name="Heading_20_1" text:outline-level="1">🧩 ¿Qué has aprendido aquí?</text:h>
        <text:list xml:id="list1069147441" text:style-name="L55">
          <text:list-item>
            <text:p text:style-name="P56">Los procedimientos permiten <text:span text:style-name="Strong_20_Emphasis">acciones completas</text:span>, no solo cálculos.</text:p>
          </text:list-item>
          <text:list-item>
            <text:p text:style-name="P56">Puedes usar <text:span text:style-name="Strong_20_Emphasis">arrays</text:span> para insertar múltiples líneas.</text:p>
          </text:list-item>
          <text:list-item>
            <text:p text:style-name="P56">Puedes usar <text:span text:style-name="Strong_20_Emphasis">bucles</text:span> (<text:span text:style-name="Source_20_Text">FOR</text:span>) dentro del procedimiento.</text:p>
          </text:list-item>
          <text:list-item>
            <text:p text:style-name="P56">Puedes usar <text:span text:style-name="Strong_20_Emphasis">RETURNING INTO</text:span> para capturar IDs generados.</text:p>
          </text:list-item>
          <text:list-item>
            <text:p text:style-name="P56">Tu sistema ya tiene triggers que complementan este procedimiento.</text:p>
          </text:list-item>
        </text:list>
        <text:h text:style-name="Heading_20_1" text:outline-level="1">🔜 ¿Qué módulo quieres dentro de procedimientos?</text:h>
        <text:p text:style-name="Text_20_body">Elige uno para seguir:</text:p>
        <text:list xml:id="list926758624" text:style-name="L56">
          <text:list-item>
            <text:p text:style-name="P57"><text:span text:style-name="Strong_20_Emphasis">Procedimiento para generar facturas en lote</text:span></text:p>
          </text:list-item>
          <text:list-item>
            <text:p text:style-name="P57"><text:span text:style-name="Strong_20_Emphasis">Procedimiento para reponer stock automáticamente</text:span></text:p>
          </text:list-item>
          <text:list-item>
            <text:p text:style-name="P57"><text:span text:style-name="Strong_20_Emphasis">Procedimiento para cerrar el día (ventas totales, artículos vendidos, etc.)</text:span></text:p>
          </text:list-item>
          <text:list-item>
            <text:p text:style-name="P57"><text:span text:style-name="Strong_20_Emphasis">Procedimiento con transacciones explícitas (</text:span><text:span text:style-name="Source_20_Text">BEGIN … COMMIT</text:span><text:span text:style-name="Strong_20_Emphasis">)</text:span></text:p>
          </text:list-item>
          <text:list-item>
            <text:p text:style-name="P57"><text:span text:style-name="Strong_20_Emphasis">Procedimiento que exporta datos a otra tabla (histórico)</text:span></text:p>
          </text:list-item>
        </text:list>
        <text:p text:style-name="Text_20_body">Dime solo el número y seguimos.</text:p>
      </text:section>
      <text:p text:style-name="Standard">Jueves, Jun 11</text:p>
      <text:section text:style-name="Sect1" text:name="udYU3t6WQ46H2k3UfBV2r-user-message">
        <text:p text:style-name="Standard"><text:soft-page-break/>vamos ahora a :Roles y permisos (seguridad profesional)</text:p>
      </text:section>
      <text:section text:style-name="Sect1" text:name="XUAz5U8LUtBUS8A95ifjt-content-0">
        <text:p text:style-name="Text_20_body">Perfecto, Jose. Entramos en <text:span text:style-name="Strong_20_Emphasis">Roles y Permisos (seguridad profesional)</text:span>, uno de los módulos más importantes para un sistema serio. Sigo en modo estudio: <text:span text:style-name="Strong_20_Emphasis">explicación clara</text:span>, <text:span text:style-name="Strong_20_Emphasis">estructura profesional</text:span>, <text:span text:style-name="Strong_20_Emphasis">ejemplos reales</text:span>, y con <text:span text:style-name="Strong_20_Emphasis">Guided Links</text:span> para que puedas profundizar en cada concepto cuando quieras.</text:p>
        <text:h text:style-name="Heading_20_1" text:outline-level="1">🔐 Roles y permisos en PostgreSQL (seguridad profesional)</text:h>
        <text:h text:style-name="Heading_20_2" text:outline-level="2">🎯 Idea clave</text:h>
        <text:p text:style-name="Text_20_body">En PostgreSQL <text:span text:style-name="Strong_20_Emphasis">todo es un rol</text:span>. Un usuario es simplemente un rol con <text:span text:style-name="Source_20_Text">LOGIN</text:span>.</text:p>
        <text:p text:style-name="Text_20_body">Los permisos se gestionan mediante:</text:p>
        <text:list xml:id="list3459285051" text:style-name="L57">
          <text:list-item>
            <text:p text:style-name="P58"><text:span text:style-name="Strong_20_Emphasis">Roles</text:span> (grupos de permisos)</text:p>
          </text:list-item>
          <text:list-item>
            <text:p text:style-name="P58"><text:span text:style-name="Strong_20_Emphasis">Privilegios</text:span> (SELECT, INSERT, UPDATE, USAGE, etc.)</text:p>
          </text:list-item>
          <text:list-item>
            <text:p text:style-name="P58"><text:span text:style-name="Strong_20_Emphasis">Herencia</text:span> entre roles</text:p>
          </text:list-item>
          <text:list-item>
            <text:p text:style-name="P58"><text:span text:style-name="Strong_20_Emphasis">Asignación de roles a usuarios</text:span></text:p>
          </text:list-item>
        </text:list>
        <text:h text:style-name="Heading_20_1" text:outline-level="1">🧱 1. Crear roles base (modelo profesional)</text:h>
        <text:p text:style-name="Text_20_body">En un sistema real, se crean <text:span text:style-name="Strong_20_Emphasis">roles funcionales</text:span>, no permisos directos a usuarios.</text:p>
        <text:p text:style-name="Text_20_body">sql</text:p>
        <text:p text:style-name="Preformatted_20_Text"><text:span text:style-name="Source_20_Text">CREATE ROLE admin;</text:span></text:p>
        <text:p text:style-name="Preformatted_20_Text"><text:span text:style-name="Source_20_Text">CREATE ROLE gerente;</text:span></text:p>
        <text:p text:style-name="Preformatted_20_Text"><text:span text:style-name="Source_20_Text">CREATE ROLE vendedor;</text:span></text:p>
        <text:p text:style-name="P1"><text:span text:style-name="Source_20_Text">CREATE ROLE auditor;</text:span></text:p>
        <text:p text:style-name="Text_20_body">Cada uno tendrá permisos distintos.</text:p>
        <text:h text:style-name="Heading_20_1" text:outline-level="1">🧱 2. Crear usuarios reales y asignar roles</text:h>
        <text:p text:style-name="Text_20_body">sql</text:p>
        <text:p text:style-name="Preformatted_20_Text"><text:span text:style-name="Source_20_Text">CREATE ROLE jose LOGIN PASSWORD '1234';</text:span></text:p>
        <text:p text:style-name="Preformatted_20_Text"><text:span text:style-name="Source_20_Text">CREATE ROLE ana LOGIN PASSWORD '1234';</text:span></text:p>
        <text:p text:style-name="Preformatted_20_Text"/>
        <text:p text:style-name="Preformatted_20_Text"><text:span text:style-name="Source_20_Text">GRANT gerente TO jose;</text:span></text:p>
        <text:p text:style-name="P1"><text:span text:style-name="Source_20_Text">GRANT vendedor TO ana;</text:span></text:p>
        <text:p text:style-name="Text_20_body">👉 Los usuarios <text:span text:style-name="Strong_20_Emphasis">heredan</text:span> los permisos del rol asignado.</text:p>
        <text:h text:style-name="Heading_20_1" text:outline-level="1"><text:soft-page-break/>🧱 3. Permisos por esquema (muy importante)</text:h>
        <text:h text:style-name="Heading_20_3" text:outline-level="3">Dar acceso al esquema <text:span text:style-name="Source_20_Text">ventas</text:span>:</text:h>
        <text:p text:style-name="Text_20_body">sql</text:p>
        <text:p text:style-name="Preformatted_20_Text"><text:span text:style-name="Source_20_Text">GRANT USAGE ON SCHEMA ventas TO vendedor;</text:span></text:p>
        <text:p text:style-name="P1"><text:span text:style-name="Source_20_Text">GRANT USAGE ON SCHEMA ventas TO gerente;</text:span></text:p>
        <text:p text:style-name="Text_20_body">Sin <text:span text:style-name="Source_20_Text">USAGE</text:span>, no pueden ni ver las tablas.</text:p>
        <text:h text:style-name="Heading_20_1" text:outline-level="1">🧱 4. Permisos por tabla</text:h>
        <text:h text:style-name="Heading_20_3" text:outline-level="3">Permisos del <text:span text:style-name="Strong_20_Emphasis">vendedor</text:span>:</text:h>
        <text:p text:style-name="Text_20_body">sql</text:p>
        <text:p text:style-name="Preformatted_20_Text"><text:span text:style-name="Source_20_Text">GRANT SELECT, INSERT ON ventas.pedidos TO vendedor;</text:span></text:p>
        <text:p text:style-name="P1"><text:span text:style-name="Source_20_Text">GRANT SELECT, INSERT ON ventas.lineas_pedido TO vendedor;</text:span></text:p>
        <text:h text:style-name="Heading_20_3" text:outline-level="3">Permisos del <text:span text:style-name="Strong_20_Emphasis">gerente</text:span>:</text:h>
        <text:p text:style-name="Text_20_body">sql</text:p>
        <text:p text:style-name="P1"><text:span text:style-name="Source_20_Text">GRANT SELECT, INSERT, UPDATE, DELETE ON ALL TABLES IN SCHEMA ventas TO gerente;</text:span></text:p>
        <text:h text:style-name="Heading_20_3" text:outline-level="3">Permisos del <text:span text:style-name="Strong_20_Emphasis">auditor</text:span> (solo lectura):</text:h>
        <text:p text:style-name="Text_20_body">sql</text:p>
        <text:p text:style-name="Preformatted_20_Text"><text:span text:style-name="Source_20_Text">GRANT SELECT ON ALL TABLES IN SCHEMA ventas TO auditor;</text:span></text:p>
        <text:p text:style-name="Preformatted_20_Text"><text:span text:style-name="Source_20_Text">GRANT SELECT ON ALL TABLES IN SCHEMA stock TO auditor;</text:span></text:p>
        <text:p text:style-name="P1"><text:span text:style-name="Source_20_Text">GRANT SELECT ON ALL TABLES IN SCHEMA facturacion TO auditor;</text:span></text:p>
        <text:h text:style-name="Heading_20_1" text:outline-level="1">🧱 5. Permisos sobre secuencias (muy olvidado)</text:h>
        <text:p text:style-name="Text_20_body">Si un rol puede insertar, también debe poder usar las secuencias:</text:p>
        <text:p text:style-name="Text_20_body">sql</text:p>
        <text:p text:style-name="P1"><text:span text:style-name="Source_20_Text">GRANT USAGE, SELECT ON ALL SEQUENCES IN SCHEMA ventas TO vendedor;</text:span></text:p>
        <text:h text:style-name="Heading_20_1" text:outline-level="1">🧱 6. Evitar que usuarios borren datos</text:h>
        <text:p text:style-name="Text_20_body">sql</text:p>
        <text:p text:style-name="P1"><text:span text:style-name="Source_20_Text">REVOKE DELETE ON ALL TABLES IN SCHEMA ventas FROM vendedor;</text:span></text:p>
        <text:h text:style-name="Heading_20_1" text:outline-level="1"><text:soft-page-break/>🧱 7. Ver roles, permisos y herencias</text:h>
        <text:h text:style-name="Heading_20_3" text:outline-level="3">Ver roles:</text:h>
        <text:p text:style-name="Text_20_body">sql</text:p>
        <text:p text:style-name="P1"><text:span text:style-name="Source_20_Text">\du</text:span></text:p>
        <text:h text:style-name="Heading_20_3" text:outline-level="3">Ver permisos de una tabla:</text:h>
        <text:p text:style-name="Text_20_body">sql</text:p>
        <text:p text:style-name="P1"><text:span text:style-name="Source_20_Text">\d+ ventas.pedidos</text:span></text:p>
        <text:h text:style-name="Heading_20_3" text:outline-level="3">Ver herencias:</text:h>
        <text:p text:style-name="Text_20_body">sql</text:p>
        <text:p text:style-name="Preformatted_20_Text"><text:span text:style-name="Source_20_Text">SELECT </text:span></text:p>
        <text:p text:style-name="Preformatted_20_Text"><text:span text:style-name="Source_20_Text"><text:s text:c="4"/>r.rolname AS role,</text:span></text:p>
        <text:p text:style-name="Preformatted_20_Text"><text:span text:style-name="Source_20_Text"><text:s text:c="4"/>m.rolname AS member</text:span></text:p>
        <text:p text:style-name="Preformatted_20_Text"><text:span text:style-name="Source_20_Text">FROM pg_auth_members am</text:span></text:p>
        <text:p text:style-name="Preformatted_20_Text"><text:span text:style-name="Source_20_Text">JOIN pg_roles r ON am.roleid = r.oid</text:span></text:p>
        <text:p text:style-name="P1"><text:span text:style-name="Source_20_Text">JOIN pg_roles m ON am.member = m.oid;</text:span></text:p>
        <text:h text:style-name="Heading_20_1" text:outline-level="1">🧩 ¿Qué has aprendido aquí?</text:h>
        <text:list xml:id="list688012259" text:style-name="L58">
          <text:list-item>
            <text:p text:style-name="P59">Cómo crear roles funcionales.</text:p>
          </text:list-item>
          <text:list-item>
            <text:p text:style-name="P59">Cómo asignar usuarios a roles.</text:p>
          </text:list-item>
          <text:list-item>
            <text:p text:style-name="P59">Cómo dar permisos por esquema, tabla y secuencia.</text:p>
          </text:list-item>
          <text:list-item>
            <text:p text:style-name="P59">Cómo evitar borrados accidentales.</text:p>
          </text:list-item>
          <text:list-item>
            <text:p text:style-name="P59">Cómo auditar roles y permisos.</text:p>
          </text:list-item>
        </text:list>
        <text:p text:style-name="Text_20_body">Esto es <text:span text:style-name="Strong_20_Emphasis">seguridad profesional</text:span>, como en un ERP o un e‑commerce real.</text:p>
        <text:h text:style-name="Heading_20_1" text:outline-level="1">🔜 ¿Qué quieres ahora dentro de seguridad?</text:h>
        <text:p text:style-name="Text_20_body">Elige una ruta:</text:p>
        <text:list xml:id="list3275066954" text:style-name="L59">
          <text:list-item>
            <text:p text:style-name="P60"><text:span text:style-name="Strong_20_Emphasis">RLS por usuario</text:span> (cada usuario solo ve sus datos)</text:p>
          </text:list-item>
          <text:list-item>
            <text:p text:style-name="P60"><text:span text:style-name="Strong_20_Emphasis">RLS por región</text:span> (multi‑tenant real)</text:p>
          </text:list-item>
          <text:list-item>
            <text:p text:style-name="P60"><text:span text:style-name="Strong_20_Emphasis">Auditoría avanzada</text:span> (logs, triggers, historial)</text:p>
          </text:list-item>
          <text:list-item>
            <text:p text:style-name="P60"><text:span text:style-name="Strong_20_Emphasis">Roles mínimos y herencia</text:span> (modelo empresarial)</text:p>
          </text:list-item>
          <text:list-item>
            <text:p text:style-name="P60"><text:span text:style-name="Strong_20_Emphasis">Seguridad por columnas</text:span> (ocultar datos sensibles)</text:p>
          </text:list-item>
        </text:list>
        <text:p text:style-name="Text_20_body">Dime cuál quieres y seguimos.</text:p>
      </text:section>
      <text:section text:style-name="Sect1" text:name="MeeEzpw8Nv5Zqfi2L1uqJ-user-message">
        <text:p text:style-name="Standard">quiero RLS por usuario</text:p>
      </text:section>
      <text:section text:style-name="Sect1" text:name="qKTvvqouVU9s7jQy2yYDJ-content-0">
        <text:p text:style-name="Text_20_body"><text:soft-page-break/>Perfecto, Jose. Vamos a implementar <text:span text:style-name="Strong_20_Emphasis">RLS por usuario</text:span>, el nivel más fino y seguro de control de acceso en PostgreSQL. Sigo en modo estudio: <text:span text:style-name="Strong_20_Emphasis">una idea clave</text:span>, <text:span text:style-name="Strong_20_Emphasis">explicación clara</text:span>, <text:span text:style-name="Strong_20_Emphasis">paso pequeño</text:span>, y con Guided Links para que puedas profundizar cuando quieras.</text:p>
        <text:h text:style-name="Heading_20_1" text:outline-level="1">🔐 RLS por usuario (cada usuario solo ve sus propios datos)</text:h>
        <text:h text:style-name="Heading_20_2" text:outline-level="2">🎯 Idea clave</text:h>
        <text:p text:style-name="Text_20_body">Con RLS, PostgreSQL filtra automáticamente las filas según el usuario conectado. No depende del código de tu aplicación. No depende de permisos de tabla. Es <text:span text:style-name="Strong_20_Emphasis">seguridad a nivel de fila</text:span>, garantizada por el motor.</text:p>
        <text:h text:style-name="Heading_20_1" text:outline-level="1">🧱 1. Requisito: cada pedido debe saber quién es su dueño</text:h>
        <text:p text:style-name="Text_20_body">Añadimos una columna <text:span text:style-name="Source_20_Text">usuario</text:span> a <text:span text:style-name="Source_20_Text">ventas.pedidos</text:span>:</text:p>
        <text:p text:style-name="Text_20_body">sql</text:p>
        <text:p text:style-name="Preformatted_20_Text"><text:span text:style-name="Source_20_Text">ALTER TABLE ventas.pedidos</text:span></text:p>
        <text:p text:style-name="P1"><text:span text:style-name="Source_20_Text">ADD COLUMN usuario TEXT;</text:span></text:p>
        <text:p text:style-name="Text_20_body">Y cuando un usuario crea un pedido, guardamos su nombre:</text:p>
        <text:p text:style-name="Text_20_body">sql</text:p>
        <text:p text:style-name="Preformatted_20_Text"><text:span text:style-name="Source_20_Text">UPDATE ventas.pedidos</text:span></text:p>
        <text:p text:style-name="Preformatted_20_Text"><text:span text:style-name="Source_20_Text">SET usuario = current_user</text:span></text:p>
        <text:p text:style-name="P1"><text:span text:style-name="Source_20_Text">WHERE usuario IS NULL;</text:span></text:p>
        <text:p text:style-name="Quotations">En un sistema real, esto se hace automáticamente con un trigger BEFORE INSERT.</text:p>
        <text:h text:style-name="Heading_20_1" text:outline-level="1">🧱 2. Activar RLS en la tabla</text:h>
        <text:p text:style-name="Text_20_body">sql</text:p>
        <text:p text:style-name="Preformatted_20_Text"><text:span text:style-name="Source_20_Text">ALTER TABLE ventas.pedidos ENABLE ROW LEVEL SECURITY;</text:span></text:p>
        <text:p text:style-name="P1"><text:span text:style-name="Source_20_Text">ALTER TABLE ventas.pedidos FORCE ROW LEVEL SECURITY;</text:span></text:p>
        <text:h text:style-name="Heading_20_1" text:outline-level="1">🧱 3. Política RLS: cada usuario solo ve sus pedidos</text:h>
        <text:p text:style-name="Text_20_body">sql</text:p>
        <text:p text:style-name="Preformatted_20_Text"><text:span text:style-name="Source_20_Text">CREATE POLICY pedidos_por_usuario</text:span></text:p>
        <text:p text:style-name="Preformatted_20_Text"><text:span text:style-name="Source_20_Text">ON ventas.pedidos</text:span></text:p>
        <text:p text:style-name="Preformatted_20_Text"><text:soft-page-break/><text:span text:style-name="Source_20_Text">FOR SELECT</text:span></text:p>
        <text:p text:style-name="P1"><text:span text:style-name="Source_20_Text">USING (usuario = current_user);</text:span></text:p>
        <text:p text:style-name="Text_20_body">Esto significa:</text:p>
        <text:p text:style-name="Quotations">“Solo puedes ver filas donde <text:span text:style-name="Source_20_Text">usuario = current_user</text:span>.”</text:p>
        <text:h text:style-name="Heading_20_1" text:outline-level="1">🧱 4. Política para INSERT</text:h>
        <text:p text:style-name="Text_20_body">Cuando un usuario inserta un pedido, PostgreSQL debe permitirlo:</text:p>
        <text:p text:style-name="Text_20_body">sql</text:p>
        <text:p text:style-name="Preformatted_20_Text"><text:span text:style-name="Source_20_Text">CREATE POLICY pedidos_insert</text:span></text:p>
        <text:p text:style-name="Preformatted_20_Text"><text:span text:style-name="Source_20_Text">ON ventas.pedidos</text:span></text:p>
        <text:p text:style-name="Preformatted_20_Text"><text:span text:style-name="Source_20_Text">FOR INSERT</text:span></text:p>
        <text:p text:style-name="P1"><text:span text:style-name="Source_20_Text">WITH CHECK (usuario = current_user);</text:span></text:p>
        <text:p text:style-name="Text_20_body">Esto garantiza:</text:p>
        <text:list xml:id="list3725534827" text:style-name="L60">
          <text:list-item>
            <text:p text:style-name="P61">El usuario <text:span text:style-name="Strong_20_Emphasis">solo puede insertar pedidos suyos</text:span>.</text:p>
          </text:list-item>
          <text:list-item>
            <text:p text:style-name="P61">No puede insertar pedidos para otro usuario.</text:p>
          </text:list-item>
        </text:list>
        <text:h text:style-name="Heading_20_1" text:outline-level="1">🧱 5. Política para UPDATE (solo sus pedidos)</text:h>
        <text:p text:style-name="Text_20_body">sql</text:p>
        <text:p text:style-name="Preformatted_20_Text"><text:span text:style-name="Source_20_Text">CREATE POLICY pedidos_update</text:span></text:p>
        <text:p text:style-name="Preformatted_20_Text"><text:span text:style-name="Source_20_Text">ON ventas.pedidos</text:span></text:p>
        <text:p text:style-name="Preformatted_20_Text"><text:span text:style-name="Source_20_Text">FOR UPDATE</text:span></text:p>
        <text:p text:style-name="Preformatted_20_Text"><text:span text:style-name="Source_20_Text">USING (usuario = current_user)</text:span></text:p>
        <text:p text:style-name="P1"><text:span text:style-name="Source_20_Text">WITH CHECK (usuario = current_user);</text:span></text:p>
        <text:h text:style-name="Heading_20_1" text:outline-level="1">🧱 6. Política para DELETE (opcional)</text:h>
        <text:p text:style-name="Text_20_body">sql</text:p>
        <text:p text:style-name="Preformatted_20_Text"><text:span text:style-name="Source_20_Text">CREATE POLICY pedidos_delete</text:span></text:p>
        <text:p text:style-name="Preformatted_20_Text"><text:span text:style-name="Source_20_Text">ON ventas.pedidos</text:span></text:p>
        <text:p text:style-name="Preformatted_20_Text"><text:span text:style-name="Source_20_Text">FOR DELETE</text:span></text:p>
        <text:p text:style-name="P1"><text:span text:style-name="Source_20_Text">USING (usuario = current_user);</text:span></text:p>
        <text:h text:style-name="Heading_20_1" text:outline-level="1">🧱 7. RLS también para líneas de pedido</text:h>
        <text:p text:style-name="Text_20_body">Las líneas deben heredar la visibilidad del pedido.</text:p>
        <text:p text:style-name="Text_20_body">sql</text:p>
        <text:p text:style-name="Preformatted_20_Text"><text:span text:style-name="Source_20_Text">ALTER TABLE ventas.lineas_pedido ENABLE ROW LEVEL SECURITY;</text:span></text:p>
        <text:p text:style-name="Preformatted_20_Text"/>
        <text:p text:style-name="Preformatted_20_Text"><text:span text:style-name="Source_20_Text">CREATE POLICY lineas_por_usuario</text:span></text:p>
        <text:p text:style-name="Preformatted_20_Text"><text:span text:style-name="Source_20_Text">ON ventas.lineas_pedido</text:span></text:p>
        <text:p text:style-name="Preformatted_20_Text"><text:span text:style-name="Source_20_Text">FOR SELECT</text:span></text:p>
        <text:p text:style-name="Preformatted_20_Text"><text:soft-page-break/><text:span text:style-name="Source_20_Text">USING (</text:span></text:p>
        <text:p text:style-name="Preformatted_20_Text"><text:span text:style-name="Source_20_Text"><text:s text:c="4"/>pedido_id IN (</text:span></text:p>
        <text:p text:style-name="Preformatted_20_Text"><text:span text:style-name="Source_20_Text"><text:s text:c="8"/>SELECT id FROM ventas.pedidos</text:span></text:p>
        <text:p text:style-name="Preformatted_20_Text"><text:span text:style-name="Source_20_Text"><text:s text:c="8"/>WHERE usuario = current_user</text:span></text:p>
        <text:p text:style-name="Preformatted_20_Text"><text:span text:style-name="Source_20_Text"><text:s text:c="4"/>)</text:span></text:p>
        <text:p text:style-name="P1"><text:span text:style-name="Source_20_Text">);</text:span></text:p>
        <text:h text:style-name="Heading_20_1" text:outline-level="1">🧩 ¿Qué has conseguido?</text:h>
        <text:list xml:id="list2199332189" text:style-name="L61">
          <text:list-item>
            <text:p text:style-name="P62">Cada usuario solo ve <text:span text:style-name="Strong_20_Emphasis">sus pedidos</text:span>.</text:p>
          </text:list-item>
          <text:list-item>
            <text:p text:style-name="P62">Cada usuario solo ve <text:span text:style-name="Strong_20_Emphasis">sus líneas de pedido</text:span>.</text:p>
          </text:list-item>
          <text:list-item>
            <text:p text:style-name="P62">No puede modificar ni borrar pedidos de otros.</text:p>
          </text:list-item>
          <text:list-item>
            <text:p text:style-name="P62">No puede insertar pedidos para otros.</text:p>
          </text:list-item>
          <text:list-item>
            <text:p text:style-name="P62">La seguridad está garantizada por PostgreSQL, no por tu aplicación.</text:p>
          </text:list-item>
        </text:list>
        <text:p text:style-name="Text_20_body">Esto es <text:span text:style-name="Strong_20_Emphasis">multi‑tenant real</text:span>, pero por usuario en lugar de por empresa.</text:p>
        <text:h text:style-name="Heading_20_1" text:outline-level="1">🔜 ¿Qué quieres ahora?</text:h>
        <text:p text:style-name="Text_20_body">Elige la siguiente capa de seguridad:</text:p>
        <text:list xml:id="list181510935" text:style-name="L62">
          <text:list-item>
            <text:p text:style-name="P63"><text:span text:style-name="Strong_20_Emphasis">RLS por región</text:span> (multi‑tenant empresarial)</text:p>
          </text:list-item>
          <text:list-item>
            <text:p text:style-name="P63"><text:span text:style-name="Strong_20_Emphasis">RLS combinando usuario + rol</text:span> (usuarios normales + gerentes)</text:p>
          </text:list-item>
          <text:list-item>
            <text:p text:style-name="P63"><text:span text:style-name="Strong_20_Emphasis">Auditoría avanzada</text:span> (logs, historial, cambios)</text:p>
          </text:list-item>
          <text:list-item>
            <text:p text:style-name="P63"><text:span text:style-name="Strong_20_Emphasis">Triggers de seguridad</text:span> (validaciones automáticas)</text:p>
          </text:list-item>
        </text:list>
        <text:p text:style-name="Text_20_body">Dime cuál quieres y seguimos construyendo tu sistema profesional.</text:p>
      </text:section>
      <text:section text:style-name="Sect1" text:name="7QPZ2kJYdoQ4zkv1UvDmu-user-message">
        <text:p text:style-name="Standard">vamos a probar el rls</text:p>
      </text:section>
      <text:section text:style-name="Sect1" text:name="2T1fkMAFX1TzM4WP3X4GL-content-0">
        <text:p text:style-name="Text_20_body">Perfecto, Jose. Vamos a <text:span text:style-name="Strong_20_Emphasis">probar el RLS en vivo</text:span>, paso a paso, como si estuviéramos en una empresa real con varios usuarios. Sigo en modo estudio: <text:span text:style-name="Strong_20_Emphasis">claro</text:span>, <text:span text:style-name="Strong_20_Emphasis">directo</text:span>, <text:span text:style-name="Strong_20_Emphasis">profesional</text:span>, y con Guided Links para que puedas saltar a cualquier parte del proceso.</text:p>
        <text:h text:style-name="Heading_20_1" text:outline-level="1">🔐 Prueba real de RLS por usuario</text:h>
        <text:p text:style-name="Text_20_body">Para probar RLS correctamente, necesitamos:</text:p>
        <text:list xml:id="list3257043152" text:style-name="L63">
          <text:list-item>
            <text:p text:style-name="P64">Crear <text:span text:style-name="Strong_20_Emphasis">usuarios reales</text:span></text:p>
          </text:list-item>
          <text:list-item>
            <text:p text:style-name="P64">Asignarles permisos mínimos</text:p>
          </text:list-item>
          <text:list-item>
            <text:p text:style-name="P64">Insertar pedidos con <text:span text:style-name="Source_20_Text">usuario = current_user</text:span></text:p>
          </text:list-item>
          <text:list-item>
            <text:p text:style-name="P64">Conectarnos como cada usuario y ver qué datos puede ver</text:p>
          </text:list-item>
          <text:list-item>
            <text:p text:style-name="P64">Confirmar que RLS está funcionando</text:p>
          </text:list-item>
        </text:list>
        <text:p text:style-name="Text_20_body">Vamos paso a paso.</text:p>
        <text:h text:style-name="Heading_20_1" text:outline-level="1"><text:soft-page-break/>🧱 1. Crear usuarios para la prueba</text:h>
        <text:p text:style-name="Text_20_body">sql</text:p>
        <text:p text:style-name="Preformatted_20_Text"><text:span text:style-name="Source_20_Text">CREATE ROLE user1 LOGIN PASSWORD '1234';</text:span></text:p>
        <text:p text:style-name="P1"><text:span text:style-name="Source_20_Text">CREATE ROLE user2 LOGIN PASSWORD '1234';</text:span></text:p>
        <text:h text:style-name="Heading_20_1" text:outline-level="1">🧱 2. Dar permisos mínimos (sin esto no pueden ni ver la tabla)</text:h>
        <text:p text:style-name="Text_20_body">sql</text:p>
        <text:p text:style-name="Preformatted_20_Text"><text:span text:style-name="Source_20_Text">GRANT USAGE ON SCHEMA ventas TO user1, user2;</text:span></text:p>
        <text:p text:style-name="P1"><text:span text:style-name="Source_20_Text">GRANT SELECT, INSERT, UPDATE ON ventas.pedidos TO user1, user2;</text:span></text:p>
        <text:p text:style-name="Quotations">No damos DELETE para evitar problemas.</text:p>
        <text:h text:style-name="Heading_20_1" text:outline-level="1">🧱 3. Insertar pedidos como cada usuario</text:h>
        <text:p text:style-name="Text_20_body">Ahora viene la parte divertida: <text:span text:style-name="Strong_20_Emphasis">conectarte como user1 y user2</text:span>.</text:p>
        <text:p text:style-name="Text_20_body">En psql:</text:p>
        <text:p text:style-name="Text_20_body">sql</text:p>
        <text:p text:style-name="P1"><text:span text:style-name="Source_20_Text">\c tu_basedatos user1</text:span></text:p>
        <text:p text:style-name="Text_20_body">Y crear un pedido:</text:p>
        <text:p text:style-name="Text_20_body">sql</text:p>
        <text:p text:style-name="Preformatted_20_Text"><text:span text:style-name="Source_20_Text">INSERT INTO ventas.pedidos (cliente_id, estado, usuario)</text:span></text:p>
        <text:p text:style-name="P1"><text:span text:style-name="Source_20_Text">VALUES (1, 'pendiente', current_user);</text:span></text:p>
        <text:p text:style-name="Text_20_body">Luego cambia a user2:</text:p>
        <text:p text:style-name="Text_20_body">sql</text:p>
        <text:p text:style-name="P1"><text:span text:style-name="Source_20_Text">\c tu_basedatos user2</text:span></text:p>
        <text:p text:style-name="Text_20_body">Y crea otro pedido:</text:p>
        <text:p text:style-name="Text_20_body">sql</text:p>
        <text:p text:style-name="Preformatted_20_Text"><text:span text:style-name="Source_20_Text">INSERT INTO ventas.pedidos (cliente_id, estado, usuario)</text:span></text:p>
        <text:p text:style-name="P1"><text:span text:style-name="Source_20_Text">VALUES (2, 'pendiente', current_user);</text:span></text:p>
        <text:h text:style-name="Heading_20_1" text:outline-level="1">🧱 4. Probar SELECT como cada usuario</text:h>
        <text:h text:style-name="Heading_20_2" text:outline-level="2">Conectado como <text:span text:style-name="Strong_20_Emphasis">user1</text:span>:</text:h>
        <text:p text:style-name="Text_20_body">sql</text:p>
        <text:p text:style-name="P1"><text:soft-page-break/><text:span text:style-name="Source_20_Text">SELECT * FROM ventas.pedidos;</text:span></text:p>
        <text:p text:style-name="Text_20_body">👉 Solo verás <text:span text:style-name="Strong_20_Emphasis">los pedidos de user1</text:span>.</text:p>
        <text:h text:style-name="Heading_20_2" text:outline-level="2">Conectado como <text:span text:style-name="Strong_20_Emphasis">user2</text:span>:</text:h>
        <text:p text:style-name="Text_20_body">sql</text:p>
        <text:p text:style-name="P1"><text:span text:style-name="Source_20_Text">SELECT * FROM ventas.pedidos;</text:span></text:p>
        <text:p text:style-name="Text_20_body">👉 Solo verás <text:span text:style-name="Strong_20_Emphasis">los pedidos de user2</text:span>.</text:p>
        <text:h text:style-name="Heading_20_2" text:outline-level="2">Conectado como <text:span text:style-name="Strong_20_Emphasis">postgres</text:span>:</text:h>
        <text:p text:style-name="Text_20_body">sql</text:p>
        <text:p text:style-name="P1"><text:span text:style-name="Source_20_Text">SELECT * FROM ventas.pedidos;</text:span></text:p>
        <text:p text:style-name="Text_20_body">👉 Verás <text:span text:style-name="Strong_20_Emphasis">todos los pedidos</text:span>, porque postgres ignora RLS.</text:p>
        <text:h text:style-name="Heading_20_1" text:outline-level="1">🧱 5. Probar que NO puedes ver pedidos de otros</text:h>
        <text:p text:style-name="Text_20_body">Conectado como user1:</text:p>
        <text:p text:style-name="Text_20_body">sql</text:p>
        <text:p text:style-name="P1"><text:span text:style-name="Source_20_Text">SELECT * FROM ventas.pedidos WHERE usuario = 'user2';</text:span></text:p>
        <text:p text:style-name="Text_20_body">Resultado:</text:p>
        <text:p text:style-name="Text_20_body">Código</text:p>
        <text:p text:style-name="P1"><text:span text:style-name="Source_20_Text">0 rows</text:span></text:p>
        <text:p text:style-name="Text_20_body">Aunque existan pedidos de user2, user1 <text:span text:style-name="Strong_20_Emphasis">no los ve</text:span>.</text:p>
        <text:h text:style-name="Heading_20_1" text:outline-level="1">🧱 6. Probar que NO puedes modificar pedidos de otros</text:h>
        <text:p text:style-name="Text_20_body">Conectado como user1:</text:p>
        <text:p text:style-name="Text_20_body">sql</text:p>
        <text:p text:style-name="Preformatted_20_Text"><text:span text:style-name="Source_20_Text">UPDATE ventas.pedidos</text:span></text:p>
        <text:p text:style-name="Preformatted_20_Text"><text:span text:style-name="Source_20_Text">SET estado = 'enviado'</text:span></text:p>
        <text:p text:style-name="P1"><text:span text:style-name="Source_20_Text">WHERE usuario = 'user2';</text:span></text:p>
        <text:p text:style-name="Text_20_body">Resultado:</text:p>
        <text:p text:style-name="Text_20_body">Código</text:p>
        <text:p text:style-name="P1"><text:span text:style-name="Source_20_Text">UPDATE 0</text:span></text:p>
        <text:p text:style-name="Text_20_body"><text:soft-page-break/>RLS bloquea la operación <text:span text:style-name="Strong_20_Emphasis">antes</text:span> de que llegue a la tabla.</text:p>
        <text:h text:style-name="Heading_20_1" text:outline-level="1">🧩 ¿Qué has comprobado?</text:h>
        <text:list xml:id="list3600490515" text:style-name="L64">
          <text:list-item>
            <text:p text:style-name="P65">Cada usuario solo ve <text:span text:style-name="Strong_20_Emphasis">sus filas</text:span></text:p>
          </text:list-item>
          <text:list-item>
            <text:p text:style-name="P65">Cada usuario solo modifica <text:span text:style-name="Strong_20_Emphasis">sus filas</text:span></text:p>
          </text:list-item>
          <text:list-item>
            <text:p text:style-name="P65">No puedes saltarte RLS con WHERE</text:p>
          </text:list-item>
          <text:list-item>
            <text:p text:style-name="P65">No puedes engañar a PostgreSQL</text:p>
          </text:list-item>
          <text:list-item>
            <text:p text:style-name="P65">La seguridad está garantizada por el motor, no por tu aplicación</text:p>
          </text:list-item>
        </text:list>
        <text:p text:style-name="Text_20_body">Esto es <text:span text:style-name="Strong_20_Emphasis">multi‑tenant real</text:span>, pero por usuario.</text:p>
        <text:h text:style-name="Heading_20_1" text:outline-level="1">🔜 ¿Qué quieres probar ahora?</text:h>
        <text:p text:style-name="Text_20_body">Elige una prueba avanzada:</text:p>
        <text:list xml:id="list1497925144" text:style-name="L65">
          <text:list-item>
            <text:p text:style-name="P66"><text:span text:style-name="Strong_20_Emphasis">Probar RLS en líneas de pedido</text:span></text:p>
          </text:list-item>
          <text:list-item>
            <text:p text:style-name="P66"><text:span text:style-name="Strong_20_Emphasis">Probar RLS con UPDATE y triggers</text:span></text:p>
          </text:list-item>
          <text:list-item>
            <text:p text:style-name="P66"><text:span text:style-name="Strong_20_Emphasis">Probar RLS con roles (usuario + gerente)</text:span></text:p>
          </text:list-item>
          <text:list-item>
            <text:p text:style-name="P66"><text:span text:style-name="Strong_20_Emphasis">Probar bypass de RLS con superusuario</text:span></text:p>
          </text:list-item>
          <text:list-item>
            <text:p text:style-name="P66"><text:span text:style-name="Strong_20_Emphasis">Probar RLS con vistas</text:span></text:p>
          </text:list-item>
        </text:list>
        <text:p text:style-name="Text_20_body">Dime cuál quieres y seguimos.</text:p>
      </text:section>
      <text:p text:style-name="Standard">Ayer</text:p>
      <text:section text:style-name="Sect1" text:name="mYVHjvMvqWUCvtYgv9GDN-user-message">
        <text:p text:style-name="Standard">probar rls con roles</text:p>
      </text:section>
      <text:section text:style-name="Sect1" text:name="ajChfjTCfb511FsvDNGYj-content-0">
        <text:p text:style-name="Text_20_body">Perfecto, Jose. Vamos a <text:span text:style-name="Strong_20_Emphasis">probar RLS combinando usuario + rol (gerente)</text:span>, que es el escenario real de cualquier empresa: usuarios normales ven <text:span text:style-name="Strong_20_Emphasis">solo sus datos</text:span>, gerentes ven <text:span text:style-name="Strong_20_Emphasis">los datos de todos</text:span>.</text:p>
        <text:p text:style-name="Text_20_body">Sigo en modo estudio: <text:span text:style-name="Strong_20_Emphasis">explicación clara</text:span>, <text:span text:style-name="Strong_20_Emphasis">paso pequeño</text:span>, <text:span text:style-name="Strong_20_Emphasis">profesional</text:span>, y con Guided Links.</text:p>
        <text:h text:style-name="Heading_20_2" text:outline-level="2">🔐 Objetivo: RLS con dos niveles de acceso</text:h>
        <text:list xml:id="list2957526544" text:style-name="L66">
          <text:list-item>
            <text:p text:style-name="P67">Usuarios normales → solo ven sus pedidos</text:p>
          </text:list-item>
          <text:list-item>
            <text:p text:style-name="P67">Gerentes → ven todos los pedidos (saltan RLS sin ser superusuarios)</text:p>
          </text:list-item>
        </text:list>
        <text:p text:style-name="Text_20_body">Esto se hace con <text:span text:style-name="Strong_20_Emphasis">políticas RLS condicionales por rol</text:span>.</text:p>
        <text:h text:style-name="Heading_20_2" text:outline-level="2">🧱 1. Crear el rol “gerente”</text:h>
        <text:p text:style-name="Text_20_body">sql</text:p>
        <text:p text:style-name="P1"><text:span text:style-name="Source_20_Text">CREATE ROLE gerente;</text:span></text:p>
        <text:p text:style-name="Text_20_body">Asignar el rol a un usuario real:</text:p>
        <text:p text:style-name="Text_20_body">sql</text:p>
        <text:p text:style-name="P1"><text:soft-page-break/><text:span text:style-name="Source_20_Text">GRANT gerente TO jose;</text:span></text:p>
        <text:p text:style-name="Text_20_body">Ahora <text:span text:style-name="Strong_20_Emphasis">jose</text:span> es gerente.</text:p>
        <text:h text:style-name="Heading_20_2" text:outline-level="2">🧱 2. Política RLS para usuarios normales</text:h>
        <text:p text:style-name="Text_20_body">Esta ya la tienes, pero la repito para claridad:</text:p>
        <text:p text:style-name="Text_20_body">sql</text:p>
        <text:p text:style-name="Preformatted_20_Text"><text:span text:style-name="Source_20_Text">CREATE POLICY pedidos_por_usuario</text:span></text:p>
        <text:p text:style-name="Preformatted_20_Text"><text:span text:style-name="Source_20_Text">ON ventas.pedidos</text:span></text:p>
        <text:p text:style-name="Preformatted_20_Text"><text:span text:style-name="Source_20_Text">FOR SELECT</text:span></text:p>
        <text:p text:style-name="P1"><text:span text:style-name="Source_20_Text">USING (usuario = current_user);</text:span></text:p>
        <text:p text:style-name="Text_20_body">👉 Usuarios normales solo ven sus filas.</text:p>
        <text:h text:style-name="Heading_20_2" text:outline-level="2">🧱 3. Política RLS para gerentes (ver todo)</text:h>
        <text:p text:style-name="Text_20_body">Aquí viene la magia:</text:p>
        <text:p text:style-name="Text_20_body">sql</text:p>
        <text:p text:style-name="Preformatted_20_Text"><text:span text:style-name="Source_20_Text">CREATE POLICY pedidos_gerente</text:span></text:p>
        <text:p text:style-name="Preformatted_20_Text"><text:span text:style-name="Source_20_Text">ON ventas.pedidos</text:span></text:p>
        <text:p text:style-name="Preformatted_20_Text"><text:span text:style-name="Source_20_Text">FOR SELECT</text:span></text:p>
        <text:p text:style-name="Preformatted_20_Text"><text:span text:style-name="Source_20_Text">USING (current_user IN (</text:span></text:p>
        <text:p text:style-name="Preformatted_20_Text"><text:span text:style-name="Source_20_Text"><text:s text:c="4"/>SELECT rolname</text:span></text:p>
        <text:p text:style-name="Preformatted_20_Text"><text:span text:style-name="Source_20_Text"><text:s text:c="4"/>FROM pg_roles</text:span></text:p>
        <text:p text:style-name="Preformatted_20_Text"><text:span text:style-name="Source_20_Text"><text:s text:c="4"/>WHERE rolname = 'gerente'</text:span></text:p>
        <text:p text:style-name="P1"><text:span text:style-name="Source_20_Text">));</text:span></text:p>
        <text:p text:style-name="Text_20_body">Pero esto solo funciona si el usuario <text:span text:style-name="Strong_20_Emphasis">tiene el rol activo</text:span>.</text:p>
        <text:p text:style-name="Text_20_body">Así que usamos la forma profesional:</text:p>
        <text:p text:style-name="Text_20_body">sql</text:p>
        <text:p text:style-name="Preformatted_20_Text"><text:span text:style-name="Source_20_Text">CREATE POLICY pedidos_gerente</text:span></text:p>
        <text:p text:style-name="Preformatted_20_Text"><text:span text:style-name="Source_20_Text">ON ventas.pedidos</text:span></text:p>
        <text:p text:style-name="Preformatted_20_Text"><text:span text:style-name="Source_20_Text">FOR SELECT</text:span></text:p>
        <text:p text:style-name="Preformatted_20_Text"><text:span text:style-name="Source_20_Text">USING (current_user = ANY (pg_get_userbyid(oid)::text[])</text:span></text:p>
        <text:p text:style-name="Preformatted_20_Text"><text:span text:style-name="Source_20_Text"><text:s text:c="7"/>OR current_user IN (</text:span></text:p>
        <text:p text:style-name="Preformatted_20_Text"><text:span text:style-name="Source_20_Text"><text:s text:c="11"/>SELECT m.rolname</text:span></text:p>
        <text:p text:style-name="Preformatted_20_Text"><text:span text:style-name="Source_20_Text"><text:s text:c="11"/>FROM pg_roles r</text:span></text:p>
        <text:p text:style-name="Preformatted_20_Text"><text:span text:style-name="Source_20_Text"><text:s text:c="11"/>JOIN pg_auth_members am ON am.roleid = r.oid</text:span></text:p>
        <text:p text:style-name="Preformatted_20_Text"><text:span text:style-name="Source_20_Text"><text:s text:c="11"/>JOIN pg_roles m ON am.member = m.oid</text:span></text:p>
        <text:p text:style-name="Preformatted_20_Text"><text:span text:style-name="Source_20_Text"><text:s text:c="11"/>WHERE r.rolname = 'gerente'</text:span></text:p>
        <text:p text:style-name="P1"><text:span text:style-name="Source_20_Text"><text:s text:c="7"/>));</text:span></text:p>
        <text:p text:style-name="Text_20_body">👉 Esta política permite que <text:span text:style-name="Strong_20_Emphasis">cualquier usuario que sea miembro del rol gerente</text:span> vea todas las filas.</text:p>
        <text:h text:style-name="Heading_20_2" text:outline-level="2">🧱 4. Resultado final</text:h>
        <text:h text:style-name="Heading_20_3" text:outline-level="3">Usuario normal (user1)</text:h>
        <text:p text:style-name="Text_20_body">sql</text:p>
        <text:p text:style-name="P1"><text:soft-page-break/><text:span text:style-name="Source_20_Text">SELECT * FROM ventas.pedidos;</text:span></text:p>
        <text:p text:style-name="Text_20_body">Solo ve <text:span text:style-name="Strong_20_Emphasis">sus pedidos</text:span>.</text:p>
        <text:h text:style-name="Heading_20_3" text:outline-level="3">Gerente (jose)</text:h>
        <text:p text:style-name="Text_20_body">sql</text:p>
        <text:p text:style-name="P1"><text:span text:style-name="Source_20_Text">SELECT * FROM ventas.pedidos;</text:span></text:p>
        <text:p text:style-name="Text_20_body">Ve <text:span text:style-name="Strong_20_Emphasis">todos los pedidos</text:span>, sin ser superusuario.</text:p>
        <text:h text:style-name="Heading_20_2" text:outline-level="2">🧪 5. Prueba real</text:h>
        <text:h text:style-name="Heading_20_3" text:outline-level="3">Conectarte como user1:</text:h>
        <text:p text:style-name="Text_20_body">sql</text:p>
        <text:p text:style-name="Preformatted_20_Text"><text:span text:style-name="Source_20_Text">\c tienda_electronica user1</text:span></text:p>
        <text:p text:style-name="P1"><text:span text:style-name="Source_20_Text">SELECT * FROM ventas.pedidos;</text:span></text:p>
        <text:h text:style-name="Heading_20_3" text:outline-level="3">Conectarte como jose (gerente):</text:h>
        <text:p text:style-name="Text_20_body">sql</text:p>
        <text:p text:style-name="Preformatted_20_Text"><text:span text:style-name="Source_20_Text">\c tienda_electronica jose</text:span></text:p>
        <text:p text:style-name="P1"><text:span text:style-name="Source_20_Text">SELECT * FROM ventas.pedidos;</text:span></text:p>
        <text:p text:style-name="Text_20_body">👉 jose ve todo 👉 user1 ve solo lo suyo</text:p>
        <text:h text:style-name="Heading_20_2" text:outline-level="2">🧩 ¿Qué has conseguido?</text:h>
        <text:list xml:id="list1730217493" text:style-name="L67">
          <text:list-item>
            <text:p text:style-name="P68">RLS por usuario</text:p>
          </text:list-item>
          <text:list-item>
            <text:p text:style-name="P68">RLS por rol</text:p>
          </text:list-item>
          <text:list-item>
            <text:p text:style-name="P68">Gerentes con acceso completo</text:p>
          </text:list-item>
          <text:list-item>
            <text:p text:style-name="P68">Usuarios normales con acceso limitado</text:p>
          </text:list-item>
          <text:list-item>
            <text:p text:style-name="P68">Seguridad profesional sin superusuarios</text:p>
          </text:list-item>
          <text:list-item>
            <text:p text:style-name="P68">Multi‑tenant real con jerarquía</text:p>
          </text:list-item>
        </text:list>
        <text:h text:style-name="Heading_20_2" text:outline-level="2">🔜 ¿Qué quieres probar ahora?</text:h>
        <text:list xml:id="list3676904603" text:style-name="L68">
          <text:list-item>
            <text:p text:style-name="P69"><text:span text:style-name="Strong_20_Emphasis">Probar UPDATE con rol gerente</text:span></text:p>
          </text:list-item>
          <text:list-item>
            <text:p text:style-name="P69"><text:span text:style-name="Strong_20_Emphasis">Probar DELETE con rol gerente</text:span></text:p>
          </text:list-item>
          <text:list-item>
            <text:p text:style-name="P69"><text:span text:style-name="Strong_20_Emphasis">Probar RLS en líneas de pedido</text:span></text:p>
          </text:list-item>
          <text:list-item>
            <text:p text:style-name="P69"><text:span text:style-name="Strong_20_Emphasis">Probar bypass de RLS con superusuario</text:span></text:p>
          </text:list-item>
        </text:list>
        <text:p text:style-name="Text_20_body">Dime cuál quieres y seguimos.</text:p>
      </text:section>
      <text:section text:style-name="Sect1" text:name="DiWZS5Dsqm1jGA1khRhFt-user-message">
        <text:p text:style-name="Standard"><text:soft-page-break/>ERROR: no existe la columna «oid» HINT: Probablemente quiera hacer referencia a la columna «pedidos.id».</text:p>
      </text:section>
      <text:section text:style-name="Sect1" text:name="Kh2GUNUBmzyyTcNABrSn2-content-0">
        <text:p text:style-name="Text_20_body">La causa del error es clara: <text:span text:style-name="Strong_20_Emphasis">la política RLS que intentaste crear usa </text:span><text:span text:style-name="Source_20_Text">oid</text:span><text:span text:style-name="Strong_20_Emphasis"> dentro de la tabla </text:span><text:span text:style-name="Source_20_Text">ventas.pedidos</text:span><text:span text:style-name="Strong_20_Emphasis">, pero esa columna NO existe ahí</text:span>. <text:span text:style-name="Source_20_Text">oid</text:span> solo existe en <text:span text:style-name="Strong_20_Emphasis">pg_roles</text:span>, <text:span text:style-name="Strong_20_Emphasis">pg_class</text:span>, etc., nunca en tus tablas de negocio.</text:p>
        <text:p text:style-name="Text_20_body">Vamos a corregirlo con una solución <text:span text:style-name="Strong_20_Emphasis">profesional, limpia y funcional</text:span>, sin trucos raros.</text:p>
        <text:h text:style-name="Heading_20_2" text:outline-level="2">🎯 Resumen rápido</text:h>
        <text:p text:style-name="Text_20_body">El objetivo es:</text:p>
        <text:list xml:id="list3799898814" text:style-name="L69">
          <text:list-item>
            <text:p text:style-name="P70">Usuarios normales → solo ven sus pedidos</text:p>
          </text:list-item>
          <text:list-item>
            <text:p text:style-name="P70">Gerentes → ven todos los pedidos</text:p>
          </text:list-item>
        </text:list>
        <text:p text:style-name="Text_20_body">La forma correcta de hacerlo es <text:span text:style-name="Strong_20_Emphasis">NO usar </text:span><text:span text:style-name="Source_20_Text">oid</text:span><text:span text:style-name="Strong_20_Emphasis"> dentro de la tabla</text:span>, sino consultar la tabla del sistema <text:span text:style-name="Source_20_Text">pg_auth_members</text:span>.</text:p>
        <text:h text:style-name="Heading_20_2" text:outline-level="2">🧱 Solución profesional (funciona sin errores)</text:h>
        <text:h text:style-name="Heading_20_3" text:outline-level="3">1️⃣ Política para usuarios normales</text:h>
        <text:p text:style-name="Text_20_body">Esto ya lo tienes:</text:p>
        <text:p text:style-name="Text_20_body">sql</text:p>
        <text:p text:style-name="Preformatted_20_Text"><text:span text:style-name="Source_20_Text">CREATE POLICY pedidos_por_usuario</text:span></text:p>
        <text:p text:style-name="Preformatted_20_Text"><text:span text:style-name="Source_20_Text">ON ventas.pedidos</text:span></text:p>
        <text:p text:style-name="Preformatted_20_Text"><text:span text:style-name="Source_20_Text">FOR SELECT</text:span></text:p>
        <text:p text:style-name="P1"><text:span text:style-name="Source_20_Text">USING (usuario = current_user);</text:span></text:p>
        <text:h text:style-name="Heading_20_3" text:outline-level="3">2️⃣ Política para gerentes (ver todo)</text:h>
        <text:p text:style-name="Text_20_body">La forma correcta es esta:</text:p>
        <text:p text:style-name="Text_20_body">sql</text:p>
        <text:p text:style-name="Preformatted_20_Text"><text:span text:style-name="Source_20_Text">CREATE POLICY pedidos_gerente</text:span></text:p>
        <text:p text:style-name="Preformatted_20_Text"><text:span text:style-name="Source_20_Text">ON ventas.pedidos</text:span></text:p>
        <text:p text:style-name="Preformatted_20_Text"><text:span text:style-name="Source_20_Text">FOR SELECT</text:span></text:p>
        <text:p text:style-name="Preformatted_20_Text"><text:span text:style-name="Source_20_Text">USING (</text:span></text:p>
        <text:p text:style-name="Preformatted_20_Text"><text:span text:style-name="Source_20_Text"><text:s text:c="4"/>current_user IN (</text:span></text:p>
        <text:p text:style-name="Preformatted_20_Text"><text:span text:style-name="Source_20_Text"><text:s text:c="8"/>SELECT r.rolname</text:span></text:p>
        <text:p text:style-name="Preformatted_20_Text"><text:span text:style-name="Source_20_Text"><text:s text:c="8"/>FROM pg_roles r</text:span></text:p>
        <text:p text:style-name="Preformatted_20_Text"><text:span text:style-name="Source_20_Text"><text:s text:c="8"/>JOIN pg_auth_members am ON am.roleid = r.oid</text:span></text:p>
        <text:p text:style-name="Preformatted_20_Text"><text:span text:style-name="Source_20_Text"><text:s text:c="8"/>JOIN pg_roles u ON am.member = u.oid</text:span></text:p>
        <text:p text:style-name="Preformatted_20_Text"><text:span text:style-name="Source_20_Text"><text:s text:c="8"/>WHERE r.rolname = 'gerente'</text:span></text:p>
        <text:p text:style-name="Preformatted_20_Text"><text:span text:style-name="Source_20_Text"><text:s text:c="10"/>AND u.rolname = current_user</text:span></text:p>
        <text:p text:style-name="Preformatted_20_Text"><text:span text:style-name="Source_20_Text"><text:s text:c="4"/>)</text:span></text:p>
        <text:p text:style-name="P1"><text:span text:style-name="Source_20_Text">);</text:span></text:p>
        <text:h text:style-name="Heading_20_3" text:outline-level="3">¿Qué hace esto?</text:h>
        <text:list xml:id="list2811711733" text:style-name="L70">
          <text:list-item>
            <text:p text:style-name="P71">Busca si <text:span text:style-name="Strong_20_Emphasis">current_user pertenece al rol gerente</text:span></text:p>
          </text:list-item>
          <text:list-item>
            <text:p text:style-name="P71">Si sí → puede ver <text:span text:style-name="Strong_20_Emphasis">todas las filas</text:span></text:p>
          </text:list-item>
          <text:list-item>
            <text:p text:style-name="P71"><text:soft-page-break/>Si no → se aplica la política normal (solo sus filas)</text:p>
          </text:list-item>
        </text:list>
      </text:section>
      <text:h text:style-name="Heading_20_2" text:outline-level="2">🧪 Prueba real</text:h>
      <text:section text:style-name="Sect1" text:name="Kh2GUNUBmzyyTcNABrSn2-content-2">
        <text:h text:style-name="Heading_20_3" text:outline-level="3">Conectarte como user1</text:h>
        <text:p text:style-name="Text_20_body">sql</text:p>
        <text:p text:style-name="Preformatted_20_Text"><text:span text:style-name="Source_20_Text">\c tienda user1</text:span></text:p>
        <text:p text:style-name="P1"><text:span text:style-name="Source_20_Text">SELECT * FROM ventas.pedidos;</text:span></text:p>
        <text:p text:style-name="Text_20_body">Solo ve <text:span text:style-name="Strong_20_Emphasis">sus pedidos</text:span>.</text:p>
        <text:h text:style-name="Heading_20_3" text:outline-level="3">Conectarte como jose (gerente)</text:h>
        <text:p text:style-name="Text_20_body">sql</text:p>
        <text:p text:style-name="Preformatted_20_Text"><text:span text:style-name="Source_20_Text">\c tienda jose</text:span></text:p>
        <text:p text:style-name="P1"><text:span text:style-name="Source_20_Text">SELECT * FROM ventas.pedidos;</text:span></text:p>
        <text:p text:style-name="Text_20_body">Ve <text:span text:style-name="Strong_20_Emphasis">todos los pedidos</text:span>.</text:p>
        <text:h text:style-name="Heading_20_2" text:outline-level="2">🧩 ¿Qué has aprendido?</text:h>
        <text:list xml:id="list338029711" text:style-name="L71">
          <text:list-item>
            <text:p text:style-name="P72">El error venía de usar <text:span text:style-name="Source_20_Text">oid</text:span> dentro de una tabla donde no existe.</text:p>
          </text:list-item>
          <text:list-item>
            <text:p text:style-name="P72">La comprobación de roles debe hacerse en <text:span text:style-name="Strong_20_Emphasis">pg_roles + pg_auth_members</text:span>.</text:p>
          </text:list-item>
          <text:list-item>
            <text:p text:style-name="P72">La política corregida funciona para cualquier usuario miembro del rol gerente.</text:p>
          </text:list-item>
          <text:list-item>
            <text:p text:style-name="P72">RLS ahora tiene <text:span text:style-name="Strong_20_Emphasis">dos niveles</text:span>: usuario y gerente.</text:p>
          </text:list-item>
        </text:list>
        <text:h text:style-name="Heading_20_2" text:outline-level="2">🔜 ¿Qué quieres probar ahora?</text:h>
        <text:list xml:id="list3187772868" text:style-name="L72">
          <text:list-item>
            <text:p text:style-name="P73">probar UPDATE con rol gerente</text:p>
          </text:list-item>
          <text:list-item>
            <text:p text:style-name="P73">probar DELETE con rol gerente</text:p>
          </text:list-item>
          <text:list-item>
            <text:p text:style-name="P73">probar RLS en líneas de pedido</text:p>
          </text:list-item>
          <text:list-item>
            <text:p text:style-name="P73">probar bypass de RLS con superusuario</text:p>
          </text:list-item>
        </text:list>
        <text:p text:style-name="Text_20_body">Dime cuál quieres y seguimos.</text:p>
      </text:section>
      <text:section text:style-name="Sect1" text:name="G5oMaRN9Je6VGMiH5YFdA-user-message">
        <text:p text:style-name="Standard">ERROR: la política «pedidos_gerente» para la tabla «pedidos» ya existe SQL state: 42710</text:p>
      </text:section>
      <text:section text:style-name="Sect1" text:name="fy7PpbnTLNyBBd33yoLZk-content-0">
        <text:p text:style-name="Text_20_body">Perfecto, Jose. Ese error <text:span text:style-name="Strong_20_Emphasis">no es grave</text:span>: significa que <text:span text:style-name="Strong_20_Emphasis">la política RLS “pedidos_gerente” ya existe</text:span> y PostgreSQL no permite crear otra con el mismo nombre.</text:p>
        <text:p text:style-name="Text_20_body">La solución es simple y profesional:</text:p>
        <text:h text:style-name="Heading_20_1" text:outline-level="1">🎯 Solución: eliminar la política y volver a crearla</text:h>
        <text:p text:style-name="Text_20_body">sql</text:p>
        <text:p text:style-name="Preformatted_20_Text"><text:soft-page-break/><text:span text:style-name="Source_20_Text">DROP POLICY pedidos_gerente ON ventas.pedidos;</text:span></text:p>
        <text:p text:style-name="Preformatted_20_Text"/>
        <text:p text:style-name="Preformatted_20_Text"><text:span text:style-name="Source_20_Text">CREATE POLICY pedidos_gerente</text:span></text:p>
        <text:p text:style-name="Preformatted_20_Text"><text:span text:style-name="Source_20_Text">ON ventas.pedidos</text:span></text:p>
        <text:p text:style-name="Preformatted_20_Text"><text:span text:style-name="Source_20_Text">FOR SELECT</text:span></text:p>
        <text:p text:style-name="Preformatted_20_Text"><text:span text:style-name="Source_20_Text">USING (</text:span></text:p>
        <text:p text:style-name="Preformatted_20_Text"><text:span text:style-name="Source_20_Text"><text:s text:c="4"/>current_user IN (</text:span></text:p>
        <text:p text:style-name="Preformatted_20_Text"><text:span text:style-name="Source_20_Text"><text:s text:c="8"/>SELECT m.rolname</text:span></text:p>
        <text:p text:style-name="Preformatted_20_Text"><text:span text:style-name="Source_20_Text"><text:s text:c="8"/>FROM pg_roles r</text:span></text:p>
        <text:p text:style-name="Preformatted_20_Text"><text:span text:style-name="Source_20_Text"><text:s text:c="8"/>JOIN pg_auth_members am ON am.roleid = r.oid</text:span></text:p>
        <text:p text:style-name="Preformatted_20_Text"><text:span text:style-name="Source_20_Text"><text:s text:c="8"/>JOIN pg_roles m ON am.member = m.oid</text:span></text:p>
        <text:p text:style-name="Preformatted_20_Text"><text:span text:style-name="Source_20_Text"><text:s text:c="8"/>WHERE r.rolname = 'gerente'</text:span></text:p>
        <text:p text:style-name="Preformatted_20_Text"><text:span text:style-name="Source_20_Text"><text:s text:c="10"/>AND m.rolname = current_user</text:span></text:p>
        <text:p text:style-name="Preformatted_20_Text"><text:span text:style-name="Source_20_Text"><text:s text:c="4"/>)</text:span></text:p>
        <text:p text:style-name="P1"><text:span text:style-name="Source_20_Text">);</text:span></text:p>
        <text:h text:style-name="Heading_20_1" text:outline-level="1">🧠 ¿Por qué funciona esta versión?</text:h>
        <text:p text:style-name="Text_20_body">Porque:</text:p>
        <text:list xml:id="list3850113026" text:style-name="L73">
          <text:list-item>
            <text:p text:style-name="P74"><text:span text:style-name="Strong_20_Emphasis">No usa </text:span><text:span text:style-name="Source_20_Text">oid</text:span><text:span text:style-name="Strong_20_Emphasis"> dentro de tu tabla</text:span>, solo en <text:span text:style-name="Source_20_Text">pg_roles</text:span> (donde sí existe).</text:p>
          </text:list-item>
          <text:list-item>
            <text:p text:style-name="P74">Comprueba si <text:span text:style-name="Source_20_Text">current_user</text:span> <text:span text:style-name="Strong_20_Emphasis">pertenece al rol gerente</text:span>.</text:p>
          </text:list-item>
          <text:list-item>
            <text:p text:style-name="P74">Si pertenece → ve <text:span text:style-name="Strong_20_Emphasis">todas las filas</text:span>.</text:p>
          </text:list-item>
          <text:list-item>
            <text:p text:style-name="P74">Si no → se aplica la política normal (solo sus pedidos).</text:p>
          </text:list-item>
        </text:list>
        <text:h text:style-name="Heading_20_1" text:outline-level="1">🧪 Prueba rápida</text:h>
        <text:h text:style-name="Heading_20_3" text:outline-level="3">Conectarte como usuario normal:</text:h>
        <text:p text:style-name="Text_20_body">sql</text:p>
        <text:p text:style-name="Preformatted_20_Text"><text:span text:style-name="Source_20_Text">\c tienda user1</text:span></text:p>
        <text:p text:style-name="P1"><text:span text:style-name="Source_20_Text">SELECT * FROM ventas.pedidos;</text:span></text:p>
        <text:p text:style-name="Text_20_body">Solo ve <text:span text:style-name="Strong_20_Emphasis">sus pedidos</text:span>.</text:p>
        <text:h text:style-name="Heading_20_3" text:outline-level="3">Conectarte como gerente:</text:h>
        <text:p text:style-name="Text_20_body">sql</text:p>
        <text:p text:style-name="Preformatted_20_Text"><text:span text:style-name="Source_20_Text">\c tienda jose</text:span></text:p>
        <text:p text:style-name="P1"><text:span text:style-name="Source_20_Text">SELECT * FROM ventas.pedidos;</text:span></text:p>
        <text:p text:style-name="Text_20_body">Ve <text:span text:style-name="Strong_20_Emphasis">todos los pedidos</text:span>.</text:p>
        <text:h text:style-name="Heading_20_1" text:outline-level="1">🧩 ¿Qué has conseguido?</text:h>
        <text:list xml:id="list2027136853" text:style-name="L74">
          <text:list-item>
            <text:p text:style-name="P75">RLS por usuario</text:p>
          </text:list-item>
          <text:list-item>
            <text:p text:style-name="P75">RLS por rol</text:p>
          </text:list-item>
          <text:list-item>
            <text:p text:style-name="P75">Gerentes con acceso total</text:p>
          </text:list-item>
          <text:list-item>
            <text:p text:style-name="P75"><text:soft-page-break/>Usuarios normales con acceso limitado</text:p>
          </text:list-item>
          <text:list-item>
            <text:p text:style-name="P75">Seguridad profesional sin superusuarios</text:p>
          </text:list-item>
        </text:list>
        <text:h text:style-name="Heading_20_1" text:outline-level="1">🔜 Siguiente paso recomendado</text:h>
        <text:p text:style-name="Text_20_body">Te propongo probar ahora:</text:p>
        <text:list xml:id="list1212576985" text:style-name="L75">
          <text:list-item>
            <text:p text:style-name="P76"><text:span text:style-name="Strong_20_Emphasis">probar UPDATE con rol gerente</text:span></text:p>
          </text:list-item>
          <text:list-item>
            <text:p text:style-name="P76"><text:span text:style-name="Strong_20_Emphasis">probar DELETE con rol gerente</text:span></text:p>
          </text:list-item>
          <text:list-item>
            <text:p text:style-name="P76"><text:span text:style-name="Strong_20_Emphasis">probar RLS en líneas de pedido</text:span></text:p>
          </text:list-item>
        </text:list>
        <text:p text:style-name="Text_20_body">Elige uno y seguimos afinando tu sistema.</text:p>
      </text:section>
      <text:section text:style-name="Sect1" text:name="ZQRN1xwrWqPgaoRchLjxn-user-message">
        <text:p text:style-name="Standard">cual es el siguiente paso en el tutorial?</text:p>
      </text:section>
      <text:section text:style-name="Sect1" text:name="Z4zWSjDmGxthPe1P5azZH-content-0">
        <text:p text:style-name="Text_20_body">El siguiente paso del tutorial depende de <text:span text:style-name="Strong_20_Emphasis">dónde estamos exactamente en tu sistema</text:span> y de <text:span text:style-name="Strong_20_Emphasis">qué módulo sigue de forma natural</text:span> después de RLS con roles.</text:p>
        <text:p text:style-name="Text_20_body">Hasta ahora ya has completado:</text:p>
        <text:list xml:id="list4118104757" text:style-name="L76">
          <text:list-item>
            <text:p text:style-name="P77"><text:span text:style-name="Strong_20_Emphasis">Esquemas profesionales</text:span> (ventas, stock, facturación)</text:p>
          </text:list-item>
          <text:list-item>
            <text:p text:style-name="P77"><text:span text:style-name="Strong_20_Emphasis">Triggers avanzados</text:span> (stock, totales, facturas)</text:p>
          </text:list-item>
          <text:list-item>
            <text:p text:style-name="P77"><text:span text:style-name="Strong_20_Emphasis">Procedimientos almacenados</text:span></text:p>
          </text:list-item>
          <text:list-item>
            <text:p text:style-name="P77"><text:span text:style-name="Strong_20_Emphasis">Roles y permisos</text:span></text:p>
          </text:list-item>
          <text:list-item>
            <text:p text:style-name="P77"><text:span text:style-name="Strong_20_Emphasis">RLS por usuario</text:span></text:p>
          </text:list-item>
          <text:list-item>
            <text:p text:style-name="P77"><text:span text:style-name="Strong_20_Emphasis">RLS por rol (gerente)</text:span></text:p>
          </text:list-item>
        </text:list>
        <text:p text:style-name="Text_20_body">El siguiente paso lógico en un sistema profesional es:</text:p>
        <text:h text:style-name="Heading_20_1" text:outline-level="1">⭐ Módulo siguiente: <text:span text:style-name="Strong_20_Emphasis">RLS en tablas relacionadas (líneas de pedido)</text:span></text:h>
        <text:p text:style-name="Text_20_body">Porque ahora mismo:</text:p>
        <text:list xml:id="list1728589263" text:style-name="L77">
          <text:list-item>
            <text:p text:style-name="P78">RLS protege <text:span text:style-name="Strong_20_Emphasis">ventas.pedidos</text:span></text:p>
          </text:list-item>
          <text:list-item>
            <text:p text:style-name="P78">Pero <text:span text:style-name="Strong_20_Emphasis">ventas.lineas_pedido</text:span> sigue sin protección</text:p>
          </text:list-item>
          <text:list-item>
            <text:p text:style-name="P78">Un usuario podría ver líneas de pedidos que NO son suyos</text:p>
          </text:list-item>
          <text:list-item>
            <text:p text:style-name="P78">Esto rompe el aislamiento multi‑tenant</text:p>
          </text:list-item>
        </text:list>
        <text:p text:style-name="Text_20_body">Así que el siguiente paso natural es:</text:p>
        <text:p text:style-name="Quotations"><text:span text:style-name="Strong_20_Emphasis">Aplicar RLS a las líneas de pedido, heredando la visibilidad del pedido.</text:span></text:p>
        <text:h text:style-name="Heading_20_1" text:outline-level="1"><text:soft-page-break/>🔐 Módulo: RLS en líneas de pedido (herencia de permisos)</text:h>
        <text:h text:style-name="Heading_20_2" text:outline-level="2">🎯 Idea clave</text:h>
        <text:p text:style-name="Text_20_body">Las líneas de pedido deben ser visibles <text:span text:style-name="Strong_20_Emphasis">solo si el usuario puede ver el pedido</text:span>.</text:p>
        <text:h text:style-name="Heading_20_1" text:outline-level="1">🧱 1. Activar RLS en líneas de pedido</text:h>
        <text:p text:style-name="Text_20_body">sql</text:p>
        <text:p text:style-name="Preformatted_20_Text"><text:span text:style-name="Source_20_Text">ALTER TABLE ventas.lineas_pedido ENABLE ROW LEVEL SECURITY;</text:span></text:p>
        <text:p text:style-name="P1"><text:span text:style-name="Source_20_Text">ALTER TABLE ventas.lineas_pedido FORCE ROW LEVEL SECURITY;</text:span></text:p>
        <text:h text:style-name="Heading_20_1" text:outline-level="1">🧱 2. Política para usuarios normales</text:h>
        <text:p text:style-name="Text_20_body">sql</text:p>
        <text:p text:style-name="Preformatted_20_Text"><text:span text:style-name="Source_20_Text">CREATE POLICY lineas_por_usuario</text:span></text:p>
        <text:p text:style-name="Preformatted_20_Text"><text:span text:style-name="Source_20_Text">ON ventas.lineas_pedido</text:span></text:p>
        <text:p text:style-name="Preformatted_20_Text"><text:span text:style-name="Source_20_Text">FOR SELECT</text:span></text:p>
        <text:p text:style-name="Preformatted_20_Text"><text:span text:style-name="Source_20_Text">USING (</text:span></text:p>
        <text:p text:style-name="Preformatted_20_Text"><text:span text:style-name="Source_20_Text"><text:s text:c="4"/>pedido_id IN (</text:span></text:p>
        <text:p text:style-name="Preformatted_20_Text"><text:span text:style-name="Source_20_Text"><text:s text:c="8"/>SELECT id</text:span></text:p>
        <text:p text:style-name="Preformatted_20_Text"><text:span text:style-name="Source_20_Text"><text:s text:c="8"/>FROM ventas.pedidos</text:span></text:p>
        <text:p text:style-name="Preformatted_20_Text"><text:span text:style-name="Source_20_Text"><text:s text:c="8"/>WHERE usuario = current_user</text:span></text:p>
        <text:p text:style-name="Preformatted_20_Text"><text:span text:style-name="Source_20_Text"><text:s text:c="4"/>)</text:span></text:p>
        <text:p text:style-name="P1"><text:span text:style-name="Source_20_Text">);</text:span></text:p>
        <text:p text:style-name="Text_20_body">👉 Si el pedido es suyo → ve las líneas 👉 Si no → no ve nada</text:p>
        <text:h text:style-name="Heading_20_1" text:outline-level="1">🧱 3. Política para gerentes (ver todo)</text:h>
        <text:p text:style-name="Text_20_body">sql</text:p>
        <text:p text:style-name="Preformatted_20_Text"><text:span text:style-name="Source_20_Text">CREATE POLICY lineas_gerente</text:span></text:p>
        <text:p text:style-name="Preformatted_20_Text"><text:span text:style-name="Source_20_Text">ON ventas.lineas_pedido</text:span></text:p>
        <text:p text:style-name="Preformatted_20_Text"><text:span text:style-name="Source_20_Text">FOR SELECT</text:span></text:p>
        <text:p text:style-name="Preformatted_20_Text"><text:span text:style-name="Source_20_Text">USING (</text:span></text:p>
        <text:p text:style-name="Preformatted_20_Text"><text:span text:style-name="Source_20_Text"><text:s text:c="4"/>current_user IN (</text:span></text:p>
        <text:p text:style-name="Preformatted_20_Text"><text:span text:style-name="Source_20_Text"><text:s text:c="8"/>SELECT m.rolname</text:span></text:p>
        <text:p text:style-name="Preformatted_20_Text"><text:span text:style-name="Source_20_Text"><text:s text:c="8"/>FROM pg_roles r</text:span></text:p>
        <text:p text:style-name="Preformatted_20_Text"><text:span text:style-name="Source_20_Text"><text:s text:c="8"/>JOIN pg_auth_members am ON am.roleid = r.oid</text:span></text:p>
        <text:p text:style-name="Preformatted_20_Text"><text:span text:style-name="Source_20_Text"><text:s text:c="8"/>JOIN pg_roles m ON am.member = m.oid</text:span></text:p>
        <text:p text:style-name="Preformatted_20_Text"><text:span text:style-name="Source_20_Text"><text:s text:c="8"/>WHERE r.rolname = 'gerente'</text:span></text:p>
        <text:p text:style-name="Preformatted_20_Text"><text:span text:style-name="Source_20_Text"><text:s text:c="10"/>AND m.rolname = current_user</text:span></text:p>
        <text:p text:style-name="Preformatted_20_Text"><text:span text:style-name="Source_20_Text"><text:s text:c="4"/>)</text:span></text:p>
        <text:p text:style-name="P1"><text:span text:style-name="Source_20_Text">);</text:span></text:p>
        <text:p text:style-name="Text_20_body">👉 Si el usuario es gerente → ve todas las líneas</text:p>
        <text:h text:style-name="Heading_20_1" text:outline-level="1"><text:soft-page-break/>🧪 Prueba real</text:h>
        <text:h text:style-name="Heading_20_3" text:outline-level="3">Conectarte como user1</text:h>
        <text:p text:style-name="Text_20_body">sql</text:p>
        <text:p text:style-name="P1"><text:span text:style-name="Source_20_Text">SELECT * FROM ventas.lineas_pedido;</text:span></text:p>
        <text:p text:style-name="Text_20_body">Solo ve líneas de <text:span text:style-name="Strong_20_Emphasis">sus pedidos</text:span>.</text:p>
        <text:h text:style-name="Heading_20_3" text:outline-level="3">Conectarte como jose (gerente)</text:h>
        <text:p text:style-name="Text_20_body">sql</text:p>
        <text:p text:style-name="P1"><text:span text:style-name="Source_20_Text">SELECT * FROM ventas.lineas_pedido;</text:span></text:p>
        <text:p text:style-name="Text_20_body">Ve <text:span text:style-name="Strong_20_Emphasis">todas las líneas</text:span>.</text:p>
        <text:h text:style-name="Heading_20_1" text:outline-level="1">🧩 ¿Qué has conseguido?</text:h>
        <text:list xml:id="list4094177311" text:style-name="L78">
          <text:list-item>
            <text:p text:style-name="P79">Aislamiento completo por usuario</text:p>
          </text:list-item>
          <text:list-item>
            <text:p text:style-name="P79">Aislamiento completo por rol</text:p>
          </text:list-item>
          <text:list-item>
            <text:p text:style-name="P79">Multi‑tenant real en <text:span text:style-name="Strong_20_Emphasis">dos niveles</text:span></text:p>
          </text:list-item>
          <text:list-item>
            <text:p text:style-name="P79">Seguridad profesional en tablas relacionadas</text:p>
          </text:list-item>
          <text:list-item>
            <text:p text:style-name="P79">Sistema listo para producción</text:p>
          </text:list-item>
        </text:list>
        <text:h text:style-name="Heading_20_1" text:outline-level="1">🔜 ¿Qué módulo quieres después?</text:h>
        <text:p text:style-name="Text_20_body">Aquí tienes las rutas naturales:</text:p>
        <text:list xml:id="list1806806295" text:style-name="L79">
          <text:list-item>
            <text:p text:style-name="P80"><text:span text:style-name="Strong_20_Emphasis">Auditoría avanzada</text:span> (historial de cambios, logs, quién hizo qué)</text:p>
          </text:list-item>
          <text:list-item>
            <text:p text:style-name="P80"><text:span text:style-name="Strong_20_Emphasis">Vistas y materialized views</text:span> (informes profesionales)</text:p>
          </text:list-item>
          <text:list-item>
            <text:p text:style-name="P80"><text:span text:style-name="Strong_20_Emphasis">Optimización con EXPLAIN ANALYZE</text:span> (rendimiento real)</text:p>
          </text:list-item>
          <text:list-item>
            <text:p text:style-name="P80"><text:span text:style-name="Strong_20_Emphasis">Transacciones y bloqueos</text:span> (concurrencia profesional)</text:p>
          </text:list-item>
          <text:list-item>
            <text:p text:style-name="P80"><text:span text:style-name="Strong_20_Emphasis">Triggers de seguridad</text:span> (validaciones automáticas)</text:p>
          </text:list-item>
        </text:list>
        <text:p text:style-name="Text_20_body">Dime cuál quieres y seguimos.</text:p>
      </text:section>
      <text:section text:style-name="Sect1" text:name="EySJGTU8hxvihKD4whuPh-user-message">
        <text:p text:style-name="Standard">quiero vistas y materialized views</text:p>
      </text:section>
      <text:section text:style-name="Sect1" text:name="KazNoRy7v24pWSW5XnnFv-content-0">
        <text:p text:style-name="Text_20_body">Perfecto, Jose. Entramos en <text:span text:style-name="Strong_20_Emphasis">Vistas y Materialized Views</text:span>, uno de los módulos más útiles para informes, rendimiento y arquitectura limpia. Sigo en modo estudio: <text:span text:style-name="Strong_20_Emphasis">explicación clara</text:span>, <text:span text:style-name="Strong_20_Emphasis">profesional</text:span>, <text:span text:style-name="Strong_20_Emphasis">estructurada</text:span>, con Guided Links y ejemplos basados en tu sistema.</text:p>
        <text:h text:style-name="Heading_20_2" text:outline-level="2"><text:soft-page-break/>⭐ Qué son las vistas y por qué importan</text:h>
        <text:p text:style-name="Text_20_body">Una <text:span text:style-name="Strong_20_Emphasis">vista</text:span> es una consulta guardada como si fuera una tabla virtual. Una <text:span text:style-name="Strong_20_Emphasis">materialized view</text:span> es igual, pero <text:span text:style-name="Strong_20_Emphasis">almacena los datos físicamente</text:span> y se puede refrescar.</text:p>
        <text:h text:style-name="Heading_20_3" text:outline-level="3">Diferencias clave</text:h>
        <text:list xml:id="list642558672" text:style-name="L80">
          <text:list-item>
            <text:p text:style-name="P81">Vista → siempre calcula la consulta al momento</text:p>
          </text:list-item>
          <text:list-item>
            <text:p text:style-name="P81">Materialized view → guarda el resultado y se refresca manualmente o programado</text:p>
          </text:list-item>
          <text:list-item>
            <text:p text:style-name="P81">Vista → rápida de crear, lenta de consultar si la query es pesada</text:p>
          </text:list-item>
          <text:list-item>
            <text:p text:style-name="P81">Materialized view → pesada de refrescar, rápida de consultar</text:p>
          </text:list-item>
        </text:list>
        <text:h text:style-name="Heading_20_2" text:outline-level="2">📊 Módulo: Vistas y Materialized Views en tu sistema</text:h>
        <text:p text:style-name="Text_20_body">Vamos a crear vistas útiles para:</text:p>
        <text:list xml:id="list2810292374" text:style-name="L81">
          <text:list-item>
            <text:p text:style-name="P82">Ventas</text:p>
          </text:list-item>
          <text:list-item>
            <text:p text:style-name="P82">Facturación</text:p>
          </text:list-item>
          <text:list-item>
            <text:p text:style-name="P82">Artículos más vendidos</text:p>
          </text:list-item>
          <text:list-item>
            <text:p text:style-name="P82">Clientes top</text:p>
          </text:list-item>
          <text:list-item>
            <text:p text:style-name="P82">Pedidos por estado</text:p>
          </text:list-item>
          <text:list-item>
            <text:p text:style-name="P82">Informes diarios</text:p>
          </text:list-item>
        </text:list>
        <text:p text:style-name="Text_20_body">Y luego sus versiones <text:span text:style-name="Strong_20_Emphasis">materializadas</text:span> para rendimiento.</text:p>
        <text:h text:style-name="Heading_20_1" text:outline-level="1">🧱 1. Vista: Ventas del día</text:h>
        <text:p text:style-name="Text_20_body">sql</text:p>
        <text:p text:style-name="Preformatted_20_Text"><text:span text:style-name="Source_20_Text">CREATE OR REPLACE VIEW ventas.v_ventas_hoy AS</text:span></text:p>
        <text:p text:style-name="Preformatted_20_Text"><text:span text:style-name="Source_20_Text">SELECT p.id AS pedido,</text:span></text:p>
        <text:p text:style-name="Preformatted_20_Text"><text:span text:style-name="Source_20_Text"><text:s text:c="7"/>p.fecha_pedido,</text:span></text:p>
        <text:p text:style-name="Preformatted_20_Text"><text:span text:style-name="Source_20_Text"><text:s text:c="7"/>p.total,</text:span></text:p>
        <text:p text:style-name="Preformatted_20_Text"><text:span text:style-name="Source_20_Text"><text:s text:c="7"/>c.nombre AS cliente</text:span></text:p>
        <text:p text:style-name="Preformatted_20_Text"><text:span text:style-name="Source_20_Text">FROM ventas.pedidos p</text:span></text:p>
        <text:p text:style-name="Preformatted_20_Text"><text:span text:style-name="Source_20_Text">JOIN ventas.clientes c ON c.id = p.cliente_id</text:span></text:p>
        <text:p text:style-name="P1"><text:span text:style-name="Source_20_Text">WHERE DATE(p.fecha_pedido) = CURRENT_DATE;</text:span></text:p>
        <text:p text:style-name="Text_20_body">Uso:</text:p>
        <text:p text:style-name="Text_20_body">sql</text:p>
        <text:p text:style-name="P1"><text:span text:style-name="Source_20_Text">SELECT * FROM ventas.v_ventas_hoy;</text:span></text:p>
        <text:h text:style-name="Heading_20_1" text:outline-level="1">🧱 2. Vista: Artículos más vendidos</text:h>
        <text:p text:style-name="Text_20_body">sql</text:p>
        <text:p text:style-name="Preformatted_20_Text"><text:soft-page-break/><text:span text:style-name="Source_20_Text">CREATE OR REPLACE VIEW ventas.v_articulos_top AS</text:span></text:p>
        <text:p text:style-name="Preformatted_20_Text"><text:span text:style-name="Source_20_Text">SELECT a.nombre,</text:span></text:p>
        <text:p text:style-name="Preformatted_20_Text"><text:span text:style-name="Source_20_Text"><text:s text:c="7"/>SUM(lp.cantidad) AS unidades,</text:span></text:p>
        <text:p text:style-name="Preformatted_20_Text"><text:span text:style-name="Source_20_Text"><text:s text:c="7"/>SUM(lp.cantidad * lp.precio_unitario) AS ingresos</text:span></text:p>
        <text:p text:style-name="Preformatted_20_Text"><text:span text:style-name="Source_20_Text">FROM ventas.lineas_pedido lp</text:span></text:p>
        <text:p text:style-name="Preformatted_20_Text"><text:span text:style-name="Source_20_Text">JOIN stock.articulos a ON a.id = lp.articulo_id</text:span></text:p>
        <text:p text:style-name="Preformatted_20_Text"><text:span text:style-name="Source_20_Text">GROUP BY a.nombre</text:span></text:p>
        <text:p text:style-name="P1"><text:span text:style-name="Source_20_Text">ORDER BY unidades DESC;</text:span></text:p>
        <text:h text:style-name="Heading_20_1" text:outline-level="1">🧱 3. Vista: Clientes con más compras</text:h>
        <text:p text:style-name="Text_20_body">sql</text:p>
        <text:p text:style-name="Preformatted_20_Text"><text:span text:style-name="Source_20_Text">CREATE OR REPLACE VIEW ventas.v_clientes_top AS</text:span></text:p>
        <text:p text:style-name="Preformatted_20_Text"><text:span text:style-name="Source_20_Text">SELECT c.nombre,</text:span></text:p>
        <text:p text:style-name="Preformatted_20_Text"><text:span text:style-name="Source_20_Text"><text:s text:c="7"/>COUNT(p.id) AS num_pedidos,</text:span></text:p>
        <text:p text:style-name="Preformatted_20_Text"><text:span text:style-name="Source_20_Text"><text:s text:c="7"/>SUM(p.total) AS total_gastado</text:span></text:p>
        <text:p text:style-name="Preformatted_20_Text"><text:span text:style-name="Source_20_Text">FROM ventas.clientes c</text:span></text:p>
        <text:p text:style-name="Preformatted_20_Text"><text:span text:style-name="Source_20_Text">JOIN ventas.pedidos p ON p.cliente_id = c.id</text:span></text:p>
        <text:p text:style-name="Preformatted_20_Text"><text:span text:style-name="Source_20_Text">GROUP BY c.nombre</text:span></text:p>
        <text:p text:style-name="P1"><text:span text:style-name="Source_20_Text">ORDER BY total_gastado DESC;</text:span></text:p>
        <text:h text:style-name="Heading_20_1" text:outline-level="1">🧱 4. Vista: Pedidos por estado</text:h>
        <text:p text:style-name="Text_20_body">sql</text:p>
        <text:p text:style-name="Preformatted_20_Text"><text:span text:style-name="Source_20_Text">CREATE OR REPLACE VIEW ventas.v_pedidos_estado AS</text:span></text:p>
        <text:p text:style-name="Preformatted_20_Text"><text:span text:style-name="Source_20_Text">SELECT estado,</text:span></text:p>
        <text:p text:style-name="Preformatted_20_Text"><text:span text:style-name="Source_20_Text"><text:s text:c="7"/>COUNT(*) AS cantidad</text:span></text:p>
        <text:p text:style-name="Preformatted_20_Text"><text:span text:style-name="Source_20_Text">FROM ventas.pedidos</text:span></text:p>
        <text:p text:style-name="P1"><text:span text:style-name="Source_20_Text">GROUP BY estado;</text:span></text:p>
        <text:h text:style-name="Heading_20_1" text:outline-level="1">🧱 5. Vista: Facturación completa</text:h>
        <text:p text:style-name="Text_20_body">sql</text:p>
        <text:p text:style-name="Preformatted_20_Text"><text:span text:style-name="Source_20_Text">CREATE OR REPLACE VIEW facturacion.v_facturas_detalle AS</text:span></text:p>
        <text:p text:style-name="Preformatted_20_Text"><text:span text:style-name="Source_20_Text">SELECT f.id AS factura,</text:span></text:p>
        <text:p text:style-name="Preformatted_20_Text"><text:span text:style-name="Source_20_Text"><text:s text:c="7"/>f.fecha,</text:span></text:p>
        <text:p text:style-name="Preformatted_20_Text"><text:span text:style-name="Source_20_Text"><text:s text:c="7"/>f.total,</text:span></text:p>
        <text:p text:style-name="Preformatted_20_Text"><text:span text:style-name="Source_20_Text"><text:s text:c="7"/>c.nombre AS cliente,</text:span></text:p>
        <text:p text:style-name="Preformatted_20_Text"><text:span text:style-name="Source_20_Text"><text:s text:c="7"/>p.id AS pedido</text:span></text:p>
        <text:p text:style-name="Preformatted_20_Text"><text:span text:style-name="Source_20_Text">FROM facturacion.facturas f</text:span></text:p>
        <text:p text:style-name="Preformatted_20_Text"><text:span text:style-name="Source_20_Text">JOIN ventas.pedidos p ON p.id = f.pedido_id</text:span></text:p>
        <text:p text:style-name="P1"><text:span text:style-name="Source_20_Text">JOIN ventas.clientes c ON c.id = p.cliente_id;</text:span></text:p>
        <text:h text:style-name="Heading_20_1" text:outline-level="1">🧱 6. Materialized View: Artículos más vendidos (versión rápida)</text:h>
        <text:p text:style-name="Text_20_body">sql</text:p>
        <text:p text:style-name="Preformatted_20_Text"><text:span text:style-name="Source_20_Text">CREATE MATERIALIZED VIEW ventas.mv_articulos_top AS</text:span></text:p>
        <text:p text:style-name="Preformatted_20_Text"><text:span text:style-name="Source_20_Text">SELECT a.nombre,</text:span></text:p>
        <text:p text:style-name="Preformatted_20_Text"><text:soft-page-break/><text:span text:style-name="Source_20_Text"><text:s text:c="7"/>SUM(lp.cantidad) AS unidades,</text:span></text:p>
        <text:p text:style-name="Preformatted_20_Text"><text:span text:style-name="Source_20_Text"><text:s text:c="7"/>SUM(lp.cantidad * lp.precio_unitario) AS ingresos</text:span></text:p>
        <text:p text:style-name="Preformatted_20_Text"><text:span text:style-name="Source_20_Text">FROM ventas.lineas_pedido lp</text:span></text:p>
        <text:p text:style-name="Preformatted_20_Text"><text:span text:style-name="Source_20_Text">JOIN stock.articulos a ON a.id = lp.articulo_id</text:span></text:p>
        <text:p text:style-name="P1"><text:span text:style-name="Source_20_Text">GROUP BY a.nombre;</text:span></text:p>
        <text:h text:style-name="Heading_20_3" text:outline-level="3">Refrescar:</text:h>
        <text:p text:style-name="Text_20_body">sql</text:p>
        <text:p text:style-name="P1"><text:span text:style-name="Source_20_Text">REFRESH MATERIALIZED VIEW ventas.mv_articulos_top;</text:span></text:p>
        <text:h text:style-name="Heading_20_1" text:outline-level="1">🧱 7. Materialized View: Facturación mensual</text:h>
        <text:p text:style-name="Text_20_body">sql</text:p>
        <text:p text:style-name="Preformatted_20_Text"><text:span text:style-name="Source_20_Text">CREATE MATERIALIZED VIEW facturacion.mv_facturacion_mensual AS</text:span></text:p>
        <text:p text:style-name="Preformatted_20_Text"><text:span text:style-name="Source_20_Text">SELECT DATE_TRUNC('month', fecha) AS mes,</text:span></text:p>
        <text:p text:style-name="Preformatted_20_Text"><text:span text:style-name="Source_20_Text"><text:s text:c="7"/>SUM(total) AS total_mes</text:span></text:p>
        <text:p text:style-name="Preformatted_20_Text"><text:span text:style-name="Source_20_Text">FROM facturacion.facturas</text:span></text:p>
        <text:p text:style-name="P1"><text:span text:style-name="Source_20_Text">GROUP BY DATE_TRUNC('month', fecha);</text:span></text:p>
        <text:p text:style-name="Text_20_body">Refrescar:</text:p>
        <text:p text:style-name="Text_20_body">sql</text:p>
        <text:p text:style-name="P1"><text:span text:style-name="Source_20_Text">REFRESH MATERIALIZED VIEW facturacion.mv_facturacion_mensual;</text:span></text:p>
        <text:h text:style-name="Heading_20_1" text:outline-level="1">🧩 ¿Qué has aprendido?</text:h>
        <text:list xml:id="list3449981180" text:style-name="L82">
          <text:list-item>
            <text:p text:style-name="P83">Cómo crear vistas para informes profesionales</text:p>
          </text:list-item>
          <text:list-item>
            <text:p text:style-name="P83">Cómo crear materialized views para acelerar consultas pesadas</text:p>
          </text:list-item>
          <text:list-item>
            <text:p text:style-name="P83">Cómo refrescar vistas materializadas</text:p>
          </text:list-item>
          <text:list-item>
            <text:p text:style-name="P83">Cómo estructurar informes de ventas, clientes y facturación</text:p>
          </text:list-item>
          <text:list-item>
            <text:p text:style-name="P83">Cómo separar lógica de negocio de consultas complejas</text:p>
          </text:list-item>
        </text:list>
        <text:p text:style-name="Text_20_body">Tu sistema ahora tiene <text:span text:style-name="Strong_20_Emphasis">informes profesionales</text:span>, como un ERP real.</text:p>
        <text:h text:style-name="Heading_20_1" text:outline-level="1">🔜 Siguiente paso del tutorial</text:h>
        <text:p text:style-name="Text_20_body">El módulo que sigue de forma natural es:</text:p>
        <text:h text:style-name="Heading_20_3" text:outline-level="3"><text:span text:style-name="Strong_20_Emphasis">Optimización y EXPLAIN ANALYZE</text:span></text:h>
        <text:p text:style-name="Text_20_body">Porque ahora que tienes vistas y materialized views, toca:</text:p>
        <text:list xml:id="list1886759233" text:style-name="L83">
          <text:list-item>
            <text:p text:style-name="P84">medir rendimiento</text:p>
          </text:list-item>
          <text:list-item>
            <text:p text:style-name="P84">detectar consultas lentas</text:p>
          </text:list-item>
          <text:list-item>
            <text:p text:style-name="P84">optimizar índices</text:p>
          </text:list-item>
          <text:list-item>
            <text:p text:style-name="P84"><text:soft-page-break/>analizar planes de ejecución</text:p>
          </text:list-item>
          <text:list-item>
            <text:p text:style-name="P84">mejorar tiempos de respuesta</text:p>
          </text:list-item>
        </text:list>
        <text:p text:style-name="Text_20_body">Si quieres seguir, dime:</text:p>
        <text:p text:style-name="Text_20_body"><text:span text:style-name="Strong_20_Emphasis">Quiero optimización y EXPLAIN ANALYZE</text:span></text:p>
      </text:section>
      <text:h text:style-name="Heading_20_1" text:outline-level="1">⭐ Optimización y EXPLAIN ANALYZE</text:h>
      <text:section text:style-name="Sect1" text:name="DZuxgkttDNaeRxzDKSAW4-content-0">
        <text:p text:style-name="Text_20_body">(El módulo que sigue naturalmente después de vistas y materialized views)</text:p>
        <text:p text:style-name="Text_20_body">Este módulo es clave para que tu base de datos <text:span text:style-name="Strong_20_Emphasis">vuele</text:span>. Aquí aprenderás a:</text:p>
        <text:list xml:id="list2290565628" text:style-name="L84">
          <text:list-item>
            <text:p text:style-name="P85">detectar consultas lentas</text:p>
          </text:list-item>
          <text:list-item>
            <text:p text:style-name="P85">entender el plan de ejecución</text:p>
          </text:list-item>
          <text:list-item>
            <text:p text:style-name="P85">optimizar índices</text:p>
          </text:list-item>
          <text:list-item>
            <text:p text:style-name="P85">mejorar vistas y materialized views</text:p>
          </text:list-item>
          <text:list-item>
            <text:p text:style-name="P85">evitar secuencias de operaciones costosas</text:p>
          </text:list-item>
        </text:list>
        <text:p text:style-name="Text_20_body">Y lo haremos <text:span text:style-name="Strong_20_Emphasis">sobre tu propio esquema</text:span> (ventas, stock, facturación).</text:p>
        <text:h text:style-name="Heading_20_1" text:outline-level="1">🚀 MÓDULO: Optimización y EXPLAIN ANALYZE</text:h>
        <text:h text:style-name="Heading_20_2" text:outline-level="2">🎯 Idea clave</text:h>
        <text:p text:style-name="Text_20_body"><text:span text:style-name="Source_20_Text">EXPLAIN ANALYZE</text:span> te muestra <text:span text:style-name="Strong_20_Emphasis">cómo PostgreSQL ejecuta una consulta</text:span>, cuánto tarda cada paso y dónde está el cuello de botella.</text:p>
        <text:h text:style-name="Heading_20_1" text:outline-level="1">🧱 1. Tu primera prueba con EXPLAIN ANALYZE</text:h>
        <text:p text:style-name="Text_20_body">Vamos a analizar una consulta real de tu sistema:</text:p>
        <text:p text:style-name="Text_20_body">sql</text:p>
        <text:p text:style-name="Preformatted_20_Text"><text:span text:style-name="Source_20_Text">EXPLAIN ANALYZE</text:span></text:p>
        <text:p text:style-name="Preformatted_20_Text"><text:span text:style-name="Source_20_Text">SELECT a.nombre,</text:span></text:p>
        <text:p text:style-name="Preformatted_20_Text"><text:span text:style-name="Source_20_Text"><text:s text:c="7"/>SUM(lp.cantidad) AS unidades</text:span></text:p>
        <text:p text:style-name="Preformatted_20_Text"><text:span text:style-name="Source_20_Text">FROM ventas.lineas_pedido lp</text:span></text:p>
        <text:p text:style-name="Preformatted_20_Text"><text:span text:style-name="Source_20_Text">JOIN stock.articulos a ON a.id = lp.articulo_id</text:span></text:p>
        <text:p text:style-name="P1"><text:span text:style-name="Source_20_Text">GROUP BY a.nombre;</text:span></text:p>
        <text:p text:style-name="Text_20_body">Esto te mostrará:</text:p>
        <text:list xml:id="list3242855150" text:style-name="L85">
          <text:list-item>
            <text:p text:style-name="P86">si usa índices</text:p>
          </text:list-item>
          <text:list-item>
            <text:p text:style-name="P86"><text:soft-page-break/>si hace secuencias completas (sequential scan)</text:p>
          </text:list-item>
          <text:list-item>
            <text:p text:style-name="P86">si hace hash join o merge join</text:p>
          </text:list-item>
          <text:list-item>
            <text:p text:style-name="P86">el coste estimado vs real</text:p>
          </text:list-item>
          <text:list-item>
            <text:p text:style-name="P86">el tiempo total</text:p>
          </text:list-item>
        </text:list>
        <text:h text:style-name="Heading_20_1" text:outline-level="1">🧱 2. Interpretar el resultado (versión profesional)</text:h>
        <text:p text:style-name="Text_20_body">Cuando veas algo como:</text:p>
        <text:p text:style-name="Text_20_body">Código</text:p>
        <text:p text:style-name="P1"><text:span text:style-name="Source_20_Text">Seq Scan on ventas.lineas_pedido</text:span></text:p>
        <text:p text:style-name="Text_20_body">Significa:</text:p>
        <text:p text:style-name="Text_20_body">👉 Está leyendo <text:span text:style-name="Strong_20_Emphasis">toda la tabla</text:span> 👉 Puede ser lento si crece mucho 👉 Necesita un índice</text:p>
        <text:p text:style-name="Text_20_body">Si ves:</text:p>
        <text:p text:style-name="Text_20_body">Código</text:p>
        <text:p text:style-name="P1"><text:span text:style-name="Source_20_Text">Hash Join</text:span></text:p>
        <text:p text:style-name="Text_20_body">👉 Es bueno para tablas medianas 👉 PostgreSQL está usando memoria para acelerar la unión</text:p>
        <text:p text:style-name="Text_20_body">Si ves:</text:p>
        <text:p text:style-name="Text_20_body">Código</text:p>
        <text:p text:style-name="P1"><text:span text:style-name="Source_20_Text">Index Scan</text:span></text:p>
        <text:p text:style-name="Text_20_body">👉 Está usando un índice 👉 Es lo ideal para consultas selectivas</text:p>
        <text:h text:style-name="Heading_20_1" text:outline-level="1">🧱 3. Crear índices inteligentes</text:h>
        <text:h text:style-name="Heading_20_3" text:outline-level="3">Índice para acelerar JOINs:</text:h>
        <text:p text:style-name="Text_20_body">sql</text:p>
        <text:p text:style-name="Preformatted_20_Text"><text:span text:style-name="Source_20_Text">CREATE INDEX idx_lineas_articulo</text:span></text:p>
        <text:p text:style-name="P1"><text:span text:style-name="Source_20_Text">ON ventas.lineas_pedido (articulo_id);</text:span></text:p>
        <text:h text:style-name="Heading_20_3" text:outline-level="3">Índice para acelerar búsquedas por cliente:</text:h>
        <text:p text:style-name="Text_20_body">sql</text:p>
        <text:p text:style-name="Preformatted_20_Text"><text:span text:style-name="Source_20_Text">CREATE INDEX idx_pedidos_cliente</text:span></text:p>
        <text:p text:style-name="P1"><text:span text:style-name="Source_20_Text">ON ventas.pedidos (cliente_id);</text:span></text:p>
        <text:h text:style-name="Heading_20_3" text:outline-level="3"><text:soft-page-break/>Índice para acelerar facturación:</text:h>
        <text:p text:style-name="Text_20_body">sql</text:p>
        <text:p text:style-name="Preformatted_20_Text"><text:span text:style-name="Source_20_Text">CREATE INDEX idx_facturas_fecha</text:span></text:p>
        <text:p text:style-name="P1"><text:span text:style-name="Source_20_Text">ON facturacion.facturas (fecha);</text:span></text:p>
        <text:h text:style-name="Heading_20_1" text:outline-level="1">🧱 4. Optimizar vistas</text:h>
        <text:p text:style-name="Text_20_body">Tu vista de artículos top:</text:p>
        <text:p text:style-name="Text_20_body">sql</text:p>
        <text:p text:style-name="Preformatted_20_Text"><text:span text:style-name="Source_20_Text">CREATE OR REPLACE VIEW ventas.v_articulos_top AS</text:span></text:p>
        <text:p text:style-name="Preformatted_20_Text"><text:span text:style-name="Source_20_Text">SELECT a.nombre,</text:span></text:p>
        <text:p text:style-name="Preformatted_20_Text"><text:span text:style-name="Source_20_Text"><text:s text:c="7"/>SUM(lp.cantidad) AS unidades</text:span></text:p>
        <text:p text:style-name="Preformatted_20_Text"><text:span text:style-name="Source_20_Text">FROM ventas.lineas_pedido lp</text:span></text:p>
        <text:p text:style-name="Preformatted_20_Text"><text:span text:style-name="Source_20_Text">JOIN stock.articulos a ON a.id = lp.articulo_id</text:span></text:p>
        <text:p text:style-name="P1"><text:span text:style-name="Source_20_Text">GROUP BY a.nombre;</text:span></text:p>
        <text:p text:style-name="Text_20_body">Puede acelerarse con:</text:p>
        <text:list xml:id="list3340199033" text:style-name="L86">
          <text:list-item>
            <text:p text:style-name="P87">índice en <text:span text:style-name="Source_20_Text">lineas_pedido.articulo_id</text:span></text:p>
          </text:list-item>
          <text:list-item>
            <text:p text:style-name="P87">índice en <text:span text:style-name="Source_20_Text">lineas_pedido.cantidad</text:span> (si haces filtros)</text:p>
          </text:list-item>
          <text:list-item>
            <text:p text:style-name="P87">materialized view si la consulta es muy pesada</text:p>
          </text:list-item>
        </text:list>
        <text:h text:style-name="Heading_20_1" text:outline-level="1">🧱 5. Optimizar materialized views</text:h>
        <text:p text:style-name="Text_20_body">Tu MV:</text:p>
        <text:p text:style-name="Text_20_body">sql</text:p>
        <text:p text:style-name="Preformatted_20_Text"><text:span text:style-name="Source_20_Text">CREATE MATERIALIZED VIEW ventas.mv_articulos_top AS</text:span></text:p>
        <text:p text:style-name="Preformatted_20_Text"><text:span text:style-name="Source_20_Text">SELECT a.nombre,</text:span></text:p>
        <text:p text:style-name="Preformatted_20_Text"><text:span text:style-name="Source_20_Text"><text:s text:c="7"/>SUM(lp.cantidad) AS unidades</text:span></text:p>
        <text:p text:style-name="Preformatted_20_Text"><text:span text:style-name="Source_20_Text">FROM ventas.lineas_pedido lp</text:span></text:p>
        <text:p text:style-name="Preformatted_20_Text"><text:span text:style-name="Source_20_Text">JOIN stock.articulos a ON a.id = lp.articulo_id</text:span></text:p>
        <text:p text:style-name="P1"><text:span text:style-name="Source_20_Text">GROUP BY a.nombre;</text:span></text:p>
        <text:h text:style-name="Heading_20_3" text:outline-level="3">Refrescarla rápido:</text:h>
        <text:p text:style-name="Text_20_body">sql</text:p>
        <text:p text:style-name="P1"><text:span text:style-name="Source_20_Text">REFRESH MATERIALIZED VIEW CONCURRENTLY ventas.mv_articulos_top;</text:span></text:p>
        <text:p text:style-name="Text_20_body">👉 No bloquea lecturas 👉 Requiere índice único en la MV</text:p>
        <text:h text:style-name="Heading_20_1" text:outline-level="1">🧱 6. Detectar consultas lentas automáticamente</text:h>
        <text:p text:style-name="Text_20_body">Activar el log de consultas lentas:</text:p>
        <text:p text:style-name="Text_20_body"><text:soft-page-break/>sql</text:p>
        <text:p text:style-name="P1"><text:span text:style-name="Source_20_Text">SET log_min_duration_statement = 200; -- ms</text:span></text:p>
        <text:p text:style-name="Text_20_body">👉 Todo lo que tarde más de 200 ms se registra 👉 Ideal para producción</text:p>
        <text:h text:style-name="Heading_20_1" text:outline-level="1">🧩 ¿Qué has aprendido?</text:h>
        <text:list xml:id="list712570788" text:style-name="L87">
          <text:list-item>
            <text:p text:style-name="P88">Cómo usar <text:span text:style-name="Source_20_Text">EXPLAIN ANALYZE</text:span> como un profesional</text:p>
          </text:list-item>
          <text:list-item>
            <text:p text:style-name="P88">Cómo interpretar planes de ejecución</text:p>
          </text:list-item>
          <text:list-item>
            <text:p text:style-name="P88">Cómo crear índices que realmente aceleran tu sistema</text:p>
          </text:list-item>
          <text:list-item>
            <text:p text:style-name="P88">Cómo optimizar vistas y materialized views</text:p>
          </text:list-item>
          <text:list-item>
            <text:p text:style-name="P88">Cómo detectar consultas lentas automáticamente</text:p>
          </text:list-item>
        </text:list>
        <text:p text:style-name="Text_20_body">Tu base de datos ahora está lista para <text:span text:style-name="Strong_20_Emphasis">escalar</text:span>.</text:p>
        <text:h text:style-name="Heading_20_1" text:outline-level="1">🔜 Siguiente módulo del tutorial</text:h>
        <text:p text:style-name="Text_20_body">El siguiente paso natural es:</text:p>
        <text:h text:style-name="Heading_20_3" text:outline-level="3"><text:span text:style-name="Strong_20_Emphasis">Transacciones, bloqueos y concurrencia</text:span></text:h>
        <text:p text:style-name="Text_20_body">Porque ahora que tu sistema es rápido, toca hacerlo <text:span text:style-name="Strong_20_Emphasis">seguro</text:span> cuando varios usuarios trabajan a la vez.</text:p>
        <text:p text:style-name="Text_20_body">Si quieres seguir, dime:</text:p>
        <text:p text:style-name="Text_20_body"><text:span text:style-name="Strong_20_Emphasis">Quiero transacciones y bloqueos</text:span></text:p>
        <text:p text:style-name="Text_20_body">O elige otra ruta:</text:p>
        <text:list xml:id="list3714485338" text:style-name="L88">
          <text:list-item>
            <text:p text:style-name="P89">auditoría avanzada</text:p>
          </text:list-item>
          <text:list-item>
            <text:p text:style-name="P89">triggers de seguridad</text:p>
          </text:list-item>
          <text:list-item>
            <text:p text:style-name="P89">optimización avanzada</text:p>
          </text:list-item>
        </text:list>
      </text:section>
      <text:section text:style-name="Sect1" text:name="qF86KQNcsAuyK5iuJWhL4-user-message">
        <text:p text:style-name="Standard">Quiero transacciones y bloqueos</text:p>
      </text:section>
      <text:section text:style-name="Sect1" text:name="fC3bwPPrvCDs5rF1V26Ro-content-0">
        <text:p text:style-name="Text_20_body">Perfecto, Jose. Entramos en uno de los módulos <text:span text:style-name="Strong_20_Emphasis">más importantes para sistemas reales</text:span>:</text:p>
        <text:h text:style-name="Heading_20_1" text:outline-level="1">⚡ Transacciones y bloqueos (concurrencia profesional)</text:h>
        <text:p text:style-name="Text_20_body">Este módulo te enseña cómo PostgreSQL <text:span text:style-name="Strong_20_Emphasis">protege tus datos cuando varios usuarios trabajan a la vez</text:span>, cómo evitar corrupción, cómo manejar bloqueos y cómo diagnosticar problemas de concurrencia.</text:p>
        <text:p text:style-name="Text_20_body">Sigo en modo estudio: <text:span text:style-name="Strong_20_Emphasis">explicación clara</text:span>, <text:span text:style-name="Strong_20_Emphasis">profesional</text:span>, <text:span text:style-name="Strong_20_Emphasis">paso a paso</text:span>, con Guided Links para profundizar.</text:p>
        <text:h text:style-name="Heading_20_2" text:outline-level="2"><text:soft-page-break/>🎯 Idea clave</text:h>
        <text:p text:style-name="Text_20_body">Una <text:span text:style-name="Strong_20_Emphasis">transacción</text:span> es un bloque de operaciones que deben ejecutarse <text:span text:style-name="Strong_20_Emphasis">todas o ninguna</text:span>. Los <text:span text:style-name="Strong_20_Emphasis">bloqueos</text:span> son mecanismos que PostgreSQL usa para evitar que dos usuarios modifiquen el mismo dato al mismo tiempo.</text:p>
        <text:h text:style-name="Heading_20_1" text:outline-level="1">🧱 1. Transacciones básicas</text:h>
        <text:p text:style-name="Text_20_body">Toda transacción empieza con:</text:p>
        <text:p text:style-name="Text_20_body">sql</text:p>
        <text:p text:style-name="P1"><text:span text:style-name="Source_20_Text">BEGIN;</text:span></text:p>
        <text:p text:style-name="Text_20_body">Y termina con:</text:p>
        <text:p text:style-name="Text_20_body">sql</text:p>
        <text:p text:style-name="P1"><text:span text:style-name="Source_20_Text">COMMIT;</text:span></text:p>
        <text:p text:style-name="Text_20_body">Si algo falla:</text:p>
        <text:p text:style-name="Text_20_body">sql</text:p>
        <text:p text:style-name="P1"><text:span text:style-name="Source_20_Text">ROLLBACK;</text:span></text:p>
        <text:h text:style-name="Heading_20_2" text:outline-level="2">🧪 Ejemplo real: crear pedido + líneas</text:h>
        <text:p text:style-name="Text_20_body">sql</text:p>
        <text:p text:style-name="Preformatted_20_Text"><text:span text:style-name="Source_20_Text">BEGIN;</text:span></text:p>
        <text:p text:style-name="Preformatted_20_Text"/>
        <text:p text:style-name="Preformatted_20_Text"><text:span text:style-name="Source_20_Text">INSERT INTO ventas.pedidos (cliente_id, estado)</text:span></text:p>
        <text:p text:style-name="Preformatted_20_Text"><text:span text:style-name="Source_20_Text">VALUES (1, 'pendiente')</text:span></text:p>
        <text:p text:style-name="Preformatted_20_Text"><text:span text:style-name="Source_20_Text">RETURNING id INTO pedido_id;</text:span></text:p>
        <text:p text:style-name="Preformatted_20_Text"/>
        <text:p text:style-name="Preformatted_20_Text"><text:span text:style-name="Source_20_Text">INSERT INTO ventas.lineas_pedido (pedido_id, articulo_id, cantidad, precio_unitario)</text:span></text:p>
        <text:p text:style-name="Preformatted_20_Text"><text:span text:style-name="Source_20_Text">VALUES (pedido_id, 1, 2, 999.00);</text:span></text:p>
        <text:p text:style-name="Preformatted_20_Text"/>
        <text:p text:style-name="P1"><text:span text:style-name="Source_20_Text">COMMIT;</text:span></text:p>
        <text:p text:style-name="Text_20_body">👉 Si falla la segunda inserción, <text:span text:style-name="Strong_20_Emphasis">no se crea el pedido</text:span>. 👉 Garantiza integridad total.</text:p>
        <text:h text:style-name="Heading_20_1" text:outline-level="1">🧱 2. Tipos de bloqueos (lo que realmente importa)</text:h>
        <text:p text:style-name="Text_20_body">PostgreSQL usa varios tipos de locks. Los más importantes:</text:p>
        <text:h text:style-name="Heading_20_3" text:outline-level="3">🔒 Row-level lock (bloqueo de fila)</text:h>
        <text:p text:style-name="Text_20_body">Se activa cuando haces:</text:p>
        <text:p text:style-name="Text_20_body">sql</text:p>
        <text:p text:style-name="P1"><text:soft-page-break/><text:span text:style-name="Source_20_Text">SELECT * FROM ventas.pedidos WHERE id = 10 FOR UPDATE;</text:span></text:p>
        <text:p text:style-name="Text_20_body">Esto bloquea <text:span text:style-name="Strong_20_Emphasis">solo esa fila</text:span>, no la tabla.</text:p>
        <text:h text:style-name="Heading_20_3" text:outline-level="3">🔒 Table-level lock (bloqueo de tabla)</text:h>
        <text:p text:style-name="Text_20_body">Se activa con operaciones como:</text:p>
        <text:list xml:id="list368152904" text:style-name="L89">
          <text:list-item>
            <text:p text:style-name="P90"><text:span text:style-name="Source_20_Text">ALTER TABLE</text:span></text:p>
          </text:list-item>
          <text:list-item>
            <text:p text:style-name="P90"><text:span text:style-name="Source_20_Text">DROP TABLE</text:span></text:p>
          </text:list-item>
          <text:list-item>
            <text:p text:style-name="P90"><text:span text:style-name="Source_20_Text">VACUUM FULL</text:span></text:p>
          </text:list-item>
        </text:list>
        <text:h text:style-name="Heading_20_1" text:outline-level="1">🧱 3. FOR UPDATE y FOR SHARE</text:h>
        <text:h text:style-name="Heading_20_3" text:outline-level="3">FOR UPDATE</text:h>
        <text:p text:style-name="Text_20_body">Bloquea la fila para que <text:span text:style-name="Strong_20_Emphasis">nadie más pueda modificarla</text:span>.</text:p>
        <text:p text:style-name="Text_20_body">sql</text:p>
        <text:p text:style-name="P1"><text:span text:style-name="Source_20_Text">SELECT * FROM ventas.pedidos WHERE id = 10 FOR UPDATE;</text:span></text:p>
        <text:h text:style-name="Heading_20_3" text:outline-level="3">FOR SHARE</text:h>
        <text:p text:style-name="Text_20_body">Permite leer, pero no modificar.</text:p>
        <text:p text:style-name="Text_20_body">sql</text:p>
        <text:p text:style-name="P1"><text:span text:style-name="Source_20_Text">SELECT * FROM ventas.pedidos WHERE id = 10 FOR SHARE;</text:span></text:p>
        <text:h text:style-name="Heading_20_1" text:outline-level="1">🧱 4. Deadlocks (cuando dos transacciones se bloquean mutuamente)</text:h>
        <text:p text:style-name="Text_20_body">Ejemplo clásico:</text:p>
        <text:list xml:id="list2001231541" text:style-name="L90">
          <text:list-item>
            <text:p text:style-name="P91">Transacción A bloquea pedido 1</text:p>
          </text:list-item>
          <text:list-item>
            <text:p text:style-name="P91">Transacción B bloquea pedido 2</text:p>
          </text:list-item>
          <text:list-item>
            <text:p text:style-name="P91">A intenta bloquear pedido 2</text:p>
          </text:list-item>
          <text:list-item>
            <text:p text:style-name="P91">B intenta bloquear pedido 1</text:p>
          </text:list-item>
        </text:list>
        <text:p text:style-name="Text_20_body">Resultado: <text:span text:style-name="Strong_20_Emphasis">deadlock</text:span>.</text:p>
        <text:p text:style-name="Text_20_body">PostgreSQL lo detecta y aborta una de las transacciones.</text:p>
        <text:h text:style-name="Heading_20_1" text:outline-level="1">🧱 5. Ver bloqueos en tiempo real</text:h>
        <text:p text:style-name="Text_20_body">sql</text:p>
        <text:p text:style-name="P1"><text:span text:style-name="Source_20_Text">SELECT * FROM pg_locks;</text:span></text:p>
        <text:p text:style-name="Text_20_body"><text:soft-page-break/>Y para ver qué proceso está bloqueando:</text:p>
        <text:p text:style-name="Text_20_body">sql</text:p>
        <text:p text:style-name="Preformatted_20_Text"><text:span text:style-name="Source_20_Text">SELECT</text:span></text:p>
        <text:p text:style-name="Preformatted_20_Text"><text:span text:style-name="Source_20_Text"><text:s text:c="4"/>pid,</text:span></text:p>
        <text:p text:style-name="Preformatted_20_Text"><text:span text:style-name="Source_20_Text"><text:s text:c="4"/>usename,</text:span></text:p>
        <text:p text:style-name="Preformatted_20_Text"><text:span text:style-name="Source_20_Text"><text:s text:c="4"/>application_name,</text:span></text:p>
        <text:p text:style-name="Preformatted_20_Text"><text:span text:style-name="Source_20_Text"><text:s text:c="4"/>state,</text:span></text:p>
        <text:p text:style-name="Preformatted_20_Text"><text:span text:style-name="Source_20_Text"><text:s text:c="4"/>query</text:span></text:p>
        <text:p text:style-name="P1"><text:span text:style-name="Source_20_Text">FROM pg_stat_activity;</text:span></text:p>
      </text:section>
      <text:section text:style-name="Sect1" text:name="fC3bwPPrvCDs5rF1V26Ro-content-1">
        <text:p text:style-name="Standard"/>
      </text:section>
      <text:section text:style-name="Sect1" text:name="fC3bwPPrvCDs5rF1V26Ro-content-2">
        <text:h text:style-name="Heading_20_1" text:outline-level="1">🧱 6. Nivel de aislamiento de transacciones</text:h>
        <text:p text:style-name="Text_20_body">PostgreSQL soporta:</text:p>
        <text:list xml:id="list1145352112" text:style-name="L91">
          <text:list-item>
            <text:p text:style-name="P92"><text:span text:style-name="Strong_20_Emphasis">READ COMMITTED</text:span> (por defecto)</text:p>
          </text:list-item>
          <text:list-item>
            <text:p text:style-name="P92"><text:span text:style-name="Strong_20_Emphasis">REPEATABLE READ</text:span></text:p>
          </text:list-item>
          <text:list-item>
            <text:p text:style-name="P92"><text:span text:style-name="Strong_20_Emphasis">SERIALIZABLE</text:span> (máxima seguridad)</text:p>
          </text:list-item>
        </text:list>
        <text:p text:style-name="Text_20_body">Ejemplo:</text:p>
        <text:p text:style-name="Text_20_body">sql</text:p>
        <text:p text:style-name="P1"><text:span text:style-name="Source_20_Text">SET TRANSACTION ISOLATION LEVEL SERIALIZABLE;</text:span></text:p>
        <text:h text:style-name="Heading_20_1" text:outline-level="1">🧱 7. Optimización de concurrencia</text:h>
        <text:h text:style-name="Heading_20_3" text:outline-level="3">Evitar bloqueos largos</text:h>
        <text:p text:style-name="Text_20_body">Nunca hagas:</text:p>
        <text:p text:style-name="Text_20_body">sql</text:p>
        <text:p text:style-name="Preformatted_20_Text"><text:span text:style-name="Source_20_Text">BEGIN;</text:span></text:p>
        <text:p text:style-name="Preformatted_20_Text"><text:span text:style-name="Source_20_Text">-- 20 operaciones lentas</text:span></text:p>
        <text:p text:style-name="Preformatted_20_Text"><text:span text:style-name="Source_20_Text">-- consultas pesadas</text:span></text:p>
        <text:p text:style-name="Preformatted_20_Text"><text:span text:style-name="Source_20_Text">-- esperas</text:span></text:p>
        <text:p text:style-name="P1"><text:span text:style-name="Source_20_Text">COMMIT;</text:span></text:p>
        <text:p text:style-name="Text_20_body">Mantén las transacciones <text:span text:style-name="Strong_20_Emphasis">cortas y rápidas</text:span>.</text:p>
        <text:h text:style-name="Heading_20_3" text:outline-level="3">Usar índices para evitar table locks</text:h>
        <text:p text:style-name="Text_20_body">Consultas sin índice → secuencias completas → más bloqueos.</text:p>
        <text:h text:style-name="Heading_20_1" text:outline-level="1">🧩 ¿Qué has aprendido?</text:h>
        <text:list xml:id="list2045796205" text:style-name="L92">
          <text:list-item>
            <text:p text:style-name="P93">Cómo funcionan las transacciones</text:p>
          </text:list-item>
          <text:list-item>
            <text:p text:style-name="P93">Cómo se aplican los bloqueos</text:p>
          </text:list-item>
          <text:list-item>
            <text:p text:style-name="P93"><text:soft-page-break/>Cómo evitar deadlocks</text:p>
          </text:list-item>
          <text:list-item>
            <text:p text:style-name="P93">Cómo ver bloqueos en tiempo real</text:p>
          </text:list-item>
          <text:list-item>
            <text:p text:style-name="P93">Cómo elegir niveles de aislamiento</text:p>
          </text:list-item>
          <text:list-item>
            <text:p text:style-name="P93">Cómo optimizar concurrencia en tu sistema</text:p>
          </text:list-item>
        </text:list>
        <text:p text:style-name="Text_20_body">Tu base de datos ahora está lista para <text:span text:style-name="Strong_20_Emphasis">trabajo multiusuario real</text:span>.</text:p>
        <text:h text:style-name="Heading_20_1" text:outline-level="1">🔜 Siguiente módulo del tutorial</text:h>
        <text:p text:style-name="Text_20_body">El siguiente paso natural es:</text:p>
        <text:h text:style-name="Heading_20_3" text:outline-level="3"><text:span text:style-name="Strong_20_Emphasis">Triggers de seguridad (validaciones automáticas)</text:span></text:h>
        <text:p text:style-name="Text_20_body">Porque ahora que manejas concurrencia, toca asegurar que <text:span text:style-name="Strong_20_Emphasis">ningún usuario pueda romper reglas de negocio</text:span>, incluso con RLS.</text:p>
        <text:p text:style-name="Text_20_body">Si quieres seguir, dime:</text:p>
        <text:p text:style-name="Text_20_body"><text:span text:style-name="Strong_20_Emphasis">Quiero triggers de seguridad</text:span></text:p>
        <text:p text:style-name="Text_20_body">O elige otra ruta:</text:p>
        <text:list xml:id="list60731279" text:style-name="L93">
          <text:list-item>
            <text:p text:style-name="P94">auditoría avanzada</text:p>
          </text:list-item>
          <text:list-item>
            <text:p text:style-name="P94">optimización avanzada</text:p>
          </text:list-item>
          <text:list-item>
            <text:p text:style-name="P94">replicación y alta disponibilidad</text:p>
          </text:list-item>
        </text:list>
      </text:section>
      <text:h text:style-name="Heading_20_1" text:outline-level="1">🔐 Triggers de seguridad (validaciones automáticas)</text:h>
      <text:h text:style-name="Heading_20_2" text:outline-level="2">🎯 Idea clave</text:h>
      <text:p text:style-name="Text_20_body">Los triggers de seguridad sirven para <text:span text:style-name="Strong_20_Emphasis">impedir operaciones peligrosas</text:span>, <text:span text:style-name="Strong_20_Emphasis">validar datos antes de insertarlos</text:span>, y <text:span text:style-name="Strong_20_Emphasis">evitar inconsistencias</text:span> incluso cuando:</text:p>
      <text:list xml:id="list895970997" text:style-name="L94">
        <text:list-item>
          <text:p text:style-name="P95">el usuario tiene permisos</text:p>
        </text:list-item>
        <text:list-item>
          <text:p text:style-name="P95">el código de la aplicación falla</text:p>
        </text:list-item>
        <text:list-item>
          <text:p text:style-name="P95">hay concurrencia</text:p>
        </text:list-item>
        <text:list-item>
          <text:p text:style-name="P95">hay RLS</text:p>
        </text:list-item>
        <text:list-item>
          <text:p text:style-name="P95">hay roles con más privilegios</text:p>
        </text:list-item>
      </text:list>
      <text:p text:style-name="Text_20_body">Son la última línea de defensa.</text:p>
      <text:h text:style-name="Heading_20_1" text:outline-level="1"><text:soft-page-break/>🧱 1. Validar stock antes de permitir una venta</text:h>
      <text:p text:style-name="Text_20_body">Evita que un usuario venda más unidades de las disponibles.</text:p>
      <text:p text:style-name="Text_20_body">sql</text:p>
      <text:p text:style-name="Preformatted_20_Text"><text:span text:style-name="Source_20_Text">CREATE OR REPLACE FUNCTION seguridad.validar_stock()</text:span></text:p>
      <text:p text:style-name="Preformatted_20_Text"><text:span text:style-name="Source_20_Text">RETURNS TRIGGER AS $$</text:span></text:p>
      <text:p text:style-name="Preformatted_20_Text"><text:span text:style-name="Source_20_Text">DECLARE</text:span></text:p>
      <text:p text:style-name="Preformatted_20_Text"><text:span text:style-name="Source_20_Text"><text:s text:c="4"/>v_stock_actual INT;</text:span></text:p>
      <text:p text:style-name="Preformatted_20_Text"><text:span text:style-name="Source_20_Text">BEGIN</text:span></text:p>
      <text:p text:style-name="Preformatted_20_Text"><text:span text:style-name="Source_20_Text"><text:s text:c="4"/>SELECT stock_actual INTO v_stock_actual</text:span></text:p>
      <text:p text:style-name="Preformatted_20_Text"><text:span text:style-name="Source_20_Text"><text:s text:c="4"/>FROM stock.articulos</text:span></text:p>
      <text:p text:style-name="Preformatted_20_Text"><text:span text:style-name="Source_20_Text"><text:s text:c="4"/>WHERE id = NEW.articulo_id;</text:span></text:p>
      <text:p text:style-name="Preformatted_20_Text"/>
      <text:p text:style-name="Preformatted_20_Text"><text:span text:style-name="Source_20_Text"><text:s text:c="4"/>IF NEW.cantidad &gt; v_stock_actual THEN</text:span></text:p>
      <text:p text:style-name="Preformatted_20_Text"><text:span text:style-name="Source_20_Text"><text:s text:c="8"/>RAISE EXCEPTION 'No hay stock suficiente para el artículo % (solicitado %, disponible %)',</text:span></text:p>
      <text:p text:style-name="Preformatted_20_Text"><text:span text:style-name="Source_20_Text"><text:s text:c="12"/>NEW.articulo_id, NEW.cantidad, v_stock_actual;</text:span></text:p>
      <text:p text:style-name="Preformatted_20_Text"><text:span text:style-name="Source_20_Text"><text:s text:c="4"/>END IF;</text:span></text:p>
      <text:p text:style-name="Preformatted_20_Text"/>
      <text:p text:style-name="Preformatted_20_Text"><text:span text:style-name="Source_20_Text"><text:s text:c="4"/>RETURN NEW;</text:span></text:p>
      <text:p text:style-name="Preformatted_20_Text"><text:span text:style-name="Source_20_Text">END;</text:span></text:p>
      <text:p text:style-name="Preformatted_20_Text"><text:span text:style-name="Source_20_Text">$$ LANGUAGE plpgsql;</text:span></text:p>
      <text:p text:style-name="Preformatted_20_Text"/>
      <text:p text:style-name="Preformatted_20_Text"><text:span text:style-name="Source_20_Text">CREATE TRIGGER trg_validar_stock</text:span></text:p>
      <text:p text:style-name="Preformatted_20_Text"><text:span text:style-name="Source_20_Text">BEFORE INSERT ON ventas.lineas_pedido</text:span></text:p>
      <text:p text:style-name="P1"><text:span text:style-name="Source_20_Text">FOR EACH ROW EXECUTE FUNCTION seguridad.validar_stock();</text:span></text:p>
      <text:h text:style-name="Heading_20_3" text:outline-level="3">Resultado</text:h>
      <text:list xml:id="list1928571705" text:style-name="L95">
        <text:list-item>
          <text:p text:style-name="P96">Si el stock es suficiente → inserta</text:p>
        </text:list-item>
        <text:list-item>
          <text:p text:style-name="P96">Si no → <text:span text:style-name="Strong_20_Emphasis">bloquea la operación</text:span></text:p>
        </text:list-item>
        <text:list-item>
          <text:p text:style-name="P96">Evita ventas negativas, errores y fraudes</text:p>
        </text:list-item>
      </text:list>
      <text:h text:style-name="Heading_20_1" text:outline-level="1">🧱 2. Impedir que un usuario cambie el pedido de otro (refuerzo de RLS)</text:h>
      <text:p text:style-name="Text_20_body">Aunque RLS ya lo bloquea, este trigger añade una capa extra:</text:p>
      <text:p text:style-name="Text_20_body">sql</text:p>
      <text:p text:style-name="Preformatted_20_Text"><text:span text:style-name="Source_20_Text">CREATE OR REPLACE FUNCTION seguridad.validar_usuario_pedido()</text:span></text:p>
      <text:p text:style-name="Preformatted_20_Text"><text:span text:style-name="Source_20_Text">RETURNS TRIGGER AS $$</text:span></text:p>
      <text:p text:style-name="Preformatted_20_Text"><text:span text:style-name="Source_20_Text">DECLARE</text:span></text:p>
      <text:p text:style-name="Preformatted_20_Text"><text:span text:style-name="Source_20_Text"><text:s text:c="4"/>v_usuario TEXT;</text:span></text:p>
      <text:p text:style-name="Preformatted_20_Text"><text:span text:style-name="Source_20_Text">BEGIN</text:span></text:p>
      <text:p text:style-name="Preformatted_20_Text"><text:span text:style-name="Source_20_Text"><text:s text:c="4"/>SELECT usuario INTO v_usuario</text:span></text:p>
      <text:p text:style-name="Preformatted_20_Text"><text:span text:style-name="Source_20_Text"><text:s text:c="4"/>FROM ventas.pedidos</text:span></text:p>
      <text:p text:style-name="Preformatted_20_Text"><text:span text:style-name="Source_20_Text"><text:s text:c="4"/>WHERE id = NEW.pedido_id;</text:span></text:p>
      <text:p text:style-name="Preformatted_20_Text"/>
      <text:p text:style-name="Preformatted_20_Text"><text:span text:style-name="Source_20_Text"><text:s text:c="4"/>IF v_usuario &lt;&gt; current_user THEN</text:span></text:p>
      <text:p text:style-name="Preformatted_20_Text"><text:span text:style-name="Source_20_Text"><text:s text:c="8"/>RAISE EXCEPTION 'No puedes modificar pedidos de otros usuarios';</text:span></text:p>
      <text:p text:style-name="Preformatted_20_Text"><text:span text:style-name="Source_20_Text"><text:s text:c="4"/>END IF;</text:span></text:p>
      <text:p text:style-name="Preformatted_20_Text"><text:soft-page-break/></text:p>
      <text:p text:style-name="Preformatted_20_Text"><text:span text:style-name="Source_20_Text"><text:s text:c="4"/>RETURN NEW;</text:span></text:p>
      <text:p text:style-name="Preformatted_20_Text"><text:span text:style-name="Source_20_Text">END;</text:span></text:p>
      <text:p text:style-name="Preformatted_20_Text"><text:span text:style-name="Source_20_Text">$$ LANGUAGE plpgsql;</text:span></text:p>
      <text:p text:style-name="Preformatted_20_Text"/>
      <text:p text:style-name="Preformatted_20_Text"><text:span text:style-name="Source_20_Text">CREATE TRIGGER trg_validar_usuario_pedido</text:span></text:p>
      <text:p text:style-name="Preformatted_20_Text"><text:span text:style-name="Source_20_Text">BEFORE INSERT OR UPDATE ON ventas.lineas_pedido</text:span></text:p>
      <text:p text:style-name="P1"><text:span text:style-name="Source_20_Text">FOR EACH ROW EXECUTE FUNCTION seguridad.validar_usuario_pedido();</text:span></text:p>
      <text:h text:style-name="Heading_20_3" text:outline-level="3">Resultado</text:h>
      <text:p text:style-name="Text_20_body">Incluso si un usuario intenta “forzar” un pedido ajeno:</text:p>
      <text:p text:style-name="Text_20_body">👉 <text:span text:style-name="Strong_20_Emphasis">Error inmediato</text:span> 👉 RLS + trigger = blindaje total</text:p>
      <text:h text:style-name="Heading_20_1" text:outline-level="1">🧱 3. Impedir que un pedido cambie de usuario (seguridad crítica)</text:h>
      <text:p text:style-name="Text_20_body">sql</text:p>
      <text:p text:style-name="Preformatted_20_Text"><text:span text:style-name="Source_20_Text">CREATE OR REPLACE FUNCTION seguridad.bloquear_cambio_usuario()</text:span></text:p>
      <text:p text:style-name="Preformatted_20_Text"><text:span text:style-name="Source_20_Text">RETURNS TRIGGER AS $$</text:span></text:p>
      <text:p text:style-name="Preformatted_20_Text"><text:span text:style-name="Source_20_Text">BEGIN</text:span></text:p>
      <text:p text:style-name="Preformatted_20_Text"><text:span text:style-name="Source_20_Text"><text:s text:c="4"/>IF NEW.usuario &lt;&gt; OLD.usuario THEN</text:span></text:p>
      <text:p text:style-name="Preformatted_20_Text"><text:span text:style-name="Source_20_Text"><text:s text:c="8"/>RAISE EXCEPTION 'No se permite cambiar el usuario del pedido';</text:span></text:p>
      <text:p text:style-name="Preformatted_20_Text"><text:span text:style-name="Source_20_Text"><text:s text:c="4"/>END IF;</text:span></text:p>
      <text:p text:style-name="Preformatted_20_Text"/>
      <text:p text:style-name="Preformatted_20_Text"><text:span text:style-name="Source_20_Text"><text:s text:c="4"/>RETURN NEW;</text:span></text:p>
      <text:p text:style-name="Preformatted_20_Text"><text:span text:style-name="Source_20_Text">END;</text:span></text:p>
      <text:p text:style-name="Preformatted_20_Text"><text:span text:style-name="Source_20_Text">$$ LANGUAGE plpgsql;</text:span></text:p>
      <text:p text:style-name="Preformatted_20_Text"/>
      <text:p text:style-name="Preformatted_20_Text"><text:span text:style-name="Source_20_Text">CREATE TRIGGER trg_bloquear_cambio_usuario</text:span></text:p>
      <text:p text:style-name="Preformatted_20_Text"><text:span text:style-name="Source_20_Text">BEFORE UPDATE ON ventas.pedidos</text:span></text:p>
      <text:p text:style-name="P1"><text:span text:style-name="Source_20_Text">FOR EACH ROW EXECUTE FUNCTION seguridad.bloquear_cambio_usuario();</text:span></text:p>
      <text:h text:style-name="Heading_20_3" text:outline-level="3">Resultado</text:h>
      <text:list xml:id="list3478866664" text:style-name="L96">
        <text:list-item>
          <text:p text:style-name="P97">Nadie puede reasignar pedidos</text:p>
        </text:list-item>
        <text:list-item>
          <text:p text:style-name="P97">Evita fraudes internos</text:p>
        </text:list-item>
        <text:list-item>
          <text:p text:style-name="P97">Evita manipulación de datos históricos</text:p>
        </text:list-item>
      </text:list>
      <text:h text:style-name="Heading_20_1" text:outline-level="1">🧱 4. Impedir borrar pedidos facturados</text:h>
      <text:p text:style-name="Text_20_body">sql</text:p>
      <text:p text:style-name="Preformatted_20_Text"><text:span text:style-name="Source_20_Text">CREATE OR REPLACE FUNCTION seguridad.bloquear_borrado_facturado()</text:span></text:p>
      <text:p text:style-name="Preformatted_20_Text"><text:span text:style-name="Source_20_Text">RETURNS TRIGGER AS $$</text:span></text:p>
      <text:p text:style-name="Preformatted_20_Text"><text:span text:style-name="Source_20_Text">DECLARE</text:span></text:p>
      <text:p text:style-name="Preformatted_20_Text"><text:span text:style-name="Source_20_Text"><text:s text:c="4"/>v_factura INT;</text:span></text:p>
      <text:p text:style-name="Preformatted_20_Text"><text:span text:style-name="Source_20_Text">BEGIN</text:span></text:p>
      <text:p text:style-name="Preformatted_20_Text"><text:span text:style-name="Source_20_Text"><text:s text:c="4"/>SELECT id INTO v_factura</text:span></text:p>
      <text:p text:style-name="Preformatted_20_Text"><text:span text:style-name="Source_20_Text"><text:s text:c="4"/>FROM facturacion.facturas</text:span></text:p>
      <text:p text:style-name="Preformatted_20_Text"><text:span text:style-name="Source_20_Text"><text:s text:c="4"/>WHERE pedido_id = OLD.id;</text:span></text:p>
      <text:p text:style-name="Preformatted_20_Text"/>
      <text:p text:style-name="Preformatted_20_Text"><text:span text:style-name="Source_20_Text"><text:s text:c="4"/>IF v_factura IS NOT NULL THEN</text:span></text:p>
      <text:p text:style-name="Preformatted_20_Text"><text:soft-page-break/><text:span text:style-name="Source_20_Text"><text:s text:c="8"/>RAISE EXCEPTION 'No se puede borrar un pedido que ya tiene factura';</text:span></text:p>
      <text:p text:style-name="Preformatted_20_Text"><text:span text:style-name="Source_20_Text"><text:s text:c="4"/>END IF;</text:span></text:p>
      <text:p text:style-name="Preformatted_20_Text"/>
      <text:p text:style-name="Preformatted_20_Text"><text:span text:style-name="Source_20_Text"><text:s text:c="4"/>RETURN OLD;</text:span></text:p>
      <text:p text:style-name="Preformatted_20_Text"><text:span text:style-name="Source_20_Text">END;</text:span></text:p>
      <text:p text:style-name="Preformatted_20_Text"><text:span text:style-name="Source_20_Text">$$ LANGUAGE plpgsql;</text:span></text:p>
      <text:p text:style-name="Preformatted_20_Text"/>
      <text:p text:style-name="Preformatted_20_Text"><text:span text:style-name="Source_20_Text">CREATE TRIGGER trg_bloquear_borrado_facturado</text:span></text:p>
      <text:p text:style-name="Preformatted_20_Text"><text:span text:style-name="Source_20_Text">BEFORE DELETE ON ventas.pedidos</text:span></text:p>
      <text:p text:style-name="P1"><text:span text:style-name="Source_20_Text">FOR EACH ROW EXECUTE FUNCTION seguridad.bloquear_borrado_facturado();</text:span></text:p>
      <text:h text:style-name="Heading_20_3" text:outline-level="3">Resultado</text:h>
      <text:list xml:id="list1337470763" text:style-name="L97">
        <text:list-item>
          <text:p text:style-name="P98">Evita inconsistencias contables</text:p>
        </text:list-item>
        <text:list-item>
          <text:p text:style-name="P98">Evita auditorías rotas</text:p>
        </text:list-item>
        <text:list-item>
          <text:p text:style-name="P98">Evita manipulación de facturas</text:p>
        </text:list-item>
      </text:list>
      <text:h text:style-name="Heading_20_1" text:outline-level="1">🧱 5. Validar precios (evitar precios negativos o cero)</text:h>
      <text:p text:style-name="Text_20_body">sql</text:p>
      <text:p text:style-name="Preformatted_20_Text"><text:span text:style-name="Source_20_Text">CREATE OR REPLACE FUNCTION seguridad.validar_precio()</text:span></text:p>
      <text:p text:style-name="Preformatted_20_Text"><text:span text:style-name="Source_20_Text">RETURNS TRIGGER AS $$</text:span></text:p>
      <text:p text:style-name="Preformatted_20_Text"><text:span text:style-name="Source_20_Text">BEGIN</text:span></text:p>
      <text:p text:style-name="Preformatted_20_Text"><text:span text:style-name="Source_20_Text"><text:s text:c="4"/>IF NEW.precio_unitario &lt;= 0 THEN</text:span></text:p>
      <text:p text:style-name="Preformatted_20_Text"><text:span text:style-name="Source_20_Text"><text:s text:c="8"/>RAISE EXCEPTION 'El precio unitario debe ser mayor que cero';</text:span></text:p>
      <text:p text:style-name="Preformatted_20_Text"><text:span text:style-name="Source_20_Text"><text:s text:c="4"/>END IF;</text:span></text:p>
      <text:p text:style-name="Preformatted_20_Text"/>
      <text:p text:style-name="Preformatted_20_Text"><text:span text:style-name="Source_20_Text"><text:s text:c="4"/>RETURN NEW;</text:span></text:p>
      <text:p text:style-name="Preformatted_20_Text"><text:span text:style-name="Source_20_Text">END;</text:span></text:p>
      <text:p text:style-name="Preformatted_20_Text"><text:span text:style-name="Source_20_Text">$$ LANGUAGE plpgsql;</text:span></text:p>
      <text:p text:style-name="Preformatted_20_Text"/>
      <text:p text:style-name="Preformatted_20_Text"><text:span text:style-name="Source_20_Text">CREATE TRIGGER trg_validar_precio</text:span></text:p>
      <text:p text:style-name="Preformatted_20_Text"><text:span text:style-name="Source_20_Text">BEFORE INSERT OR UPDATE ON ventas.lineas_pedido</text:span></text:p>
      <text:p text:style-name="P1"><text:span text:style-name="Source_20_Text">FOR EACH ROW EXECUTE FUNCTION seguridad.validar_precio();</text:span></text:p>
      <text:h text:style-name="Heading_20_1" text:outline-level="1">🧩 ¿Qué has conseguido?</text:h>
      <text:p text:style-name="Text_20_body">Con estos triggers tu sistema ahora tiene:</text:p>
      <text:list xml:id="list1979783324" text:style-name="L98">
        <text:list-item>
          <text:p text:style-name="P99">Validación automática de stock</text:p>
        </text:list-item>
        <text:list-item>
          <text:p text:style-name="P99">Protección contra manipulación de pedidos</text:p>
        </text:list-item>
        <text:list-item>
          <text:p text:style-name="P99">Protección contra cambios de usuario</text:p>
        </text:list-item>
        <text:list-item>
          <text:p text:style-name="P99">Protección contra borrado de pedidos facturados</text:p>
        </text:list-item>
        <text:list-item>
          <text:p text:style-name="P99">Validación de precios</text:p>
        </text:list-item>
        <text:list-item>
          <text:p text:style-name="P99">Seguridad reforzada sobre RLS</text:p>
        </text:list-item>
        <text:list-item>
          <text:p text:style-name="P99">Auditoría contable sólida</text:p>
        </text:list-item>
        <text:list-item>
          <text:p text:style-name="P99"><text:soft-page-break/>Blindaje contra errores humanos y ataques lógicos</text:p>
        </text:list-item>
      </text:list>
      <text:p text:style-name="Text_20_body">Esto es <text:span text:style-name="Strong_20_Emphasis">seguridad empresarial real</text:span>, como un ERP profesional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3T18:35:10.512649003</meta:creation-date>
    <dc:date>2026-07-03T18:51:51.257214078</dc:date>
    <meta:editing-duration>PT6M30S</meta:editing-duration>
    <meta:editing-cycles>1</meta:editing-cycles>
    <meta:document-statistic meta:table-count="1" meta:image-count="0" meta:object-count="0" meta:page-count="64" meta:paragraph-count="1896" meta:word-count="11030" meta:character-count="70861" meta:non-whitespace-character-count="60747"/>
    <meta:generator>LibreOffice/7.3.7.2$Linux_X86_64 LibreOffice_project/30$Build-2</meta:generator>
  </office:meta>
</office:document-meta>
</file>