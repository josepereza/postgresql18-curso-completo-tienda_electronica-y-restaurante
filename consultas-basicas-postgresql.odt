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fc734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Preformatted_20_Text" style:list-style-name="L1">
      <style:paragraph-properties fo:margin-top="0cm" fo:margin-bottom="0.499cm" style:contextual-spacing="false"/>
      <style:text-properties officeooo:paragraph-rsid="002311b3"/>
    </style:style>
    <style:style style:name="P6" style:family="paragraph" style:parent-style-name="Preformatted_20_Text" style:list-style-name="L2"/>
    <style:style style:name="P7" style:family="paragraph" style:parent-style-name="Preformatted_20_Text" style:list-style-name="L2">
      <style:paragraph-properties fo:margin-top="0cm" fo:margin-bottom="0.499cm" style:contextual-spacing="false"/>
    </style:style>
    <style:style style:name="P8" style:family="paragraph" style:parent-style-name="Preformatted_20_Text" style:list-style-name="L3"/>
    <style:style style:name="P9" style:family="paragraph" style:parent-style-name="Preformatted_20_Text" style:list-style-name="L3">
      <style:paragraph-properties fo:margin-top="0cm" fo:margin-bottom="0.499cm" style:contextual-spacing="false"/>
    </style:style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fo:margin-top="0cm" fo:margin-bottom="0.499cm" style:contextual-spacing="false"/>
    </style:style>
    <style:style style:name="P12" style:family="paragraph" style:parent-style-name="Preformatted_20_Text" style:list-style-name="L5">
      <style:paragraph-properties fo:margin-top="0cm" fo:margin-bottom="0.499cm" style:contextual-spacing="false"/>
    </style:style>
    <style:style style:name="P13" style:family="paragraph" style:parent-style-name="Preformatted_20_Text" style:list-style-name="L6"/>
    <style:style style:name="P14" style:family="paragraph" style:parent-style-name="Preformatted_20_Text" style:list-style-name="L6">
      <style:paragraph-properties fo:margin-top="0cm" fo:margin-bottom="0.499cm" style:contextual-spacing="false"/>
    </style:style>
    <style:style style:name="P15" style:family="paragraph" style:parent-style-name="Preformatted_20_Text" style:list-style-name="L6">
      <style:paragraph-properties fo:margin-top="0cm" fo:margin-bottom="0.499cm" style:contextual-spacing="false"/>
      <style:text-properties officeooo:paragraph-rsid="00249b50"/>
    </style:style>
    <style:style style:name="P16" style:family="paragraph" style:parent-style-name="Preformatted_20_Text" style:list-style-name="L7"/>
    <style:style style:name="P17" style:family="paragraph" style:parent-style-name="Preformatted_20_Text" style:list-style-name="L7">
      <style:paragraph-properties fo:margin-top="0cm" fo:margin-bottom="0.499cm" style:contextual-spacing="false"/>
    </style:style>
    <style:style style:name="P18" style:family="paragraph" style:parent-style-name="Preformatted_20_Text" style:list-style-name="L8"/>
    <style:style style:name="P19" style:family="paragraph" style:parent-style-name="Preformatted_20_Text" style:list-style-name="L8">
      <style:paragraph-properties fo:margin-top="0cm" fo:margin-bottom="0.499cm" style:contextual-spacing="false"/>
    </style:style>
    <style:style style:name="P20" style:family="paragraph" style:parent-style-name="Preformatted_20_Text" style:list-style-name="L9"/>
    <style:style style:name="P21" style:family="paragraph" style:parent-style-name="Preformatted_20_Text" style:list-style-name="L9">
      <style:paragraph-properties fo:margin-top="0cm" fo:margin-bottom="0.499cm" style:contextual-spacing="false"/>
    </style:style>
    <style:style style:name="P22" style:family="paragraph" style:parent-style-name="Preformatted_20_Text" style:list-style-name="L9">
      <style:paragraph-properties fo:margin-top="0cm" fo:margin-bottom="0.499cm" style:contextual-spacing="false"/>
      <style:text-properties officeooo:paragraph-rsid="00249b50"/>
    </style:style>
    <style:style style:name="P23" style:family="paragraph" style:parent-style-name="Preformatted_20_Text" style:list-style-name="L9">
      <style:paragraph-properties fo:margin-top="0cm" fo:margin-bottom="0.499cm" style:contextual-spacing="false"/>
      <style:text-properties officeooo:paragraph-rsid="00254e94"/>
    </style:style>
    <style:style style:name="P24" style:family="paragraph" style:parent-style-name="Preformatted_20_Text" style:list-style-name="L10">
      <style:paragraph-properties fo:margin-top="0cm" fo:margin-bottom="0.499cm" style:contextual-spacing="false"/>
    </style:style>
    <style:style style:name="P25" style:family="paragraph" style:parent-style-name="Preformatted_20_Text">
      <style:paragraph-properties fo:margin-top="0cm" fo:margin-bottom="0.499cm" style:contextual-spacing="false"/>
    </style:style>
    <style:style style:name="P26" style:family="paragraph" style:parent-style-name="Preformatted_20_Text">
      <style:text-properties fo:font-size="12pt" style:font-size-asian="12pt" style:font-size-complex="12pt"/>
    </style:style>
    <style:style style:name="P27" style:family="paragraph" style:parent-style-name="Preformatted_20_Text">
      <style:text-properties fo:font-size="12pt" officeooo:rsid="0021aa8f" officeooo:paragraph-rsid="0021aa8f" style:font-size-asian="12pt" style:font-size-complex="12pt"/>
    </style:style>
    <style:style style:name="P28" style:family="paragraph" style:parent-style-name="Preformatted_20_Text">
      <style:text-properties fo:font-size="12pt" officeooo:paragraph-rsid="0021aa8f" style:font-size-asian="12pt" style:font-size-complex="12pt"/>
    </style:style>
    <style:style style:name="P29" style:family="paragraph" style:parent-style-name="Preformatted_20_Text">
      <style:text-properties fo:font-size="12pt" officeooo:paragraph-rsid="002311b3" style:font-size-asian="12pt" style:font-size-complex="12pt"/>
    </style:style>
    <style:style style:name="P30" style:family="paragraph" style:parent-style-name="Preformatted_20_Text">
      <style:text-properties fo:font-size="12pt" officeooo:rsid="00268beb" officeooo:paragraph-rsid="00268beb" style:font-size-asian="12pt" style:font-size-complex="12pt"/>
    </style:style>
    <style:style style:name="P31" style:family="paragraph" style:parent-style-name="Preformatted_20_Text">
      <style:text-properties fo:font-size="12pt" fo:font-weight="normal" officeooo:rsid="0021aa8f" officeooo:paragraph-rsid="0021aa8f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2311b3"/>
    </style:style>
    <style:style style:name="P33" style:family="paragraph" style:parent-style-name="Preformatted_20_Text">
      <style:paragraph-properties fo:margin-top="0cm" fo:margin-bottom="0.499cm" style:contextual-spacing="false"/>
      <style:text-properties officeooo:paragraph-rsid="00254e94"/>
    </style:style>
    <style:style style:name="P34" style:family="paragraph" style:parent-style-name="Preformatted_20_Text">
      <style:paragraph-properties fo:margin-top="0cm" fo:margin-bottom="0.499cm" style:contextual-spacing="false"/>
      <style:text-properties officeooo:paragraph-rsid="00249b50"/>
    </style:style>
    <style:style style:name="P35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36" style:family="paragraph" style:parent-style-name="Standard">
      <style:text-properties fo:font-size="12pt" style:font-size-asian="12pt" style:font-size-complex="12pt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4"/>
    <style:style style:name="P41" style:family="paragraph" style:parent-style-name="Text_20_body" style:list-style-name="L5"/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8"/>
    <style:style style:name="P45" style:family="paragraph" style:parent-style-name="Text_20_body" style:list-style-name="L9"/>
    <style:style style:name="P46" style:family="paragraph" style:parent-style-name="Text_20_body" style:list-style-name="L10"/>
    <style:style style:name="P47" style:family="paragraph" style:parent-style-name="Text_20_body" style:list-style-name="L13"/>
    <style:style style:name="P48" style:family="paragraph" style:parent-style-name="Text_20_body" style:list-style-name="L14"/>
    <style:style style:name="P49" style:family="paragraph" style:parent-style-name="Text_20_body" style:list-style-name="L15"/>
    <style:style style:name="P50" style:family="paragraph" style:parent-style-name="Text_20_body">
      <style:text-properties officeooo:paragraph-rsid="001d6d3d"/>
    </style:style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>
      <style:text-properties officeooo:paragraph-rsid="001fc734"/>
    </style:style>
    <style:style style:name="T1" style:family="text">
      <style:text-properties officeooo:rsid="001c5a9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d6d3d" style:font-size-asian="12pt" style:font-size-complex="12pt"/>
    </style:style>
    <style:style style:name="T6" style:family="text">
      <style:text-properties fo:font-size="12pt" officeooo:rsid="001c5a91" style:font-size-asian="12pt" style:font-size-complex="12pt"/>
    </style:style>
    <style:style style:name="T7" style:family="text">
      <style:text-properties fo:font-size="12pt" officeooo:rsid="0021aa8f" style:font-size-asian="12pt" style:font-size-complex="12pt"/>
    </style:style>
    <style:style style:name="T8" style:family="text">
      <style:text-properties fo:font-size="12pt" fo:font-weight="bold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d6d3d" style:font-size-asian="11pt" style:font-size-complex="11pt"/>
    </style:style>
    <style:style style:name="T11" style:family="text">
      <style:text-properties fo:font-size="11pt" fo:font-weight="bold" style:font-size-asian="11pt" style:font-size-complex="11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21aa8f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311b3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4pt" officeooo:rsid="001d6d3d" style:font-size-asian="14pt" style:font-size-complex="14pt"/>
    </style:style>
    <style:style style:name="T18" style:family="text">
      <style:text-properties fo:font-size="14pt" officeooo:rsid="00268beb" style:font-size-asian="14pt" style:font-size-complex="14pt"/>
    </style:style>
    <style:style style:name="T19" style:family="text">
      <style:text-properties fo:font-size="14pt" fo:font-weight="bold" officeooo:rsid="00268beb" style:font-size-asian="14pt" style:font-weight-asian="bold" style:font-size-complex="14pt" style:font-weight-complex="bold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officeooo:rsid="001d6d3d" style:font-size-asian="10.5pt" style:font-size-complex="10.5pt"/>
    </style:style>
    <style:style style:name="T22" style:family="text">
      <style:text-properties fo:font-size="10.5pt" officeooo:rsid="0021aa8f" style:font-size-asian="10.5pt" style:font-size-complex="10.5pt"/>
    </style:style>
    <style:style style:name="T23" style:family="text">
      <style:text-properties fo:font-size="10.5pt" fo:font-weight="bold" style:font-size-asian="10.5pt" style:font-size-complex="10.5pt"/>
    </style:style>
    <style:style style:name="T24" style:family="text">
      <style:text-properties officeooo:rsid="001fc734"/>
    </style:style>
    <style:style style:name="T25" style:family="text">
      <style:text-properties fo:font-style="italic"/>
    </style:style>
    <style:style style:name="T26" style:family="text">
      <style:text-properties fo:font-style="italic" fo:font-weight="bold"/>
    </style:style>
    <style:style style:name="T27" style:family="text">
      <style:text-properties officeooo:rsid="002311b3"/>
    </style:style>
    <style:style style:name="T28" style:family="text">
      <style:text-properties officeooo:rsid="00249b50"/>
    </style:style>
    <style:style style:name="T29" style:family="text">
      <style:text-properties officeooo:rsid="00254e9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📌 Lista básica de consultas esenciales en PostgreSQL</text:h>
      <text:section text:style-name="Sect1" text:name="Qyto6CNepVsDDsiujzVqA-content-0">
        <text:h text:style-name="Heading_20_2" text:outline-level="2">👤 Usuarios (roles con LOGIN)</text:h>
        <text:p text:style-name="Text_20_body"><text:s text:c="7"/></text:p>
        <text:list xml:id="list3626340024" text:style-name="L1">
          <text:list-item>
            <text:p text:style-name="P37"><text:span text:style-name="Strong_20_Emphasis">Usuarios <text:s/></text:span><text:span text:style-name="Strong_20_Emphasis"><text:span text:style-name="T27">o roles </text:span></text:span><text:span text:style-name="Strong_20_Emphasis">con LOGIN</text:span></text:p>
            <text:p text:style-name="P37">sql</text:p>
            <text:p text:style-name="P3"><text:span text:style-name="Source_20_Text">SELECT rolname</text:span></text:p>
            <text:p text:style-name="P3"><text:span text:style-name="Source_20_Text">FROM pg_roles</text:span></text:p>
            <text:p text:style-name="P4"><text:span text:style-name="Source_20_Text">WHERE rolcanlogin = true;</text:span></text:p>
          </text:list-item>
          <text:list-item>
            <text:p text:style-name="P5"><text:span text:style-name="Source_20_Text"><text:span text:style-name="T27">Todos los usuarios o roles</text:span></text:span></text:p>
          </text:list-item>
        </text:list>
        <text:p text:style-name="P32"><text:span text:style-name="Source_20_Text"><text:s text:c="6"/></text:span><text:span text:style-name="Source_20_Text"><text:span text:style-name="T27">\du</text:span></text:span></text:p>
        <text:list xml:id="list81118870025253" text:continue-numbering="true" text:style-name="L1">
          <text:list-item>
            <text:p text:style-name="P37"><text:span text:style-name="Strong_20_Emphasis">Contar usuarios</text:span></text:p>
            <text:p text:style-name="P37">sql</text:p>
            <text:p text:style-name="P3"><text:span text:style-name="Source_20_Text">SELECT COUNT(*) AS total_usuarios</text:span></text:p>
            <text:p text:style-name="P3"><text:span text:style-name="Source_20_Text">FROM pg_roles</text:span></text:p>
            <text:p text:style-name="P4"><text:span text:style-name="Source_20_Text">WHERE rolcanlogin = true;</text:span></text:p>
          </text:list-item>
        </text:list>
        <text:h text:style-name="Heading_20_2" text:outline-level="2">🛡️ Roles (todos los roles del sistema)</text:h>
        <text:list xml:id="list3213546011" text:style-name="L2">
          <text:list-item>
            <text:p text:style-name="P38"><text:span text:style-name="Strong_20_Emphasis">Listar roles</text:span></text:p>
            <text:p text:style-name="P38">sql</text:p>
            <text:p text:style-name="P6"><text:span text:style-name="Source_20_Text">SELECT rolname</text:span></text:p>
            <text:p text:style-name="P7"><text:span text:style-name="Source_20_Text">FROM pg_roles;</text:span></text:p>
          </text:list-item>
          <text:list-item>
            <text:p text:style-name="P38"><text:span text:style-name="Strong_20_Emphasis">Contar roles</text:span></text:p>
            <text:p text:style-name="P38">sql</text:p>
            <text:p text:style-name="P6"><text:span text:style-name="Source_20_Text">SELECT COUNT(*) AS total_roles</text:span></text:p>
            <text:p text:style-name="P7"><text:span text:style-name="Source_20_Text">FROM pg_roles;</text:span></text:p>
          </text:list-item>
        </text:list>
        <text:h text:style-name="Heading_20_2" text:outline-level="2">👥 Roles asignados a un usuario</text:h>
        <text:list xml:id="list4148149047" text:style-name="L3">
          <text:list-item>
            <text:p text:style-name="P39"><text:span text:style-name="Strong_20_Emphasis">Roles de un usuario</text:span></text:p>
            <text:p text:style-name="P39">sql</text:p>
            <text:p text:style-name="P8"><text:span text:style-name="Source_20_Text">SELECT r.rolname AS rol</text:span></text:p>
            <text:p text:style-name="P8"><text:span text:style-name="Source_20_Text">FROM pg_auth_members am</text:span></text:p>
            <text:p text:style-name="P8"><text:span text:style-name="Source_20_Text">JOIN pg_roles r ON am.roleid = r.oid</text:span></text:p>
            <text:p text:style-name="P8"><text:span text:style-name="Source_20_Text">JOIN pg_roles u ON am.member = u.oid</text:span></text:p>
            <text:p text:style-name="P9"><text:span text:style-name="Source_20_Text">WHERE u.rolname = 'maria';</text:span></text:p>
          </text:list-item>
        </text:list>
        <text:h text:style-name="Heading_20_2" text:outline-level="2"><text:soft-page-break/>🧑‍🤝‍🧑 Usuarios que pertenecen a un rol</text:h>
        <text:list xml:id="list3723490031" text:style-name="L4">
          <text:list-item>
            <text:p text:style-name="P40"><text:span text:style-name="Strong_20_Emphasis">Usuarios del rol vendedor</text:span></text:p>
            <text:p text:style-name="P40">sql</text:p>
            <text:p text:style-name="P10"><text:span text:style-name="Source_20_Text">SELECT u.rolname AS usuario</text:span></text:p>
            <text:p text:style-name="P10"><text:span text:style-name="Source_20_Text">FROM pg_auth_members am</text:span></text:p>
            <text:p text:style-name="P10"><text:span text:style-name="Source_20_Text">JOIN pg_roles r ON am.roleid = r.oid</text:span></text:p>
            <text:p text:style-name="P10"><text:span text:style-name="Source_20_Text">JOIN pg_roles u ON am.member = u.oid</text:span></text:p>
            <text:p text:style-name="P11"><text:span text:style-name="Source_20_Text">WHERE r.rolname = 'vendedor';</text:span></text:p>
          </text:list-item>
          <text:list-item>
            <text:p text:style-name="P40"><text:span text:style-name="Strong_20_Emphasis">Contar usuarios en un rol</text:span></text:p>
            <text:p text:style-name="P40">sql</text:p>
            <text:p text:style-name="P10"><text:span text:style-name="Source_20_Text">SELECT COUNT(*) AS total</text:span></text:p>
            <text:p text:style-name="P10"><text:span text:style-name="Source_20_Text">FROM pg_auth_members am</text:span></text:p>
            <text:p text:style-name="P10"><text:span text:style-name="Source_20_Text">JOIN pg_roles r ON am.roleid = r.oid</text:span></text:p>
            <text:p text:style-name="P11"><text:span text:style-name="Source_20_Text">WHERE r.rolname = 'vendedor';</text:span></text:p>
          </text:list-item>
          <text:list-item>
            <text:p text:style-name="P11"><text:span text:style-name="Source_20_Text"><text:span text:style-name="T13">Revocar un RLS o Rol de Grupo (Quitar herencia)</text:span></text:span></text:p>
          </text:list-item>
        </text:list>
        <text:p text:style-name="P25"><text:span text:style-name="Source_20_Text"><text:span text:style-name="T13"><text:s text:c="4"/></text:span></text:span><text:span text:style-name="Source_20_Text"><text:span text:style-name="T16">REVOKE nombre_del_rol FROM nombre_usuario;</text:span></text:span></text:p>
        <text:p text:style-name="P25"><text:span text:style-name="Source_20_Text"><text:span text:style-name="T16"/></text:span></text:p>
        <text:p text:style-name="P25"><text:span text:style-name="Source_20_Text"><text:span text:style-name="T16"><text:s text:c="2"/>- Ejemplo real: Quitarle el rol de gerente a Sofía</text:span></text:span></text:p>
        <text:p text:style-name="P25"><text:span text:style-name="Source_20_Text"><text:span text:style-name="T13"><text:s text:c="4"/></text:span></text:span><text:span text:style-name="Source_20_Text"><text:span text:style-name="T16">REVOKE gerente FROM sofia_gerente;</text:span></text:span></text:p>
        <text:h text:style-name="Heading_20_2" text:outline-level="2">🎭 Rol activo en este momento</text:h>
        <text:list xml:id="list3222518436" text:style-name="L5">
          <text:list-item>
            <text:p text:style-name="P41"><text:span text:style-name="Strong_20_Emphasis">Rol activo</text:span></text:p>
            <text:p text:style-name="P41">sql</text:p>
            <text:p text:style-name="P12"><text:span text:style-name="Source_20_Text">SELECT session_user, current_user;</text:span></text:p>
          </text:list-item>
        </text:list>
        <text:p text:style-name="P25"><text:span text:style-name="Source_20_Text"/></text:p>
        <text:p text:style-name="P25"><text:span text:style-name="Source_20_Text"><text:span text:style-name="Source_20_Text"/></text:span></text:p>
        <text:h text:style-name="Heading_20_2" text:outline-level="2">🗂️ Esquemas</text:h>
        <text:list xml:id="list4150769575" text:style-name="L6">
          <text:list-item>
            <text:p text:style-name="P42"><text:span text:style-name="Strong_20_Emphasis">Listar esquemas</text:span></text:p>
            <text:p text:style-name="P42">sql</text:p>
            <text:p text:style-name="P13"><text:span text:style-name="Source_20_Text">SELECT nspname AS esquema, pg_get_userbyid(nspowner) AS propietario</text:span></text:p>
            <text:p text:style-name="P13"><text:span text:style-name="Source_20_Text">FROM pg_namespace</text:span></text:p>
            <text:p text:style-name="P14"><text:span text:style-name="Source_20_Text">WHERE nspname NOT LIKE 'pg_%' AND nspname &lt;&gt; 'information_schema';</text:span></text:p>
          </text:list-item>
          <text:list-item>
            <text:p text:style-name="P15"><text:span text:style-name="Source_20_Text"><text:span text:style-name="T28">\dn</text:span></text:span></text:p>
          </text:list-item>
          <text:list-item>
            <text:p text:style-name="P42"><text:span text:style-name="Strong_20_Emphasis">Contar esquemas</text:span></text:p>
            <text:p text:style-name="P42">sql</text:p>
            <text:p text:style-name="P13"><text:soft-page-break/><text:span text:style-name="Source_20_Text">SELECT COUNT(*) AS total_esquemas</text:span></text:p>
            <text:p text:style-name="P13"><text:span text:style-name="Source_20_Text">FROM pg_namespace</text:span></text:p>
            <text:p text:style-name="P14"><text:span text:style-name="Source_20_Text">WHERE nspname NOT LIKE 'pg_%' AND nspname &lt;&gt; 'information_schema';</text:span></text:p>
          </text:list-item>
        </text:list>
        <text:h text:style-name="Heading_20_2" text:outline-level="2">📋 Tablas por esquema</text:h>
        <text:list xml:id="list185458677" text:style-name="L7">
          <text:list-item>
            <text:p text:style-name="P43"><text:span text:style-name="Strong_20_Emphasis">Listar tablas por esquema</text:span></text:p>
            <text:p text:style-name="P43">sql</text:p>
            <text:p text:style-name="P16"><text:span text:style-name="Source_20_Text">SELECT tablename</text:span></text:p>
            <text:p text:style-name="P16"><text:span text:style-name="Source_20_Text">FROM pg_tables</text:span></text:p>
            <text:p text:style-name="P17"><text:span text:style-name="Source_20_Text">WHERE schemaname = 'ventas';</text:span></text:p>
          </text:list-item>
          <text:list-item>
            <text:p text:style-name="P17"><text:span text:style-name="Source_20_Text"><text:s/>\dt ventas.*;</text:span></text:p>
          </text:list-item>
          <text:list-item>
            <text:p text:style-name="P43"><text:span text:style-name="Strong_20_Emphasis">Contar tablas por esquema</text:span></text:p>
            <text:p text:style-name="P43">sql</text:p>
            <text:p text:style-name="P16"><text:span text:style-name="Source_20_Text">SELECT COUNT(*) AS total_tablas</text:span></text:p>
            <text:p text:style-name="P16"><text:span text:style-name="Source_20_Text">FROM pg_tables</text:span></text:p>
            <text:p text:style-name="P17"><text:span text:style-name="Source_20_Text">WHERE schemaname = 'ventas';</text:span></text:p>
          </text:list-item>
        </text:list>
        <text:h text:style-name="Heading_20_2" text:outline-level="2">🔢 Secuencias por esquema</text:h>
        <text:list xml:id="list1064735173" text:style-name="L8">
          <text:list-item>
            <text:p text:style-name="P44"><text:span text:style-name="Strong_20_Emphasis">Listar secuencias</text:span></text:p>
            <text:p text:style-name="P44">sql</text:p>
            <text:p text:style-name="P18"><text:span text:style-name="Source_20_Text">SELECT sequencename</text:span></text:p>
            <text:p text:style-name="P18"><text:span text:style-name="Source_20_Text">FROM pg_sequences</text:span></text:p>
            <text:p text:style-name="P19"><text:span text:style-name="Source_20_Text">WHERE schemaname = 'ventas';</text:span></text:p>
          </text:list-item>
          <text:list-item>
            <text:p text:style-name="P44"><text:span text:style-name="Strong_20_Emphasis">Contar secuencias</text:span></text:p>
            <text:p text:style-name="P44">sql</text:p>
            <text:p text:style-name="P18"><text:span text:style-name="Source_20_Text">SELECT COUNT(*) AS total_secuencias</text:span></text:p>
            <text:p text:style-name="P18"><text:span text:style-name="Source_20_Text">FROM pg_sequences</text:span></text:p>
            <text:p text:style-name="P19"><text:span text:style-name="Source_20_Text">WHERE schemaname = 'ventas';</text:span></text:p>
          </text:list-item>
        </text:list>
        <text:h text:style-name="Heading_20_2" text:outline-level="2">⚙️ Funciones por esquema</text:h>
        <text:list xml:id="list3225575224" text:style-name="L9">
          <text:list-item>
            <text:p text:style-name="P45"><text:span text:style-name="Strong_20_Emphasis">Listar funciones</text:span></text:p>
            <text:p text:style-name="P45">sql</text:p>
            <text:p text:style-name="P20"><text:span text:style-name="Source_20_Text">SELECT proname</text:span></text:p>
            <text:p text:style-name="P20"><text:span text:style-name="Source_20_Text">FROM pg_proc p</text:span></text:p>
            <text:p text:style-name="P20"><text:span text:style-name="Source_20_Text">JOIN pg_namespace n ON p.pronamespace = n.oid</text:span></text:p>
            <text:p text:style-name="P21"><text:span text:style-name="Source_20_Text">WHERE n.nspname = 'ventas';</text:span></text:p>
          </text:list-item>
          <text:list-item>
            <text:p text:style-name="P22"><text:span text:style-name="Source_20_Text"><text:span text:style-name="T28">\df</text:span></text:span></text:p>
          </text:list-item>
        </text:list>
        <text:p text:style-name="P34"><text:span text:style-name="Source_20_Text"/></text:p>
        <text:p text:style-name="P34"><text:span text:style-name="Source_20_Text"/></text:p>
        <text:p text:style-name="P34"><text:soft-page-break/><text:span text:style-name="Source_20_Text"/></text:p>
        <text:list xml:id="list81119835235836" text:continue-numbering="true" text:style-name="L9">
          <text:list-item>
            <text:p text:style-name="P23"><text:span text:style-name="Source_20_Text"><text:span text:style-name="T29">listar funciones de un esquema (ventas,stock ...etc)</text:span></text:span></text:p>
          </text:list-item>
        </text:list>
        <text:p text:style-name="P33"><text:span text:style-name="Source_20_Text"><text:span text:style-name="T29"><text:tab/>\df *.stock</text:span></text:span></text:p>
        <text:list xml:id="list81120084675876" text:continue-numbering="true" text:style-name="L9">
          <text:list-item>
            <text:p text:style-name="P23"><text:span text:style-name="Source_20_Text"><text:span text:style-name="T29">ver el codigo de una funcion :</text:span></text:span></text:p>
          </text:list-item>
        </text:list>
        <text:p text:style-name="P33"><text:span text:style-name="Source_20_Text"><text:s text:c="6"/></text:span><text:span text:style-name="Source_20_Text"><text:span text:style-name="T29">\sf stock.reducir_stock</text:span></text:span></text:p>
        <text:p text:style-name="P33"><text:span text:style-name="Source_20_Text"><text:s text:c="6"/></text:span></text:p>
        <text:p text:style-name="P33"><text:span text:style-name="Source_20_Text"/></text:p>
        <text:p text:style-name="P33"><text:span text:style-name="Source_20_Text"/></text:p>
        <text:list xml:id="list81119390608535" text:continue-numbering="true" text:style-name="L9">
          <text:list-item>
            <text:p text:style-name="P45"><text:span text:style-name="Strong_20_Emphasis">Contar funciones</text:span></text:p>
            <text:p text:style-name="P45">sql</text:p>
            <text:p text:style-name="P20"><text:span text:style-name="Source_20_Text">SELECT COUNT(*) AS total_funciones</text:span></text:p>
            <text:p text:style-name="P20"><text:span text:style-name="Source_20_Text">FROM pg_proc p</text:span></text:p>
            <text:p text:style-name="P20"><text:span text:style-name="Source_20_Text">JOIN pg_namespace n ON p.pronamespace = n.oid</text:span></text:p>
            <text:p text:style-name="P21"><text:span text:style-name="Source_20_Text">WHERE n.nspname = 'ventas';</text:span></text:p>
          </text:list-item>
        </text:list>
        <text:h text:style-name="Heading_20_2" text:outline-level="2">🔐 Permisos de una tabla</text:h>
        <text:list xml:id="list4138706112" text:style-name="L10">
          <text:list-item>
            <text:p text:style-name="P46"><text:span text:style-name="Strong_20_Emphasis">Ver permisos de una tabla</text:span></text:p>
            <text:p text:style-name="P46">sql</text:p>
            <text:p text:style-name="P24"><text:span text:style-name="Source_20_Text">\z ventas.pedidos</text:span></text:p>
          </text:list-item>
        </text:list>
        <text:h text:style-name="Heading_20_2" text:outline-level="2"/>
        <text:p text:style-name="Text_20_body"/>
      </text:section>
      <text:section text:style-name="Sect1" text:name="uEQdu3KbzrWCfJWTQ2Qom-user-message">
        <text:p text:style-name="P35">estoy como jose y quiero cambiarme al rol de juani</text:p>
      </text:section>
      <text:section text:style-name="Sect1" text:name="5egq4iPAQ54jjsUAbyfx9-content-0">
        <text:p text:style-name="Text_20_body">Para “cambiarte” al rol <text:span text:style-name="Strong_20_Emphasis">juani</text:span>, Jose, hay dos formas posibles en PostgreSQL, y solo una funciona dependiendo de cómo hayas creado ese rol.</text:p>
        <text:p text:style-name="Text_20_body">Aquí tienes la explicación directa y sin rodeos.</text:p>
        <text:h text:style-name="Heading_20_2" text:outline-level="2">🎯 1) Si <text:span text:style-name="Strong_20_Emphasis">juani es un usuario con LOGIN</text:span></text:h>
        <text:p text:style-name="Text_20_body">(Es decir, un rol que puede conectarse)</text:p>
        <text:p text:style-name="Text_20_body">Entonces <text:span text:style-name="Strong_20_Emphasis">NO puedes cambiarte a él dentro de la sesión</text:span>. PostgreSQL no permite “convertirte” en otro usuario con LOGIN.</text:p>
        <text:p text:style-name="Text_20_body">En ese caso, solo puedes <text:span text:style-name="Strong_20_Emphasis">reconectar</text:span>:</text:p>
        <text:p text:style-name="Text_20_body">sql</text:p>
        <text:p text:style-name="P25"><text:span text:style-name="Source_20_Text">\c tienda_electronica juani</text:span></text:p>
        <text:p text:style-name="Text_20_body"><text:soft-page-break/>o con contraseña:</text:p>
        <text:p text:style-name="Text_20_body">sql</text:p>
        <text:p text:style-name="P25"><text:span text:style-name="Source_20_Text">\c "dbname=tienda_electronica user=juani password=TU_PASSWORD"</text:span></text:p>
        <text:h text:style-name="Heading_20_2" text:outline-level="2">🎯 2) Si <text:span text:style-name="Strong_20_Emphasis">juani es un rol sin LOGIN</text:span></text:h>
        <text:p text:style-name="Text_20_body">(Es decir, un rol de permisos, como “vendedor”, “auditor”, etc.)</text:p>
        <text:p text:style-name="Text_20_body">Entonces <text:span text:style-name="Strong_20_Emphasis">sí puedes activarlo</text:span> dentro de tu sesión actual:</text:p>
        <text:p text:style-name="Text_20_body">sql</text:p>
        <text:p text:style-name="P25"><text:span text:style-name="Source_20_Text">SET ROLE juani;</text:span></text:p>
        <text:p text:style-name="Text_20_body">Y para volver a tu usuario original:</text:p>
        <text:p text:style-name="Text_20_body">sql</text:p>
        <text:p text:style-name="P25"><text:span text:style-name="Source_20_Text">RESET ROLE;</text:span></text:p>
        <text:h text:style-name="Heading_20_2" text:outline-level="2">🧠 ¿Cómo saber si <text:span text:style-name="Source_20_Text">juani</text:span> es usuario o rol?</text:h>
        <text:p text:style-name="Text_20_body">Ejecuta:</text:p>
        <text:p text:style-name="Text_20_body">sql</text:p>
        <text:p text:style-name="Preformatted_20_Text"><text:span text:style-name="Source_20_Text">SELECT rolname, rolcanlogin</text:span></text:p>
        <text:p text:style-name="Preformatted_20_Text"><text:span text:style-name="Source_20_Text">FROM pg_roles</text:span></text:p>
        <text:p text:style-name="P25"><text:span text:style-name="Source_20_Text">WHERE rolname = 'juani';</text:span></text:p>
        <text:list xml:id="list4287670295" text:style-name="L13">
          <text:list-item>
            <text:p text:style-name="P47">Si <text:span text:style-name="Source_20_Text">rolcanlogin = true</text:span> → <text:span text:style-name="Strong_20_Emphasis">es usuario</text:span></text:p>
          </text:list-item>
          <text:list-item>
            <text:p text:style-name="P47">Si <text:span text:style-name="Source_20_Text">rolcanlogin = false</text:span> → <text:span text:style-name="Strong_20_Emphasis">es rol</text:span></text:p>
          </text:list-item>
        </text:list>
        <text:h text:style-name="Heading_20_2" text:outline-level="2">📌 Resumen rápido</text:h>
        <text:list xml:id="list159946621" text:style-name="L14">
          <text:list-item>
            <text:p text:style-name="P48"><text:span text:style-name="Strong_20_Emphasis">Si juani es usuario</text:span> → reconectar con <text:span text:style-name="Source_20_Text">\c</text:span></text:p>
          </text:list-item>
          <text:list-item>
            <text:p text:style-name="P48"><text:span text:style-name="Strong_20_Emphasis">Si juani es rol</text:span> → activar con <text:span text:style-name="Source_20_Text">SET ROLE juani;</text:span></text:p>
          </text:list-item>
        </text:list>
        <text:h text:style-name="Heading_20_2" text:outline-level="2">🔧 Comando para ver qué rol tienes activo ahora</text:h>
        <text:p text:style-name="Text_20_body">sql</text:p>
        <text:p text:style-name="P25"><text:span text:style-name="Source_20_Text">SELECT session_user, current_user;</text:span></text:p>
        <text:list xml:id="list1726803617" text:style-name="L15">
          <text:list-item>
            <text:p text:style-name="P49"><text:span text:style-name="Source_20_Text">session_user</text:span> → tú (jose)</text:p>
          </text:list-item>
          <text:list-item>
            <text:p text:style-name="P49"><text:span text:style-name="Source_20_Text">current_user</text:span> → el rol activo (si hiciste <text:span text:style-name="Source_20_Text">SET ROLE</text:span>)</text:p>
          </text:list-item>
        </text:list>
      </text:section>
      <text:p text:style-name="Standard"/>
      <text:h text:style-name="P1" text:outline-level="2"><text:soft-page-break/>🧠<text:span text:style-name="T24">POLITICAS.</text:span> </text:h>
      <text:h text:style-name="P1" text:outline-level="2"><text:span text:style-name="T1"><text:s/>. </text:span><text:span text:style-name="T6">ver las politicas actuales</text:span></text:h>
      <text:p text:style-name="P36"/>
      <text:p text:style-name="P26">SELECT policyname, roles, cmd, permissive, qual, with_check</text:p>
      <text:p text:style-name="P26">FROM pg_policies</text:p>
      <text:p text:style-name="P26">WHERE schemaname = 'ventas'</text:p>
      <text:p text:style-name="P26"><text:s text:c="2"/>AND tablename = 'pedidos';</text:p>
      <text:p text:style-name="P26"/>
      <text:p text:style-name="P26">. <text:span text:style-name="T14">HACER QUE UN USUARIO (JUANI) PUEDA SER GERENTE Y VER TODOS LOS PEDIDOS.</text:span></text:p>
      <text:p text:style-name="P27"><text:span text:style-name="T13">Sql</text:span></text:p>
      <text:p text:style-name="P31"><text:span text:style-name="T12"><text:s/>SELECT policyname, roles, cmd, permissive, qual, with_check</text:span></text:p>
      <text:p text:style-name="P31"><text:span text:style-name="T12">FROM pg_policies</text:span></text:p>
      <text:p text:style-name="P31"><text:span text:style-name="T12">WHERE schemaname = 'ventas'</text:span></text:p>
      <text:p text:style-name="P31"><text:span text:style-name="T12"><text:s text:c="2"/>AND tablename = 'pedidos';</text:span></text:p>
      <text:p text:style-name="P26"><text:span text:style-name="T14">-----------------</text:span></text:p>
      <text:p text:style-name="P26"><text:span text:style-name="T14"/></text:p>
      <text:p text:style-name="P29"><text:span text:style-name="T14">"pedidos_gerente"<text:tab/>"{gerente}"<text:tab/>"SELECT"<text:tab/>"</text:span><text:span text:style-name="T15">RESTRICTIVE</text:span><text:span text:style-name="T14">"<text:tab/>"true"<text:tab/></text:span></text:p>
      <text:p text:style-name="P26"><text:span text:style-name="T14">"pedidos_por_usuario"<text:tab/>"{public}"<text:tab/>"SELECT"<text:tab/>"PERMISSIVE" "(usuario = CURRENT_USER)"<text:tab/></text:span></text:p>
      <text:p text:style-name="P26"><text:span text:style-name="T14"/></text:p>
      <text:p text:style-name="P26"><text:span text:style-name="T14"><text:tab/></text:span></text:p>
      <text:p text:style-name="P26"><text:span text:style-name="T22"/></text:p>
      <text:p text:style-name="P26"><text:span text:style-name="T22">-- 1. Le quitamos el rol de cliente a Juani</text:span></text:p>
      <text:p text:style-name="P26"><text:span text:style-name="T22">REVOKE vendedor FROM juani;</text:span></text:p>
      <text:p text:style-name="P26"><text:span text:style-name="T22"/></text:p>
      <text:p text:style-name="P26"><text:span text:style-name="T22">-- 2. Le asignamos el nuevo rol de gerente</text:span></text:p>
      <text:p text:style-name="P26"><text:span text:style-name="T22">GRANT gerente TO juani;</text:span></text:p>
      <text:p text:style-name="P26"><text:span text:style-name="T22"/></text:p>
      <text:h text:style-name="P2" text:outline-level="3"><text:span text:style-name="T22">1. El peligro del tipo </text:span><text:span text:style-name="Source_20_Text"><text:span text:style-name="T22">RESTRICTIVE</text:span></text:span><text:span text:style-name="T22"> (Restringido)</text:span></text:h>
      <text:p text:style-name="Text_20_body">Tienes la política de gerentes configurada como <text:span text:style-name="Source_20_Text"><text:span text:style-name="T2">RESTRICTIVE</text:span></text:span>, mientras que la de usuarios normales está como <text:span text:style-name="Source_20_Text"><text:span text:style-name="T2">PERMISSIVE</text:span></text:span>.</text:p>
      <text:p text:style-name="Text_20_body">En PostgreSQL, las políticas funcionan así:</text:p>
      <text:list xml:id="list3445156868" text:style-name="L16">
        <text:list-item>
          <text:p text:style-name="P51">Las políticas <text:span text:style-name="Source_20_Text"><text:span text:style-name="T2">PERMISSIVE</text:span></text:span> (Permisivas) se suman con un <text:span text:style-name="Source_20_Text"><text:span text:style-name="T2">OR</text:span></text:span>.</text:p>
        </text:list-item>
        <text:list-item>
          <text:p text:style-name="P51">Las políticas <text:span text:style-name="Source_20_Text"><text:span text:style-name="T2">RESTRICTIVE</text:span></text:span> (Restrictivas) se aplican después como un filtro obligatorio usando un <text:span text:style-name="Source_20_Text"><text:span text:style-name="T2">AND</text:span></text:span>.</text:p>
        </text:list-item>
      </text:list>
      <text:p text:style-name="Text_20_body">Al poner la de gerente como <text:span text:style-name="Source_20_Text">RESTRICTIVE</text:span>, le estás diciendo a PostgreSQL: <text:span text:style-name="T25">"No importa qué diga cualquier otra política, </text:span><text:span text:style-name="T26">obligatoriamente</text:span><text:span text:style-name="T25"> se tiene que cumplir la condición de gerente"</text:span>. Como Juani es gerente, pasa ese filtro, pero luego PostgreSQL lo evalúa contra la política permisiva <text:span text:style-name="Source_20_Text">(usuario = CURRENT_USER)</text:span>. Como ambas se terminan cruzando de forma estricta por culpa del diseño, Juani queda atrapado viendo solo lo suyo.</text:p>
      <text:h text:style-name="Heading_20_3" text:outline-level="3">2. La condición <text:span text:style-name="Source_20_Text">(usuario = CURRENT_USER)</text:span></text:h>
      <text:p text:style-name="Text_20_body">Tu política permisiva dice exactamente <text:span text:style-name="Source_20_Text">usuario = CURRENT_USER</text:span>. Si Juani está conectado como <text:span text:style-name="Source_20_Text">juani</text:span>, el motor solo le va a devolver las filas donde la columna <text:span text:style-name="Source_20_Text">usuario</text:span> sea exactamente igual a <text:span text:style-name="Source_20_Text">'juani'</text:span>.</text:p>
      <text:h text:style-name="Heading_20_2" text:outline-level="2"><text:soft-page-break/>🛠️ Cómo solucionarlo ahora mismo</text:h>
      <text:p text:style-name="Text_20_body">Para que Juani (y cualquier gerente) pueda ver todos los pedidos, <text:span text:style-name="T2">todas las políticas de consulta (SELECT) deben ser </text:span><text:span text:style-name="Source_20_Text"><text:span text:style-name="T2">PERMISSIVE</text:span></text:span>. De esa forma, PostgreSQL dirá: <text:span text:style-name="T25">"O ves tus propios pedidos </text:span><text:span text:style-name="Source_20_Text"><text:span text:style-name="T25">OR</text:span></text:span><text:span text:style-name="T25"> eres gerente y ves todo"</text:span>.</text:p>
      <text:p text:style-name="Text_20_body">Ejecuta este código como administrador para borrar esas políticas y crearlas correctamente:</text:p>
      <text:p text:style-name="Text_20_body">SQL</text:p>
      <text:p text:style-name="Preformatted_20_Text"><text:span text:style-name="Source_20_Text"><text:s/>-- 1. Borramos las políticas problemáticas que tienes actualmente</text:span></text:p>
      <text:p text:style-name="Preformatted_20_Text"><text:span text:style-name="Source_20_Text">DROP POLICY IF EXISTS pedidos_gerente ON ventas.pedidos;</text:span></text:p>
      <text:p text:style-name="Preformatted_20_Text"><text:span text:style-name="Source_20_Text">DROP POLICY IF EXISTS pedidos_por_usuario ON ventas.pedidos;</text:span></text:p>
      <text:p text:style-name="Preformatted_20_Text"><text:span text:style-name="Source_20_Text"/></text:p>
      <text:p text:style-name="Preformatted_20_Text"><text:span text:style-name="Source_20_Text">-- 2. Creamos la política para usuarios normales (Permisiva)</text:span></text:p>
      <text:p text:style-name="Preformatted_20_Text"><text:span text:style-name="Source_20_Text">CREATE POLICY pedidos_por_usuario </text:span></text:p>
      <text:p text:style-name="Preformatted_20_Text"><text:span text:style-name="Source_20_Text">ON ventas.pedidos</text:span></text:p>
      <text:p text:style-name="Preformatted_20_Text"><text:span text:style-name="Source_20_Text">AS PERMISSIVE</text:span></text:p>
      <text:p text:style-name="Preformatted_20_Text"><text:span text:style-name="Source_20_Text">FOR SELECT</text:span></text:p>
      <text:p text:style-name="Preformatted_20_Text"><text:span text:style-name="Source_20_Text">TO public</text:span></text:p>
      <text:p text:style-name="Preformatted_20_Text"><text:span text:style-name="Source_20_Text">USING (usuario = CURRENT_USER);</text:span></text:p>
      <text:p text:style-name="Preformatted_20_Text"><text:span text:style-name="Source_20_Text"/></text:p>
      <text:p text:style-name="Preformatted_20_Text"><text:span text:style-name="Source_20_Text">-- 3. Creamos la política para gerentes (¡También Permisiva!)</text:span></text:p>
      <text:p text:style-name="Preformatted_20_Text"><text:span text:style-name="Source_20_Text">CREATE POLICY pedidos_gerente </text:span></text:p>
      <text:p text:style-name="Preformatted_20_Text"><text:span text:style-name="Source_20_Text">ON ventas.pedidos</text:span></text:p>
      <text:p text:style-name="Preformatted_20_Text"><text:span text:style-name="Source_20_Text">AS PERMISSIVE</text:span></text:p>
      <text:p text:style-name="Preformatted_20_Text"><text:span text:style-name="Source_20_Text">FOR SELECT</text:span></text:p>
      <text:p text:style-name="Preformatted_20_Text"><text:span text:style-name="Source_20_Text">TO gerente</text:span></text:p>
      <text:p text:style-name="Preformatted_20_Text"><text:span text:style-name="Source_20_Text">USING (true); -- "true" significa que el rol gerente tiene permitido ver TODAS las filas</text:span></text:p>
      <text:p text:style-name="Preformatted_20_Text"><text:span text:style-name="Source_20_Text"/></text:p>
      <text:p text:style-name="Preformatted_20_Text"><text:span text:style-name="Source_20_Text"/></text:p>
      <text:p text:style-name="P31"><text:span text:style-name="T12"><text:s/>SELECT policyname, roles, cmd, permissive, qual, with_check</text:span></text:p>
      <text:p text:style-name="P31"><text:span text:style-name="T12">FROM pg_policies</text:span></text:p>
      <text:p text:style-name="P31"><text:span text:style-name="T12">WHERE schemaname = 'ventas'</text:span></text:p>
      <text:p text:style-name="P31"><text:span text:style-name="T12"><text:s text:c="2"/>AND tablename = 'pedidos';</text:span></text:p>
      <text:p text:style-name="P28"><text:span text:style-name="T14">-----------------</text:span></text:p>
      <text:p text:style-name="P28"><text:span text:style-name="T14">"pedidos_por_usuario"<text:tab/>"{public}"<text:tab/>"SELECT"<text:tab/>"PERMISSIVE" "(usuario = CURRENT_USER)"<text:tab/></text:span></text:p>
      <text:p text:style-name="P28"><text:span text:style-name="T14"/></text:p>
      <text:p text:style-name="P28"><text:span text:style-name="T14">"pedidos_gerente"<text:tab/>"{gerente}"<text:tab/>"SELECT"<text:tab/>"PERMISSIVE"<text:tab/>"true"<text:tab/></text:span></text:p>
      <text:p text:style-name="P28"><text:span text:style-name="Source_20_Text"><text:span text:style-name="T7"/></text:span></text:p>
      <text:h text:style-name="Heading_20_3" text:outline-level="3">¿Por qué esto sí va a funcionar?</text:h>
      <text:p text:style-name="Text_20_body">Al ser ambas políticas <text:span text:style-name="Source_20_Text"><text:span text:style-name="T2">PERMISSIVE</text:span></text:span>, PostgreSQL las unirá con un <text:span text:style-name="Source_20_Text"><text:span text:style-name="T2">OR</text:span></text:span>.</text:p>
      <text:p text:style-name="Text_20_body">Cuando Juani consulte la tabla:</text:p>
      <text:list xml:id="list911961962" text:style-name="L17">
        <text:list-item>
          <text:p text:style-name="P52">¿El pedido es de Juani? (Política 1).</text:p>
        </text:list-item>
        <text:list-item>
          <text:p text:style-name="P52">¿Juani pertenece al rol <text:span text:style-name="Source_20_Text">gerente</text:span>? <text:span text:style-name="T2">Sí</text:span>, por lo tanto la Política 2 devuelve <text:span text:style-name="Source_20_Text">true</text:span> para <text:span text:style-name="T2">todas</text:span> las filas de la tabla.</text:p>
        </text:list-item>
        <text:list-item>
          <text:p text:style-name="P52">Como <text:span text:style-name="Source_20_Text">Falso OR True = True</text:span>, ¡Juani podrá ver el listado completo de pedidos automáticamente!</text:p>
        </text:list-item>
      </text:list>
      <text:p text:style-name="P26"><text:span text:style-name="T22"/></text:p>
      <text:p text:style-name="P26"/>
      <text:p text:style-name="P26"/>
      <text:h text:style-name="P1" text:outline-level="2"><text:soft-page-break/><text:span text:style-name="T4">🔧 </text:span><text:span text:style-name="T17">TRIGERS-</text:span></text:h>
      <text:p text:style-name="P53"><text:span text:style-name="T17"><text:s/>. </text:span><text:span text:style-name="T19">ver todos los triguers</text:span></text:p>
      <text:p text:style-name="P26">SELECT </text:p>
      <text:p text:style-name="P26"><text:s text:c="4"/>tgname AS nombre_trigger,</text:p>
      <text:p text:style-name="P26"><text:s text:c="4"/>relname AS tabla_asociada,</text:p>
      <text:p text:style-name="P26"><text:s text:c="4"/>pg_get_triggerdef(pg_trigger.oid) AS codigo_completo_del_trigger</text:p>
      <text:p text:style-name="P26">FROM pg_trigger</text:p>
      <text:p text:style-name="P26">JOIN pg_class ON pg_trigger.tgrelid = pg_class.oid</text:p>
      <text:p text:style-name="P26">JOIN pg_namespace ON pg_class.relnamespace = pg_namespace.oid</text:p>
      <text:p text:style-name="P26">WHERE tgisinternal = false </text:p>
      <text:p text:style-name="P26"><text:s text:c="2"/>AND nspname NOT IN ('pg_catalog', 'information_schema');</text:p>
      <text:p text:style-name="P26"/>
      <text:p text:style-name="P26">-------------</text:p>
      <text:p text:style-name="P30">\dy</text:p>
      <text:p text:style-name="P30"/>
      <text:p text:style-name="P30"><text:s/>.<text:span text:style-name="T3"> ver triggers de una tabla:</text:span></text:p>
      <text:p text:style-name="P30"/>
      <text:p text:style-name="P30"><text:s text:c="3"/>\d ventas.pedidos</text:p>
      <text:h text:style-name="P1" text:outline-level="2"><text:span text:style-name="T5"><text:s text:c="2"/></text:span><text:span text:style-name="T10">. <text:s/>Script</text:span><text:span text:style-name="T9"> para ver qué ver </text:span><text:span text:style-name="T11">el trigger junto con su función</text:span></text:h>
      <text:p text:style-name="P50"><text:span text:style-name="T8"/></text:p>
      <text:p text:style-name="P26">SELECT </text:p>
      <text:p text:style-name="P26"><text:s text:c="4"/>tbl.relname AS tabla,</text:p>
      <text:p text:style-name="P26"><text:s text:c="4"/>trg.tgname AS nombre_trigger,</text:p>
      <text:p text:style-name="P26"><text:s text:c="4"/>-- Aquí vemos la definición del disparador (CREATE TRIGGER...)</text:p>
      <text:p text:style-name="P26"><text:s text:c="4"/>pg_get_triggerdef(trg.oid) AS definicion_del_trigger,</text:p>
      <text:p text:style-name="P26"><text:s text:c="4"/>-- Aquí vemos el código interno de la función que ejecuta</text:p>
      <text:p text:style-name="P26"><text:s text:c="4"/>p.prosrc AS codigo_interno_funcion</text:p>
      <text:p text:style-name="P26">FROM pg_trigger trg</text:p>
      <text:p text:style-name="P26">JOIN pg_class tbl ON trg.tgrelid = tbl.oid</text:p>
      <text:p text:style-name="P26">JOIN pg_proc p ON trg.tgfoid = p.oid</text:p>
      <text:p text:style-name="P26">WHERE trg.tgisinternal = fals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06:53:48.800474448</meta:creation-date>
    <dc:date>2026-07-06T08:11:18.164214893</dc:date>
    <meta:editing-duration>PT2M39S</meta:editing-duration>
    <meta:editing-cycles>1</meta:editing-cycles>
    <meta:document-statistic meta:table-count="0" meta:image-count="0" meta:object-count="0" meta:page-count="8" meta:paragraph-count="237" meta:word-count="1307" meta:character-count="8008" meta:non-whitespace-character-count="6934"/>
    <meta:generator>LibreOffice/7.3.7.2$Linux_X86_64 LibreOffice_project/30$Build-2</meta:generator>
  </office:meta>
</office:document-meta>
</file>