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359cm"/>
    </style:style>
    <style:style style:name="Tabla1.B" style:family="table-column">
      <style:table-column-properties style:column-width="3.918cm"/>
    </style:style>
    <style:style style:name="Tabla1.C" style:family="table-column">
      <style:table-column-properties style:column-width="4.5cm"/>
    </style:style>
    <style:style style:name="Tabla1.D" style:family="table-column">
      <style:table-column-properties style:column-width="4.225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style:font-name="quote-cjk-patch" fo:font-size="11.25pt" fo:font-style="normal" fo:font-weight="normal"/>
    </style:style>
    <style:style style:name="T3" style:family="text">
      <style:text-properties fo:color="#e9ae7e" loext:opacity="100%"/>
    </style:style>
    <style:style style:name="T4" style:family="text">
      <style:text-properties fo:color="#e9ae7e" loext:opacity="100%" style:font-name="Menlo" fo:font-size="9.75pt" fo:font-style="normal" fo:font-weight="normal"/>
    </style:style>
    <style:style style:name="T5" style:family="text">
      <style:text-properties fo:color="#91d076" loext:opacity="100%"/>
    </style:style>
    <style:style style:name="T6" style:family="text">
      <style:text-properties fo:color="#91d076" loext:opacity="100%" style:font-name="Menlo" fo:font-size="9.75pt" fo:font-style="normal" fo:font-weight="normal"/>
    </style:style>
    <style:style style:name="T7" style:family="text">
      <style:text-properties fo:color="#e3eaf2" loext:opacity="100%"/>
    </style:style>
    <style:style style:name="T8" style:family="text">
      <style:text-properties fo:color="#e3eaf2" loext:opacity="100%" style:font-name="Menlo" fo:font-size="9.75pt" fo:font-style="normal" fo:font-weight="normal"/>
    </style:style>
    <style:style style:name="T9" style:family="text">
      <style:text-properties style:font-name="Menlo" fo:font-size="9.75pt" fo:font-style="normal" fo:font-weight="normal"/>
    </style:style>
    <style:style style:name="T10" style:family="text">
      <style:text-properties fo:color="#e6d37a" loext:opacity="100%"/>
    </style:style>
    <style:style style:name="T11" style:family="text">
      <style:text-properties fo:color="#e6d37a" loext:opacity="100%" style:font-name="Menlo" fo:font-size="9.75pt" fo:font-style="normal" fo:font-weight="normal"/>
    </style:style>
    <style:style style:name="T12" style:family="text">
      <style:text-properties fo:color="#8da1b9" loext:opacity="100%"/>
    </style:style>
    <style:style style:name="T13" style:family="text">
      <style:text-properties fo:color="#8da1b9" loext:opacity="100%" style:font-name="Menlo" fo:font-size="9.75pt" fo:font-style="normal" fo:font-weight="normal"/>
    </style:style>
    <style:style style:name="T14" style:family="text">
      <style:text-properties fo:color="#c699e3" loext:opacity="100%"/>
    </style:style>
    <style:style style:name="T15" style:family="text">
      <style:text-properties fo:color="#c699e3" loext:opacity="100%" style:font-name="Menlo" fo:font-size="9.75pt" fo:font-style="normal" fo:font-weight="normal"/>
    </style:style>
    <style:style style:name="T16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800080" loext:opacity="100%" style:font-name="quote-cjk-patch" fo:font-size="18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cm" loext:border="none"/>
    </style:style>
    <style:style style:name="T20" style:family="text">
      <style:text-properties fo:font-variant="normal" fo:text-transform="none" fo:color="#800080" loext:opacity="100%" style:font-name="Menlo" fo:font-size="18pt" fo:letter-spacing="normal" fo:font-style="normal" fo:font-weight="bold" fo:background-color="#2c2c2e" loext:char-shading-value="0" loext:padding="0cm" loext:border="none"/>
    </style:style>
    <style:style style:name="T21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2c2c2e" loext:char-shading-value="0" loext:padding="0cm" loext:border="none"/>
    </style:style>
    <style:style style:name="T22" style:family="text">
      <style:text-properties fo:font-variant="normal" fo:text-transform="none" fo:color="#800080" loext:opacity="100%" fo:letter-spacing="normal" loext:padding="0cm" loext:border="none"/>
    </style:style>
    <style:style style:name="T23" style:family="text">
      <style:text-properties fo:font-variant="normal" fo:text-transform="none" style:font-name="quote-cjk-patch" fo:font-size="11.25pt" fo:font-style="normal" fo:font-weight="normal"/>
    </style:style>
    <style:style style:name="T24" style:family="text">
      <style:text-properties fo:font-variant="normal" fo:text-transform="none" style:font-name="quote-cjk-patch" fo:font-size="11.25pt" fo:font-style="normal" fo:font-weight="bold"/>
    </style:style>
    <style:style style:name="T25" style:family="text">
      <style:text-properties fo:color="#6cb8e6" loext:opacity="100%"/>
    </style:style>
    <style:style style:name="T26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9" text:anchor-type="page" text:anchor-page-number="1" svg:x="0.37cm" svg:y="0.37cm" svg:width="0.741cm" draw:z-index="18">
        <draw:text-box fo:min-height="0.741cm">
          <text:p text:style-name="Text_20_body"/>
        </draw:text-box>
      </draw:frame>
      <draw:frame draw:style-name="fr1" draw:name="Marco18" text:anchor-type="page" text:anchor-page-number="1" svg:x="0.37cm" svg:y="0.37cm" svg:width="0.741cm" draw:z-index="17">
        <draw:text-box fo:min-height="0.741cm">
          <text:p text:style-name="Text_20_body"/>
        </draw:text-box>
      </draw:frame>
      <draw:frame draw:style-name="fr1" draw:name="Marco17" text:anchor-type="page" text:anchor-page-number="1" svg:x="0.37cm" svg:y="0.37cm" svg:width="0.741cm" draw:z-index="16">
        <draw:text-box fo:min-height="0.741cm">
          <text:p text:style-name="Text_20_body"/>
        </draw:text-box>
      </draw:frame>
      <draw:frame draw:style-name="fr1" draw:name="Marco16" text:anchor-type="page" text:anchor-page-number="1" svg:x="0.37cm" svg:y="0.37cm" svg:width="0.741cm" draw:z-index="15">
        <draw:text-box fo:min-height="0.741cm">
          <text:p text:style-name="Text_20_body"/>
        </draw:text-box>
      </draw:frame>
      <draw:frame draw:style-name="fr1" draw:name="Marco15" text:anchor-type="page" text:anchor-page-number="1" svg:x="0.37cm" svg:y="0.37cm" svg:width="0.741cm" draw:z-index="14">
        <draw:text-box fo:min-height="0.741cm">
          <text:p text:style-name="Text_20_body"/>
        </draw:text-box>
      </draw:frame>
      <draw:frame draw:style-name="fr1" draw:name="Marco14" text:anchor-type="page" text:anchor-page-number="1" svg:x="0.37cm" svg:y="0.37cm" svg:width="0.741cm" draw:z-index="13">
        <draw:text-box fo:min-height="0.741cm">
          <text:p text:style-name="Text_20_body"/>
        </draw:text-box>
      </draw:frame>
      <draw:frame draw:style-name="fr1" draw:name="Marco13" text:anchor-type="page" text:anchor-page-number="1" svg:x="0.37cm" svg:y="0.37cm" svg:width="0.741cm" draw:z-index="12">
        <draw:text-box fo:min-height="0.741cm">
          <text:p text:style-name="Text_20_body"/>
        </draw:text-box>
      </draw:frame>
      <draw:frame draw:style-name="fr1" draw:name="Marco12" text:anchor-type="page" text:anchor-page-number="1" svg:x="0.37cm" svg:y="0.37cm" svg:width="0.741cm" draw:z-index="11">
        <draw:text-box fo:min-height="0.741cm">
          <text:p text:style-name="Text_20_body"/>
        </draw:text-box>
      </draw:frame>
      <draw:frame draw:style-name="fr1" draw:name="Marco11" text:anchor-type="page" text:anchor-page-number="1" svg:x="0.37cm" svg:y="0.37cm" svg:width="0.741cm" draw:z-index="10">
        <draw:text-box fo:min-height="0.741cm">
          <text:p text:style-name="Text_20_body"/>
        </draw:text-box>
      </draw:frame>
      <draw:frame draw:style-name="fr1" draw:name="Marco10" text:anchor-type="page" text:anchor-page-number="1" svg:x="0.37cm" svg:y="0.37cm" svg:width="0.741cm" draw:z-index="9">
        <draw:text-box fo:min-height="0.741cm">
          <text:p text:style-name="Text_20_body"/>
        </draw:text-box>
      </draw:frame>
      <draw:frame draw:style-name="fr1" draw:name="Marco9" text:anchor-type="page" text:anchor-page-number="1" svg:x="0.37cm" svg:y="0.37cm" svg:width="0.741cm" draw:z-index="8">
        <draw:text-box fo:min-height="0.741cm">
          <text:p text:style-name="Text_20_body"/>
        </draw:text-box>
      </draw:frame>
      <draw:frame draw:style-name="fr1" draw:name="Marco8" text:anchor-type="page" text:anchor-page-number="1" svg:x="0.37cm" svg:y="0.37cm" svg:width="0.741cm" draw:z-index="7">
        <draw:text-box fo:min-height="0.741cm">
          <text:p text:style-name="Text_20_body"/>
        </draw:text-box>
      </draw:frame>
      <draw:frame draw:style-name="fr1" draw:name="Marco7" text:anchor-type="page" text:anchor-page-number="1" svg:x="0.37cm" svg:y="0.37cm" svg:width="0.741cm" draw:z-index="6">
        <draw:text-box fo:min-height="0.741cm">
          <text:p text:style-name="Text_20_body"/>
        </draw:text-box>
      </draw:frame>
      <draw:frame draw:style-name="fr1" draw:name="Marco6" text:anchor-type="page" text:anchor-page-number="1" svg:x="0.37cm" svg:y="0.37cm" svg:width="0.741cm" draw:z-index="5">
        <draw:text-box fo:min-height="0.741cm">
          <text:p text:style-name="Text_20_body"/>
        </draw:text-box>
      </draw:frame>
      <draw:frame draw:style-name="fr1" draw:name="Marco5" text:anchor-type="page" text:anchor-page-number="1" svg:x="0.37cm" svg:y="0.37cm" svg:width="0.741cm" draw:z-index="4">
        <draw:text-box fo:min-height="0.741cm">
          <text:p text:style-name="Text_20_body"/>
        </draw:text-box>
      </draw:frame>
      <draw:frame draw:style-name="fr1" draw:name="Marco4" text:anchor-type="page" text:anchor-page-number="1" svg:x="0.37cm" svg:y="0.37cm" svg:width="0.741cm" draw:z-index="3">
        <draw:text-box fo:min-height="0.741cm">
          <text:p text:style-name="Text_20_body"/>
        </draw:text-box>
      </draw:frame>
      <draw:frame draw:style-name="fr1" draw:name="Marco3" text:anchor-type="page" text:anchor-page-number="1" svg:x="0.37cm" svg:y="0.37cm" svg:width="0.741cm" draw:z-index="2">
        <draw:text-box fo:min-height="0.741cm">
          <text:p text:style-name="Text_20_body"/>
        </draw:text-box>
      </draw:frame>
      <draw:frame draw:style-name="fr1" draw:name="Marco2" text:anchor-type="page" text:anchor-page-number="1" svg:x="0.37cm" svg:y="0.37cm" svg:width="0.741cm" draw:z-index="1">
        <draw:text-box fo:min-height="0.741cm">
          <text:p text:style-name="Text_20_body"/>
        </draw:text-box>
      </draw:frame>
      <draw:frame draw:style-name="fr1" draw:name="Marco1" text:anchor-type="page" text:anchor-page-number="1" svg:x="0.37cm" svg:y="0.37cm" svg:width="0.741cm" draw:z-index="0">
        <draw:text-box fo:min-height="0.741cm">
          <text:p text:style-name="Text_20_body"/>
        </draw:text-box>
      </draw:frame>
      <text:h text:style-name="Heading_20_1" text:outline-level="1">Proyecto Completo para Restaurante Pequeño - PostgreSQL 18</text:h>
      <text:h text:style-name="Heading_20_2" text:outline-level="2">📋 Estructura del Proyecto</text:h>
      <text:p text:style-name="Text_20_body">sql</text:p>
      <text:p text:style-name="Preformatted_20_Text">-- =====================================================</text:p>
      <text:p text:style-name="Preformatted_20_Text">-- PROYECTO RESTAURANTE "SABOR CASA"</text:p>
      <text:p text:style-name="Preformatted_20_Text">-- PostgreSQL 18 - Versión Simplificada</text:p>
      <text:p text:style-name="Preformatted_20_Text">-- =====================================================</text:p>
      <text:p text:style-name="Preformatted_20_Text"/>
      <text:p text:style-name="Preformatted_20_Text">-- 1. CREACIÓN DE TABLESPACE</text:p>
      <text:p text:style-name="Preformatted_20_Text">-- =====================================================</text:p>
      <text:p text:style-name="Preformatted_20_Text">-- Directorio: /var/lib/postgresql/18/tablespaces/restaurante</text:p>
      <text:p text:style-name="Preformatted_20_Text">CREATE TABLESPACE ts_restaurante</text:p>
      <text:p text:style-name="Preformatted_20_Text">OWNER postgres</text:p>
      <text:p text:style-name="Preformatted_20_Text">LOCATION '/var/lib/postgresql/18/tablespaces/restaurante';</text:p>
      <text:p text:style-name="Preformatted_20_Text"/>
      <text:p text:style-name="Preformatted_20_Text">-- 2. CREACIÓN DE ROLES Y USUARIOS</text:p>
      <text:p text:style-name="Preformatted_20_Text">-- =====================================================</text:p>
      <text:p text:style-name="Preformatted_20_Text">-- Rol de administrador</text:p>
      <text:p text:style-name="Preformatted_20_Text">CREATE ROLE admin_restaurante WITH </text:p>
      <text:p text:style-name="Preformatted_20_Text"><text:s text:c="4"/>LOGIN </text:p>
      <text:p text:style-name="Preformatted_20_Text"><text:s text:c="4"/>SUPERUSER </text:p>
      <text:p text:style-name="Preformatted_20_Text"><text:s text:c="4"/>PASSWORD 'Admin123!';</text:p>
      <text:p text:style-name="Preformatted_20_Text"/>
      <text:p text:style-name="Preformatted_20_Text">-- Rol para gerente</text:p>
      <text:p text:style-name="Preformatted_20_Text">CREATE ROLE gerente WITH </text:p>
      <text:p text:style-name="Preformatted_20_Text"><text:s text:c="4"/>LOGIN </text:p>
      <text:p text:style-name="Preformatted_20_Text"><text:s text:c="4"/>CREATEDB </text:p>
      <text:p text:style-name="Preformatted_20_Text"><text:s text:c="4"/>PASSWORD 'Gerente123!';</text:p>
      <text:p text:style-name="Preformatted_20_Text"/>
      <text:p text:style-name="Preformatted_20_Text">-- Rol para meseros (solo consultas)</text:p>
      <text:p text:style-name="Preformatted_20_Text">CREATE ROLE mesero WITH </text:p>
      <text:p text:style-name="Preformatted_20_Text"><text:s text:c="4"/>LOGIN </text:p>
      <text:p text:style-name="Preformatted_20_Text"><text:s text:c="4"/>PASSWORD 'Mesero123!';</text:p>
      <text:p text:style-name="Preformatted_20_Text"/>
      <text:p text:style-name="Preformatted_20_Text">-- Rol para cocina (solo insert/update en pedidos)</text:p>
      <text:p text:style-name="Preformatted_20_Text">CREATE ROLE cocina WITH </text:p>
      <text:p text:style-name="Preformatted_20_Text"><text:s text:c="4"/>LOGIN </text:p>
      <text:p text:style-name="Preformatted_20_Text"><text:s text:c="4"/>PASSWORD 'Cocina123!';</text:p>
      <text:p text:style-name="Preformatted_20_Text"/>
      <text:p text:style-name="Preformatted_20_Text">-- 3. CREACIÓN DE BASE DE DATOS</text:p>
      <text:p text:style-name="Preformatted_20_Text">-- =====================================================</text:p>
      <text:p text:style-name="Preformatted_20_Text">CREATE DATABASE restaurante_db</text:p>
      <text:p text:style-name="Preformatted_20_Text">OWNER admin_restaurante</text:p>
      <text:p text:style-name="Preformatted_20_Text">TABLESPACE ts_restaurante</text:p>
      <text:p text:style-name="Preformatted_20_Text">ENCODING 'UTF8'</text:p>
      <text:p text:style-name="Preformatted_20_Text">LC_COLLATE 'es_ES.UTF-8'</text:p>
      <text:p text:style-name="Preformatted_20_Text">LC_CTYPE 'es_ES.UTF-8'</text:p>
      <text:p text:style-name="Preformatted_20_Text">CONNECTION LIMIT 50;</text:p>
      <text:p text:style-name="Preformatted_20_Text"/>
      <text:p text:style-name="Preformatted_20_Text">-- Conectar a la base de datos</text:p>
      <text:p text:style-name="Preformatted_20_Text">\c restaurante_db</text:p>
      <text:p text:style-name="Preformatted_20_Text"/>
      <text:p text:style-name="Preformatted_20_Text">-- 4. CREACIÓN DE SCHEMA</text:p>
      <text:p text:style-name="Preformatted_20_Text"><text:soft-page-break/>-- =====================================================</text:p>
      <text:p text:style-name="Preformatted_20_Text">CREATE SCHEMA restaurante AUTHORIZATION admin_restaurante;</text:p>
      <text:p text:style-name="Preformatted_20_Text"/>
      <text:p text:style-name="Preformatted_20_Text">-- Configurar schema por defecto</text:p>
      <text:p text:style-name="Preformatted_20_Text">SET search_path TO restaurante;</text:p>
      <text:p text:style-name="Preformatted_20_Text"/>
      <text:p text:style-name="Preformatted_20_Text">-- 5. CREACIÓN DE TABLAS (Modelo Simplificado)</text:p>
      <text:p text:style-name="Preformatted_20_Text">-- =====================================================</text:p>
      <text:p text:style-name="Preformatted_20_Text"/>
      <text:p text:style-name="Preformatted_20_Text">-- Tabla de categorías</text:p>
      <text:p text:style-name="Preformatted_20_Text">CREATE TABLE categorias (</text:p>
      <text:p text:style-name="Preformatted_20_Text"><text:s text:c="4"/>id_categoria SERIAL PRIMARY KEY,</text:p>
      <text:p text:style-name="Preformatted_20_Text"><text:s text:c="4"/>nombre VARCHAR(50) NOT NULL UNIQUE,</text:p>
      <text:p text:style-name="Preformatted_20_Text"><text:s text:c="4"/>descripcion TEXT,</text:p>
      <text:p text:style-name="Preformatted_20_Text"><text:s text:c="4"/>activo BOOLEAN DEFAULT true</text:p>
      <text:p text:style-name="Preformatted_20_Text">);</text:p>
      <text:p text:style-name="Preformatted_20_Text"/>
      <text:p text:style-name="Preformatted_20_Text">-- Tabla de productos/menú</text:p>
      <text:p text:style-name="Preformatted_20_Text">CREATE TABLE productos (</text:p>
      <text:p text:style-name="Preformatted_20_Text"><text:s text:c="4"/>id_producto SERIAL PRIMARY KEY,</text:p>
      <text:p text:style-name="Preformatted_20_Text"><text:s text:c="4"/>nombre VARCHAR(100) NOT NULL,</text:p>
      <text:p text:style-name="Preformatted_20_Text"><text:s text:c="4"/>precio DECIMAL(10,2) NOT NULL CHECK (precio &gt; 0),</text:p>
      <text:p text:style-name="Preformatted_20_Text"><text:s text:c="4"/>id_categoria INT REFERENCES categorias(id_categoria),</text:p>
      <text:p text:style-name="Preformatted_20_Text"><text:s text:c="4"/>stock INT DEFAULT 0,</text:p>
      <text:p text:style-name="Preformatted_20_Text"><text:s text:c="4"/>activo BOOLEAN DEFAULT true</text:p>
      <text:p text:style-name="Preformatted_20_Text">);</text:p>
      <text:p text:style-name="Preformatted_20_Text"/>
      <text:p text:style-name="Preformatted_20_Text">-- Tabla de clientes</text:p>
      <text:p text:style-name="Preformatted_20_Text">CREATE TABLE clientes (</text:p>
      <text:p text:style-name="Preformatted_20_Text"><text:s text:c="4"/>id_cliente SERIAL PRIMARY KEY,</text:p>
      <text:p text:style-name="Preformatted_20_Text"><text:s text:c="4"/>nombre VARCHAR(100) NOT NULL,</text:p>
      <text:p text:style-name="Preformatted_20_Text"><text:s text:c="4"/>telefono VARCHAR(15),</text:p>
      <text:p text:style-name="Preformatted_20_Text"><text:s text:c="4"/>email VARCHAR(100),</text:p>
      <text:p text:style-name="Preformatted_20_Text"><text:s text:c="4"/>fecha_registro DATE DEFAULT CURRENT_DATE</text:p>
      <text:p text:style-name="Preformatted_20_Text">);</text:p>
      <text:p text:style-name="Preformatted_20_Text"/>
      <text:p text:style-name="Preformatted_20_Text">-- Tabla de mesas</text:p>
      <text:p text:style-name="Preformatted_20_Text">CREATE TABLE mesas (</text:p>
      <text:p text:style-name="Preformatted_20_Text"><text:s text:c="4"/>id_mesa SERIAL PRIMARY KEY,</text:p>
      <text:p text:style-name="Preformatted_20_Text"><text:s text:c="4"/>numero_mesa INT UNIQUE NOT NULL,</text:p>
      <text:p text:style-name="Preformatted_20_Text"><text:s text:c="4"/>capacidad INT NOT NULL,</text:p>
      <text:p text:style-name="Preformatted_20_Text"><text:s text:c="4"/>ubicacion VARCHAR(50)</text:p>
      <text:p text:style-name="Preformatted_20_Text">);</text:p>
      <text:p text:style-name="Preformatted_20_Text"/>
      <text:p text:style-name="Preformatted_20_Text">-- Tabla de empleados</text:p>
      <text:p text:style-name="Preformatted_20_Text">CREATE TABLE empleados (</text:p>
      <text:p text:style-name="Preformatted_20_Text"><text:s text:c="4"/>id_empleado SERIAL PRIMARY KEY,</text:p>
      <text:p text:style-name="Preformatted_20_Text"><text:s text:c="4"/>nombre VARCHAR(100) NOT NULL,</text:p>
      <text:p text:style-name="Preformatted_20_Text"><text:s text:c="4"/>rol VARCHAR(50) CHECK (rol IN ('gerente', 'mesero', 'cocina', 'admin')),</text:p>
      <text:p text:style-name="Preformatted_20_Text"><text:s text:c="4"/>telefono VARCHAR(15),</text:p>
      <text:p text:style-name="Preformatted_20_Text"><text:s text:c="4"/>fecha_contrato DATE DEFAULT CURRENT_DATE</text:p>
      <text:p text:style-name="Preformatted_20_Text">);</text:p>
      <text:p text:style-name="Preformatted_20_Text"/>
      <text:p text:style-name="Preformatted_20_Text">-- Tabla de pedidos</text:p>
      <text:p text:style-name="Preformatted_20_Text">CREATE TABLE pedidos (</text:p>
      <text:p text:style-name="Preformatted_20_Text"><text:s text:c="4"/>id_pedido SERIAL PRIMARY KEY,</text:p>
      <text:p text:style-name="Preformatted_20_Text"><text:s text:c="4"/>id_mesa INT REFERENCES mesas(id_mesa),</text:p>
      <text:p text:style-name="Preformatted_20_Text"><text:s text:c="4"/>id_cliente INT REFERENCES clientes(id_cliente),</text:p>
      <text:p text:style-name="Preformatted_20_Text"><text:s text:c="4"/>id_empleado INT REFERENCES empleados(id_empleado),</text:p>
      <text:p text:style-name="Preformatted_20_Text"><text:s text:c="4"/>fecha_pedido TIMESTAMP DEFAULT CURRENT_TIMESTAMP,</text:p>
      <text:p text:style-name="Preformatted_20_Text"><text:soft-page-break/><text:s text:c="4"/>estado VARCHAR(20) DEFAULT 'pendiente' CHECK (estado IN ('pendiente', 'preparando', 'listo', 'entregado', 'cancelado')),</text:p>
      <text:p text:style-name="Preformatted_20_Text"><text:s text:c="4"/>total DECIMAL(10,2) DEFAULT 0</text:p>
      <text:p text:style-name="Preformatted_20_Text">);</text:p>
      <text:p text:style-name="Preformatted_20_Text"/>
      <text:p text:style-name="Preformatted_20_Text">-- Tabla de detalles del pedido</text:p>
      <text:p text:style-name="Preformatted_20_Text">CREATE TABLE detalles_pedido (</text:p>
      <text:p text:style-name="Preformatted_20_Text"><text:s text:c="4"/>id_detalle SERIAL PRIMARY KEY,</text:p>
      <text:p text:style-name="Preformatted_20_Text"><text:s text:c="4"/>id_pedido INT REFERENCES pedidos(id_pedido) ON DELETE CASCADE,</text:p>
      <text:p text:style-name="Preformatted_20_Text"><text:s text:c="4"/>id_producto INT REFERENCES productos(id_producto),</text:p>
      <text:p text:style-name="Preformatted_20_Text"><text:s text:c="4"/>cantidad INT NOT NULL CHECK (cantidad &gt; 0),</text:p>
      <text:p text:style-name="Preformatted_20_Text"><text:s text:c="4"/>precio_unitario DECIMAL(10,2) NOT NULL,</text:p>
      <text:p text:style-name="Preformatted_20_Text"><text:s text:c="4"/>subtotal DECIMAL(10,2) GENERATED ALWAYS AS (cantidad * precio_unitario) STORED</text:p>
      <text:p text:style-name="Preformatted_20_Text">);</text:p>
      <text:p text:style-name="Preformatted_20_Text"/>
      <text:p text:style-name="Preformatted_20_Text">-- Tabla de pagos</text:p>
      <text:p text:style-name="Preformatted_20_Text">CREATE TABLE pagos (</text:p>
      <text:p text:style-name="Preformatted_20_Text"><text:s text:c="4"/>id_pago SERIAL PRIMARY KEY,</text:p>
      <text:p text:style-name="Preformatted_20_Text"><text:s text:c="4"/>id_pedido INT REFERENCES pedidos(id_pedido),</text:p>
      <text:p text:style-name="Preformatted_20_Text"><text:s text:c="4"/>monto DECIMAL(10,2) NOT NULL,</text:p>
      <text:p text:style-name="Preformatted_20_Text"><text:s text:c="4"/>metodo_pago VARCHAR(20) CHECK (metodo_pago IN ('efectivo', 'tarjeta', 'transferencia')),</text:p>
      <text:p text:style-name="Preformatted_20_Text"><text:s text:c="4"/>fecha_pago TIMESTAMP DEFAULT CURRENT_TIMESTAMP</text:p>
      <text:p text:style-name="Preformatted_20_Text">);</text:p>
      <text:p text:style-name="Preformatted_20_Text"/>
      <text:p text:style-name="Preformatted_20_Text">-- 6. ÍNDICES PARA RENDIMIENTO</text:p>
      <text:p text:style-name="Preformatted_20_Text">-- =====================================================</text:p>
      <text:p text:style-name="Preformatted_20_Text">CREATE INDEX idx_pedidos_fecha ON pedidos(fecha_pedido);</text:p>
      <text:p text:style-name="Preformatted_20_Text">CREATE INDEX idx_pedidos_estado ON pedidos(estado);</text:p>
      <text:p text:style-name="Preformatted_20_Text">CREATE INDEX idx_detalles_pedido ON detalles_pedido(id_pedido);</text:p>
      <text:p text:style-name="Preformatted_20_Text">CREATE INDEX idx_productos_categoria ON productos(id_categoria);</text:p>
      <text:p text:style-name="Preformatted_20_Text">CREATE INDEX idx_pagos_pedido ON pagos(id_pedido);</text:p>
      <text:p text:style-name="Preformatted_20_Text"/>
      <text:p text:style-name="Preformatted_20_Text">-- 7. PERMISOS Y ROLES (Seguridad)</text:p>
      <text:p text:style-name="Preformatted_20_Text">-- =====================================================</text:p>
      <text:p text:style-name="Preformatted_20_Text"/>
      <text:p text:style-name="Preformatted_20_Text">-- Permisos para GERENTE (todo excepto eliminar)</text:p>
      <text:p text:style-name="Preformatted_20_Text">GRANT USAGE ON SCHEMA restaurante TO gerente;</text:p>
      <text:p text:style-name="Preformatted_20_Text">GRANT SELECT, INSERT, UPDATE ON ALL TABLES IN SCHEMA restaurante TO gerente;</text:p>
      <text:p text:style-name="Preformatted_20_Text">GRANT USAGE ON ALL SEQUENCES IN SCHEMA restaurante TO gerente;</text:p>
      <text:p text:style-name="Preformatted_20_Text"/>
      <text:p text:style-name="Preformatted_20_Text">-- Permisos para MESERO (solo lectura y crear pedidos)</text:p>
      <text:p text:style-name="Preformatted_20_Text">GRANT USAGE ON SCHEMA restaurante TO mesero;</text:p>
      <text:p text:style-name="Preformatted_20_Text">GRANT SELECT ON mesas, productos, clientes TO mesero;</text:p>
      <text:p text:style-name="Preformatted_20_Text">GRANT SELECT, INSERT ON pedidos, detalles_pedido TO mesero;</text:p>
      <text:p text:style-name="Preformatted_20_Text">GRANT UPDATE ON pedidos TO mesero;</text:p>
      <text:p text:style-name="Preformatted_20_Text">GRANT USAGE ON SEQUENCES pedidos_id_pedido_seq, detalles_pedido_id_detalle_seq TO mesero;</text:p>
      <text:p text:style-name="Preformatted_20_Text"/>
      <text:p text:style-name="Preformatted_20_Text">-- Permisos para COCINA (solo ver y actualizar estado de pedidos)</text:p>
      <text:p text:style-name="Preformatted_20_Text">GRANT USAGE ON SCHEMA restaurante TO cocina;</text:p>
      <text:p text:style-name="Preformatted_20_Text">GRANT SELECT ON pedidos, detalles_pedido, productos TO cocina;</text:p>
      <text:p text:style-name="Preformatted_20_Text">GRANT UPDATE (estado) ON pedidos TO cocina;</text:p>
      <text:p text:style-name="Preformatted_20_Text"/>
      <text:p text:style-name="Preformatted_20_Text">-- 8. INSERCIÓN DE DATOS (Información Inicial)</text:p>
      <text:p text:style-name="Preformatted_20_Text">-- =====================================================</text:p>
      <text:p text:style-name="Preformatted_20_Text"/>
      <text:p text:style-name="Preformatted_20_Text">-- Insertar categorías</text:p>
      <text:p text:style-name="Preformatted_20_Text">INSERT INTO categorias (nombre, descripcion) VALUES</text:p>
      <text:p text:style-name="Preformatted_20_Text">('Entradas', 'Platos para compartir al inicio'),</text:p>
      <text:p text:style-name="Preformatted_20_Text"><text:soft-page-break/>('Platos Principales', 'Nuestros mejores platos'),</text:p>
      <text:p text:style-name="Preformatted_20_Text">('Bebidas', 'Refrescos y jugos naturales'),</text:p>
      <text:p text:style-name="Preformatted_20_Text">('Postres', 'Dulces caseros');</text:p>
      <text:p text:style-name="Preformatted_20_Text"/>
      <text:p text:style-name="Preformatted_20_Text">-- Insertar productos</text:p>
      <text:p text:style-name="Preformatted_20_Text">INSERT INTO productos (nombre, precio, id_categoria, stock) VALUES</text:p>
      <text:p text:style-name="Preformatted_20_Text">('Ensalada Mixta', 5.50, 1, 50),</text:p>
      <text:p text:style-name="Preformatted_20_Text">('Sopa de Tomate', 4.00, 1, 40),</text:p>
      <text:p text:style-name="Preformatted_20_Text">('Lomo Saltado', 12.00, 2, 30),</text:p>
      <text:p text:style-name="Preformatted_20_Text">('Pollo a la Plancha', 10.00, 2, 35),</text:p>
      <text:p text:style-name="Preformatted_20_Text">('Coca Cola 500ml', 2.50, 3, 100),</text:p>
      <text:p text:style-name="Preformatted_20_Text">('Jugo Natural', 3.50, 3, 60),</text:p>
      <text:p text:style-name="Preformatted_20_Text">('Torta de Chocolate', 4.50, 4, 25),</text:p>
      <text:p text:style-name="Preformatted_20_Text">('Flan Casero', 3.50, 4, 30);</text:p>
      <text:p text:style-name="Preformatted_20_Text"/>
      <text:p text:style-name="Preformatted_20_Text">-- Insertar mesas</text:p>
      <text:p text:style-name="Preformatted_20_Text">INSERT INTO mesas (numero_mesa, capacidad, ubicacion) VALUES</text:p>
      <text:p text:style-name="Preformatted_20_Text">(1, 4, 'Interior'),</text:p>
      <text:p text:style-name="Preformatted_20_Text">(2, 4, 'Interior'),</text:p>
      <text:p text:style-name="Preformatted_20_Text">(3, 6, 'Terraza'),</text:p>
      <text:p text:style-name="Preformatted_20_Text">(4, 2, 'Barra'),</text:p>
      <text:p text:style-name="Preformatted_20_Text">(5, 8, 'Salón Privado');</text:p>
      <text:p text:style-name="Preformatted_20_Text"/>
      <text:p text:style-name="Preformatted_20_Text">-- Insertar empleados</text:p>
      <text:p text:style-name="Preformatted_20_Text">INSERT INTO empleados (nombre, rol, telefono) VALUES</text:p>
      <text:p text:style-name="Preformatted_20_Text">('Carlos López', 'gerente', '555-0101'),</text:p>
      <text:p text:style-name="Preformatted_20_Text">('Ana Martínez', 'mesero', '555-0102'),</text:p>
      <text:p text:style-name="Preformatted_20_Text">('Luis Fernández', 'cocina', '555-0103'),</text:p>
      <text:p text:style-name="Preformatted_20_Text">('María García', 'mesero', '555-0104');</text:p>
      <text:p text:style-name="Preformatted_20_Text"/>
      <text:p text:style-name="Preformatted_20_Text">-- Insertar clientes</text:p>
      <text:p text:style-name="Preformatted_20_Text">INSERT INTO clientes (nombre, telefono, email) VALUES</text:p>
      <text:p text:style-name="Preformatted_20_Text">('Juan Pérez', '555-1001', 'juan@email.com'),</text:p>
      <text:p text:style-name="Preformatted_20_Text">('Claudia Ríos', '555-1002', 'claudia@email.com'),</text:p>
      <text:p text:style-name="Preformatted_20_Text">('Roberto Díaz', '555-1003', 'roberto@email.com');</text:p>
      <text:p text:style-name="Preformatted_20_Text"/>
      <text:p text:style-name="Preformatted_20_Text">-- Insertar pedido de ejemplo</text:p>
      <text:p text:style-name="Preformatted_20_Text">INSERT INTO pedidos (id_mesa, id_cliente, id_empleado, estado) </text:p>
      <text:p text:style-name="Preformatted_20_Text">VALUES (1, 1, 2, 'entregado');</text:p>
      <text:p text:style-name="Preformatted_20_Text"/>
      <text:p text:style-name="Preformatted_20_Text">-- Insertar detalles del pedido</text:p>
      <text:p text:style-name="Preformatted_20_Text">INSERT INTO detalles_pedido (id_pedido, id_producto, cantidad, precio_unitario) </text:p>
      <text:p text:style-name="Preformatted_20_Text">VALUES </text:p>
      <text:p text:style-name="Preformatted_20_Text">(1, 3, 2, 12.00), <text:s/>-- 2 Lomo Saltado</text:p>
      <text:p text:style-name="Preformatted_20_Text">(1, 5, 3, 2.50); <text:s text:c="2"/>-- 3 Coca Colas</text:p>
      <text:p text:style-name="Preformatted_20_Text"/>
      <text:p text:style-name="Preformatted_20_Text">-- Actualizar total del pedido</text:p>
      <text:p text:style-name="Preformatted_20_Text">UPDATE pedidos SET total = (</text:p>
      <text:p text:style-name="Preformatted_20_Text"><text:s text:c="4"/>SELECT SUM(subtotal) FROM detalles_pedido WHERE id_pedido = 1</text:p>
      <text:p text:style-name="Preformatted_20_Text">) WHERE id_pedido = 1;</text:p>
      <text:p text:style-name="Preformatted_20_Text"/>
      <text:p text:style-name="Preformatted_20_Text">-- Insertar pago</text:p>
      <text:p text:style-name="Preformatted_20_Text">INSERT INTO pagos (id_pedido, monto, metodo_pago) </text:p>
      <text:p text:style-name="Preformatted_20_Text">VALUES (1, 31.50, 'efectivo');</text:p>
      <text:p text:style-name="Preformatted_20_Text"/>
      <text:p text:style-name="Preformatted_20_Text">-- 9. FUNCIONES Y TRIGGERS (Automatización)</text:p>
      <text:p text:style-name="Preformatted_20_Text">-- =====================================================</text:p>
      <text:p text:style-name="Preformatted_20_Text"/>
      <text:p text:style-name="Preformatted_20_Text">-- Función para actualizar stock automáticamente</text:p>
      <text:p text:style-name="Preformatted_20_Text">CREATE OR REPLACE FUNCTION actualizar_stock()</text:p>
      <text:p text:style-name="Preformatted_20_Text">RETURNS TRIGGER AS $$</text:p>
      <text:p text:style-name="Preformatted_20_Text"><text:soft-page-break/>BEGIN</text:p>
      <text:p text:style-name="Preformatted_20_Text"><text:s text:c="4"/>UPDATE productos </text:p>
      <text:p text:style-name="Preformatted_20_Text"><text:s text:c="4"/>SET stock = stock - NEW.cantidad</text:p>
      <text:p text:style-name="Preformatted_20_Text"><text:s text:c="4"/>WHERE id_producto = NEW.id_producto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-- Trigger que actualiza stock al crear detalle de pedido</text:p>
      <text:p text:style-name="Preformatted_20_Text">CREATE TRIGGER trg_actualizar_stock</text:p>
      <text:p text:style-name="Preformatted_20_Text">AFTER INSERT ON detalles_pedido</text:p>
      <text:p text:style-name="Preformatted_20_Text">FOR EACH ROW</text:p>
      <text:p text:style-name="Preformatted_20_Text">EXECUTE FUNCTION actualizar_stock();</text:p>
      <text:p text:style-name="Preformatted_20_Text"/>
      <text:p text:style-name="Preformatted_20_Text">-- Función para calcular total del pedido</text:p>
      <text:p text:style-name="Preformatted_20_Text">CREATE OR REPLACE FUNCTION calcular_total_pedido()</text:p>
      <text:p text:style-name="Preformatted_20_Text">RETURNS TRIGGER AS $$</text:p>
      <text:p text:style-name="Preformatted_20_Text">BEGIN</text:p>
      <text:p text:style-name="Preformatted_20_Text"><text:s text:c="4"/>UPDATE pedidos </text:p>
      <text:p text:style-name="Preformatted_20_Text"><text:s text:c="4"/>SET total = (</text:p>
      <text:p text:style-name="Preformatted_20_Text"><text:s text:c="8"/>SELECT SUM(subtotal) </text:p>
      <text:p text:style-name="Preformatted_20_Text"><text:s text:c="8"/>FROM detalles_pedido </text:p>
      <text:p text:style-name="Preformatted_20_Text"><text:s text:c="8"/>WHERE id_pedido = NEW.id_pedido</text:p>
      <text:p text:style-name="Preformatted_20_Text"><text:s text:c="4"/>)</text:p>
      <text:p text:style-name="Preformatted_20_Text"><text:s text:c="4"/>WHERE id_pedido = NEW.id_pedido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-- Trigger para recalcular total</text:p>
      <text:p text:style-name="Preformatted_20_Text">CREATE TRIGGER trg_calcular_total</text:p>
      <text:p text:style-name="Preformatted_20_Text">AFTER INSERT OR UPDATE ON detalles_pedido</text:p>
      <text:p text:style-name="Preformatted_20_Text">FOR EACH ROW</text:p>
      <text:p text:style-name="Preformatted_20_Text">EXECUTE FUNCTION calcular_total_pedido();</text:p>
      <text:p text:style-name="Preformatted_20_Text"/>
      <text:p text:style-name="Preformatted_20_Text">-- 10. VISTAS PARA ADMINISTRACIÓN</text:p>
      <text:p text:style-name="Preformatted_20_Text">-- =====================================================</text:p>
      <text:p text:style-name="Preformatted_20_Text"/>
      <text:p text:style-name="Preformatted_20_Text">-- Vista de ventas del día</text:p>
      <text:p text:style-name="Preformatted_20_Text">CREATE VIEW ventas_hoy AS</text:p>
      <text:p text:style-name="Preformatted_20_Text">SELECT </text:p>
      <text:p text:style-name="Preformatted_20_Text"><text:s text:c="4"/>p.id_pedido,</text:p>
      <text:p text:style-name="Preformatted_20_Text"><text:s text:c="4"/>c.nombre AS cliente,</text:p>
      <text:p text:style-name="Preformatted_20_Text"><text:s text:c="4"/>m.numero_mesa,</text:p>
      <text:p text:style-name="Preformatted_20_Text"><text:s text:c="4"/>p.total,</text:p>
      <text:p text:style-name="Preformatted_20_Text"><text:s text:c="4"/>p.fecha_pedido</text:p>
      <text:p text:style-name="Preformatted_20_Text">FROM pedidos p</text:p>
      <text:p text:style-name="Preformatted_20_Text">LEFT JOIN clientes c ON p.id_cliente = c.id_cliente</text:p>
      <text:p text:style-name="Preformatted_20_Text">JOIN mesas m ON p.id_mesa = m.id_mesa</text:p>
      <text:p text:style-name="Preformatted_20_Text">WHERE DATE(p.fecha_pedido) = CURRENT_DATE;</text:p>
      <text:p text:style-name="Preformatted_20_Text"/>
      <text:p text:style-name="Preformatted_20_Text">-- Vista de productos más vendidos</text:p>
      <text:p text:style-name="Preformatted_20_Text">CREATE VIEW productos_top AS</text:p>
      <text:p text:style-name="Preformatted_20_Text">SELECT </text:p>
      <text:p text:style-name="Preformatted_20_Text"><text:s text:c="4"/>pr.nombre,</text:p>
      <text:p text:style-name="Preformatted_20_Text"><text:s text:c="4"/>SUM(dp.cantidad) AS total_vendido,</text:p>
      <text:p text:style-name="Preformatted_20_Text"><text:s text:c="4"/>COUNT(DISTINCT dp.id_pedido) AS num_pedidos</text:p>
      <text:p text:style-name="Preformatted_20_Text">FROM detalles_pedido dp</text:p>
      <text:p text:style-name="Preformatted_20_Text">JOIN productos pr ON dp.id_producto = pr.id_producto</text:p>
      <text:p text:style-name="Preformatted_20_Text">GROUP BY pr.nombre</text:p>
      <text:p text:style-name="Preformatted_20_Text">ORDER BY total_vendido DESC</text:p>
      <text:p text:style-name="Preformatted_20_Text"><text:soft-page-break/>LIMIT 10;</text:p>
      <text:p text:style-name="Preformatted_20_Text"/>
      <text:p text:style-name="Preformatted_20_Text">-- 11. MONITOREO Y MANTENIMIENTO</text:p>
      <text:p text:style-name="Preformatted_20_Text">-- =====================================================</text:p>
      <text:p text:style-name="Preformatted_20_Text"/>
      <text:p text:style-name="Preformatted_20_Text">-- Ver tamaño de la base de datos</text:p>
      <text:p text:style-name="Preformatted_20_Text">SELECT </text:p>
      <text:p text:style-name="Preformatted_20_Text"><text:s text:c="4"/>pg_database_size('restaurante_db')/1024/1024 AS size_mb,</text:p>
      <text:p text:style-name="Preformatted_20_Text"><text:s text:c="4"/>pg_database_size('restaurante_db')/1024/1024/1024 AS size_gb;</text:p>
      <text:p text:style-name="Preformatted_20_Text"/>
      <text:p text:style-name="Preformatted_20_Text">-- Ver tablas más grandes</text:p>
      <text:p text:style-name="Preformatted_20_Text">SELECT </text:p>
      <text:p text:style-name="Preformatted_20_Text"><text:s text:c="4"/>schemaname,</text:p>
      <text:p text:style-name="Preformatted_20_Text"><text:s text:c="4"/>tablename,</text:p>
      <text:p text:style-name="Preformatted_20_Text"><text:s text:c="4"/>pg_size_pretty(pg_total_relation_size(schemaname||'.'||tablename)) AS size</text:p>
      <text:p text:style-name="Preformatted_20_Text">FROM pg_tables</text:p>
      <text:p text:style-name="Preformatted_20_Text">WHERE schemaname = 'restaurante'</text:p>
      <text:p text:style-name="Preformatted_20_Text">ORDER BY pg_total_relation_size(schemaname||'.'||tablename) DESC;</text:p>
      <text:p text:style-name="Preformatted_20_Text"/>
      <text:p text:style-name="Preformatted_20_Text">-- Índices no utilizados (para optimizar)</text:p>
      <text:p text:style-name="Preformatted_20_Text">SELECT </text:p>
      <text:p text:style-name="Preformatted_20_Text"><text:s text:c="4"/>schemaname,</text:p>
      <text:p text:style-name="Preformatted_20_Text"><text:s text:c="4"/>tablename,</text:p>
      <text:p text:style-name="Preformatted_20_Text"><text:s text:c="4"/>indexname,</text:p>
      <text:p text:style-name="Preformatted_20_Text"><text:s text:c="4"/>idx_scan AS number_of_scans</text:p>
      <text:p text:style-name="Preformatted_20_Text">FROM pg_stat_user_indexes</text:p>
      <text:p text:style-name="Preformatted_20_Text">WHERE idx_scan = 0</text:p>
      <text:p text:style-name="Preformatted_20_Text">AND schemaname = 'restaurante';</text:p>
      <text:p text:style-name="Preformatted_20_Text"/>
      <text:p text:style-name="Preformatted_20_Text">-- Ver queries lentas (requiere habilitar logging)</text:p>
      <text:p text:style-name="Preformatted_20_Text">-- Configurar en postgresql.conf:</text:p>
      <text:p text:style-name="Preformatted_20_Text">-- log_min_duration_statement = 1000 <text:s/>(ms)</text:p>
      <text:p text:style-name="Preformatted_20_Text"/>
      <text:p text:style-name="Preformatted_20_Text">-- 12. FUNCIONES DE ADMINISTRACIÓN</text:p>
      <text:p text:style-name="Preformatted_20_Text">-- =====================================================</text:p>
      <text:p text:style-name="Preformatted_20_Text"/>
      <text:p text:style-name="Preformatted_20_Text">-- Backup automático (comando desde terminal)</text:p>
      <text:p text:style-name="Preformatted_20_Text">-- pg_dump -U admin_restaurante -h localhost -F c -b -v -f "backup_restaurante_$(date +%Y%m%d).dump" restaurante_db</text:p>
      <text:p text:style-name="Preformatted_20_Text"/>
      <text:p text:style-name="Preformatted_20_Text">-- Vacuum y Analyze (mantenimiento)</text:p>
      <text:p text:style-name="Preformatted_20_Text">VACUUM ANALYZE restaurante.pedidos;</text:p>
      <text:p text:style-name="Preformatted_20_Text">VACUUM ANALYZE restaurante.detalles_pedido;</text:p>
      <text:p text:style-name="Preformatted_20_Text"/>
      <text:p text:style-name="Preformatted_20_Text">-- Reindexar tablas problemáticas</text:p>
      <text:p text:style-name="Preformatted_20_Text">REINDEX TABLE restaurante.pedidos;</text:p>
      <text:p text:style-name="Preformatted_20_Text">REINDEX TABLE restaurante.detalles_pedido;</text:p>
      <text:p text:style-name="Preformatted_20_Text"/>
      <text:p text:style-name="Preformatted_20_Text">-- 13. REPORTE DE EJEMPLO</text:p>
      <text:p text:style-name="Preformatted_20_Text">-- =====================================================</text:p>
      <text:p text:style-name="Preformatted_20_Text"/>
      <text:p text:style-name="Preformatted_20_Text">-- Reporte de ventas por mes</text:p>
      <text:p text:style-name="Preformatted_20_Text">CREATE OR REPLACE FUNCTION reporte_ventas_mensual(anio INT, mes INT)</text:p>
      <text:p text:style-name="Preformatted_20_Text">RETURNS TABLE(</text:p>
      <text:p text:style-name="Preformatted_20_Text"><text:s text:c="4"/>dia DATE,</text:p>
      <text:p text:style-name="Preformatted_20_Text"><text:s text:c="4"/>total_ventas DECIMAL,</text:p>
      <text:p text:style-name="Preformatted_20_Text"><text:s text:c="4"/>num_pedidos BIGINT</text:p>
      <text:p text:style-name="Preformatted_20_Text">) AS $$</text:p>
      <text:p text:style-name="Preformatted_20_Text">BEGIN</text:p>
      <text:p text:style-name="Preformatted_20_Text"><text:s text:c="4"/>RETURN QUERY</text:p>
      <text:p text:style-name="Preformatted_20_Text"><text:s text:c="4"/>SELECT </text:p>
      <text:p text:style-name="Preformatted_20_Text"><text:soft-page-break/><text:s text:c="8"/>DATE(p.fecha_pedido) AS dia,</text:p>
      <text:p text:style-name="Preformatted_20_Text"><text:s text:c="8"/>SUM(p.total) AS total_ventas,</text:p>
      <text:p text:style-name="Preformatted_20_Text"><text:s text:c="8"/>COUNT(*) AS num_pedidos</text:p>
      <text:p text:style-name="Preformatted_20_Text"><text:s text:c="4"/>FROM pedidos p</text:p>
      <text:p text:style-name="Preformatted_20_Text"><text:s text:c="4"/>WHERE EXTRACT(YEAR FROM p.fecha_pedido) = anio</text:p>
      <text:p text:style-name="Preformatted_20_Text"><text:s text:c="8"/>AND EXTRACT(MONTH FROM p.fecha_pedido) = mes</text:p>
      <text:p text:style-name="Preformatted_20_Text"><text:s text:c="8"/>AND p.estado = 'entregado'</text:p>
      <text:p text:style-name="Preformatted_20_Text"><text:s text:c="4"/>GROUP BY DATE(p.fecha_pedido)</text:p>
      <text:p text:style-name="Preformatted_20_Text"><text:s text:c="4"/>ORDER BY dia;</text:p>
      <text:p text:style-name="Preformatted_20_Text">END;</text:p>
      <text:p text:style-name="Preformatted_20_Text">$$ LANGUAGE plpgsql;</text:p>
      <text:p text:style-name="Preformatted_20_Text"/>
      <text:p text:style-name="Preformatted_20_Text">-- Uso: SELECT * FROM reporte_ventas_mensual(2026, 5);</text:p>
      <text:p text:style-name="Preformatted_20_Text"/>
      <text:p text:style-name="Preformatted_20_Text">-- 14. CONSULTAS ÚTILES PARA EL DÍA A DÍA</text:p>
      <text:p text:style-name="Preformatted_20_Text">-- =====================================================</text:p>
      <text:p text:style-name="Preformatted_20_Text"/>
      <text:p text:style-name="Preformatted_20_Text">-- Pedidos activos (para cocina)</text:p>
      <text:p text:style-name="Preformatted_20_Text">SELECT </text:p>
      <text:p text:style-name="Preformatted_20_Text"><text:s text:c="4"/>p.id_pedido,</text:p>
      <text:p text:style-name="Preformatted_20_Text"><text:s text:c="4"/>m.numero_mesa,</text:p>
      <text:p text:style-name="Preformatted_20_Text"><text:s text:c="4"/>pr.nombre AS producto,</text:p>
      <text:p text:style-name="Preformatted_20_Text"><text:s text:c="4"/>dp.cantidad,</text:p>
      <text:p text:style-name="Preformatted_20_Text"><text:s text:c="4"/>p.estado</text:p>
      <text:p text:style-name="Preformatted_20_Text">FROM pedidos p</text:p>
      <text:p text:style-name="Preformatted_20_Text">JOIN mesas m ON p.id_mesa = m.id_mesa</text:p>
      <text:p text:style-name="Preformatted_20_Text">JOIN detalles_pedido dp ON p.id_pedido = dp.id_pedido</text:p>
      <text:p text:style-name="Preformatted_20_Text">JOIN productos pr ON dp.id_producto = pr.id_producto</text:p>
      <text:p text:style-name="Preformatted_20_Text">WHERE p.estado IN ('pendiente', 'preparando')</text:p>
      <text:p text:style-name="Preformatted_20_Text">ORDER BY p.fecha_pedido;</text:p>
      <text:p text:style-name="Preformatted_20_Text"/>
      <text:p text:style-name="Preformatted_20_Text">-- Facturación diaria</text:p>
      <text:p text:style-name="Preformatted_20_Text">SELECT </text:p>
      <text:p text:style-name="Preformatted_20_Text"><text:s text:c="4"/>DATE(fecha_pago) AS dia,</text:p>
      <text:p text:style-name="Preformatted_20_Text"><text:s text:c="4"/>COUNT(*) AS num_pagos,</text:p>
      <text:p text:style-name="Preformatted_20_Text"><text:s text:c="4"/>SUM(monto) AS total,</text:p>
      <text:p text:style-name="Preformatted_20_Text"><text:s text:c="4"/>AVG(monto) AS promedio</text:p>
      <text:p text:style-name="Preformatted_20_Text">FROM pagos</text:p>
      <text:p text:style-name="Preformatted_20_Text">WHERE DATE(fecha_pago) = CURRENT_DATE</text:p>
      <text:p text:style-name="Preformatted_20_Text">GROUP BY DATE(fecha_pago);</text:p>
      <text:p text:style-name="Preformatted_20_Text"/>
      <text:p text:style-name="Preformatted_20_Text">-- Control de inventario (productos con bajo stock)</text:p>
      <text:p text:style-name="Preformatted_20_Text">SELECT </text:p>
      <text:p text:style-name="Preformatted_20_Text"><text:s text:c="4"/>nombre,</text:p>
      <text:p text:style-name="Preformatted_20_Text"><text:s text:c="4"/>stock,</text:p>
      <text:p text:style-name="Preformatted_20_Text"><text:s text:c="4"/>CASE </text:p>
      <text:p text:style-name="Preformatted_20_Text"><text:s text:c="8"/>WHEN stock &lt; 5 THEN 'CRÍTICO - Comprar urgente'</text:p>
      <text:p text:style-name="Preformatted_20_Text"><text:s text:c="8"/>WHEN stock &lt; 10 THEN 'BAJO - Revisar inventario'</text:p>
      <text:p text:style-name="Preformatted_20_Text"><text:s text:c="8"/>ELSE 'Normal'</text:p>
      <text:p text:style-name="Preformatted_20_Text"><text:s text:c="4"/>END AS estado_stock</text:p>
      <text:p text:style-name="Preformatted_20_Text">FROM productos</text:p>
      <text:p text:style-name="Preformatted_20_Text">WHERE stock &lt; 10</text:p>
      <text:p text:style-name="Preformatted_20_Text">ORDER BY stock;</text:p>
      <text:p text:style-name="Preformatted_20_Text"/>
      <text:p text:style-name="Preformatted_20_Text">-- =====================================================</text:p>
      <text:p text:style-name="Preformatted_20_Text">-- FIN DEL PROYECTO</text:p>
      <text:p text:style-name="Preformatted_20_Text">-- =====================================================</text:p>
      <text:p text:style-name="Preformatted_20_Text"/>
      <text:p text:style-name="Preformatted_20_Text">-- Para eliminar todo (NUNCA EN PRODUCCIÓN)</text:p>
      <text:p text:style-name="Preformatted_20_Text">-- DROP DATABASE restaurante_db;</text:p>
      <text:p text:style-name="Preformatted_20_Text">-- DROP TABLESPACE ts_restaurante;</text:p>
      <text:p text:style-name="Preformatted_20_Text"><text:soft-page-break/>-- DROP OWNED BY admin_restaurante CASCADE;</text:p>
      <text:p text:style-name="Preformatted_20_Text">-- DROP ROLE admin_restaurante, gerente, mesero, cocina;</text:p>
      <text:h text:style-name="Heading_20_2" text:outline-level="2">🚀 Pasos para Implementar</text:h>
      <text:list xml:id="list3618731682" text:style-name="L1">
        <text:list-item>
          <text:p text:style-name="Text_20_body"><text:span text:style-name="Strong_20_Emphasis">Requisitos previos:</text:span></text:p>
        </text:list-item>
      </text:list>
      <text:p text:style-name="Text_20_body">bash</text:p>
      <text:p text:style-name="Preformatted_20_Text"># Instalar PostgreSQL 18</text:p>
      <text:p text:style-name="Preformatted_20_Text">sudo apt install postgresql-18</text:p>
      <text:p text:style-name="Preformatted_20_Text"/>
      <text:p text:style-name="Preformatted_20_Text"># Crear directorio para tablespace</text:p>
      <text:p text:style-name="Preformatted_20_Text">sudo mkdir -p /var/lib/postgresql/18/tablespaces/restaurante</text:p>
      <text:p text:style-name="Preformatted_20_Text">sudo chown postgres:postgres /var/lib/postgresql/18/tablespaces/restaurante</text:p>
      <text:list xml:id="list2886049205" text:style-name="L2">
        <text:list-item>
          <text:p text:style-name="Text_20_body"><text:span text:style-name="Strong_20_Emphasis">Ejecutar el script:</text:span></text:p>
        </text:list-item>
      </text:list>
      <text:p text:style-name="Text_20_body">bash</text:p>
      <text:p text:style-name="Preformatted_20_Text"># Conectarse como superusuario</text:p>
      <text:p text:style-name="Preformatted_20_Text">sudo -u postgres psql</text:p>
      <text:p text:style-name="Preformatted_20_Text"/>
      <text:p text:style-name="Preformatted_20_Text"># Copiar todo el script y pegarlo en psql</text:p>
      <text:p text:style-name="Preformatted_20_Text">\i 'ruta/al/archivo/restaurante.sql'</text:p>
      <text:list xml:id="list2471076536" text:style-name="L3">
        <text:list-item>
          <text:p text:style-name="Text_20_body"><text:span text:style-name="Strong_20_Emphasis">Pruebas rápidas:</text:span></text:p>
        </text:list-item>
      </text:list>
      <text:p text:style-name="Text_20_body">sql</text:p>
      <text:p text:style-name="Preformatted_20_Text">-- Conectar como mesero</text:p>
      <text:p text:style-name="Preformatted_20_Text">\c restaurante_db mesero</text:p>
      <text:p text:style-name="Preformatted_20_Text"/>
      <text:p text:style-name="Preformatted_20_Text">-- Ver menú</text:p>
      <text:p text:style-name="Preformatted_20_Text">SELECT * FROM productos WHERE activo = true;</text:p>
      <text:p text:style-name="Preformatted_20_Text"/>
      <text:p text:style-name="Preformatted_20_Text">-- Crear nuevo pedido</text:p>
      <text:p text:style-name="Preformatted_20_Text">INSERT INTO pedidos (id_mesa, id_empleado) VALUES (3, 2);</text:p>
      <text:p text:style-name="Preformatted_20_Text">INSERT INTO detalles_pedido (id_pedido, id_producto, cantidad, precio_unitario) </text:p>
      <text:p text:style-name="Preformatted_20_Text">VALUES (currval('pedidos_id_pedido_seq'), 4, 2, 10.00);</text:p>
      <text:h text:style-name="Heading_20_2" text:outline-level="2">📊 Monitoreo Diario</text:h>
      <text:p text:style-name="Text_20_body">sql</text:p>
      <text:p text:style-name="Preformatted_20_Text">-- Ver actividad actual</text:p>
      <text:p text:style-name="Preformatted_20_Text">SELECT </text:p>
      <text:p text:style-name="Preformatted_20_Text"><text:s text:c="4"/>pid,</text:p>
      <text:p text:style-name="Preformatted_20_Text"><text:s text:c="4"/>usename,</text:p>
      <text:p text:style-name="Preformatted_20_Text"><text:s text:c="4"/>application_name,</text:p>
      <text:p text:style-name="Preformatted_20_Text"><text:s text:c="4"/>state,</text:p>
      <text:p text:style-name="Preformatted_20_Text"><text:s text:c="4"/>query</text:p>
      <text:p text:style-name="Preformatted_20_Text">FROM pg_stat_activity </text:p>
      <text:p text:style-name="Preformatted_20_Text">WHERE datname = 'restaurante_db';</text:p>
      <text:p text:style-name="Preformatted_20_Text"/>
      <text:p text:style-name="Preformatted_20_Text">-- Ver conexiones activas</text:p>
      <text:p text:style-name="Preformatted_20_Text">SELECT COUNT(*) FROM pg_stat_activity WHERE datname = 'restaurante_db';</text:p>
      <text:p text:style-name="Text_20_body">Este proyecto incluye todo lo necesario para un restaurante pequeño: base de datos, gestión de roles, automatización con triggers, vistas de negocio, y scripts de mantenimiento. ¡Todo funcionando desde el primer momento!</text:p>
      <text:p text:style-name="Text_20_body">Esta respuesta es generada por AI, solo como referencia.</text:p>
      <text:p text:style-name="Text_20_body"><text:soft-page-break/>explicame esta linea :REINDEX TABLE restaurante.pedidos;</text:p>
      <text:h text:style-name="Heading_20_1" text:outline-level="1">Explicación detallada de <text:span text:style-name="Source_20_Text">REINDEX TABLE restaurante.pedidos;</text:span></text:h>
      <text:h text:style-name="Heading_20_2" text:outline-level="2">🎯 ¿Qué hace esta línea?</text:h>
      <text:p text:style-name="Text_20_body"><text:span text:style-name="Strong_20_Emphasis">Reconstruye todos los índices de la tabla </text:span><text:span text:style-name="Strong_20_Emphasis"><text:span text:style-name="Source_20_Text">pedidos</text:span></text:span> en el esquema <text:span text:style-name="Source_20_Text">restaurante</text:span>, eliminando los índices antiguos y creando versiones nuevas y optimizadas.</text:p>
      <text:h text:style-name="Heading_20_2" text:outline-level="2">📚 Conceptos Fundamentales</text:h>
      <text:h text:style-name="Heading_20_3" text:outline-level="3">¿Qué son los índices?</text:h>
      <text:p text:style-name="Text_20_body">Los índices en PostgreSQL son como el <text:span text:style-name="Strong_20_Emphasis">índice de un libro</text:span>:</text:p>
      <text:list xml:id="list2867944451" text:style-name="L4">
        <text:list-item>
          <text:p text:style-name="Text_20_body">Te permiten encontrar información rápidamente sin leer todo el libro</text:p>
        </text:list-item>
        <text:list-item>
          <text:p text:style-name="Text_20_body">En la tabla <text:span text:style-name="Source_20_Text">pedidos</text:span>, tenemos índices en <text:span text:style-name="Source_20_Text">fecha_pedido</text:span> y <text:span text:style-name="Source_20_Text">estado</text:span></text:p>
        </text:list-item>
      </text:list>
      <text:h text:style-name="Heading_20_3" text:outline-level="3">¿Por qué se degradan los índices con el tiempo?</text:h>
      <text:p text:style-name="Text_20_body">sql</text:p>
      <text:p text:style-name="Preformatted_20_Text">-- Ejemplo práctico de lo que pasa</text:p>
      <text:p text:style-name="Preformatted_20_Text">-- Situación inicial: Índice eficiente</text:p>
      <text:p text:style-name="Preformatted_20_Text">Buscar pedido #1000 → Usa índice → Rápido (0.1 seg)</text:p>
      <text:p text:style-name="Preformatted_20_Text"/>
      <text:p text:style-name="Preformatted_20_Text">-- Después de muchas operaciones (inserts, updates, deletes)</text:p>
      <text:p text:style-name="Preformatted_20_Text">-- El índice se vuelve "fragmentado" como un disco duro desorganizado</text:p>
      <text:p text:style-name="Preformatted_20_Text">Buscar pedido #1000 → Usa índice fragmentado → Lento (1.5 seg)</text:p>
      <text:p text:style-name="Preformatted_20_Text"/>
      <text:p text:style-name="Preformatted_20_Text">-- Después de REINDEX</text:p>
      <text:p text:style-name="Preformatted_20_Text">Buscar pedido #1000 → Usa índice nuevo → Rápido (0.1 seg)</text:p>
      <text:h text:style-name="Heading_20_2" text:outline-level="2">🔍 Anatomía de la línea</text:h>
      <text:p text:style-name="Text_20_body">sql</text:p>
      <text:p text:style-name="Preformatted_20_Text">REINDEX TABLE restaurante.pedidos;</text:p>
      <text:p text:style-name="Preformatted_20_Text">-- <text:s text:c="5"/>│ <text:s text:c="4"/>│ <text:s text:c="10"/>│</text:p>
      <text:p text:style-name="Preformatted_20_Text">-- <text:s text:c="5"/>│ <text:s text:c="4"/>│ <text:s text:c="10"/>└── Nombre de la tabla</text:p>
      <text:p text:style-name="Preformatted_20_Text">-- <text:s text:c="5"/>│ <text:s text:c="4"/>└── Esquema donde está la tabla</text:p>
      <text:p text:style-name="Preformatted_20_Text">-- <text:s text:c="5"/>└── Comando para reconstruir índices</text:p>
      <text:h text:style-name="Heading_20_2" text:outline-level="2">💡 ¿Qué índices se reconstruyen exactamente?</text:h>
      <text:p text:style-name="Text_20_body">sql</text:p>
      <text:p text:style-name="Preformatted_20_Text">-- Los índices que se crearon originalmente en la tabla pedidos:</text:p>
      <text:p text:style-name="Preformatted_20_Text">CREATE INDEX idx_pedidos_fecha ON pedidos(fecha_pedido);</text:p>
      <text:p text:style-name="Preformatted_20_Text">CREATE INDEX idx_pedidos_estado ON pedidos(estado);</text:p>
      <text:p text:style-name="Preformatted_20_Text"/>
      <text:p text:style-name="Preformatted_20_Text"><text:soft-page-break/>-- REINDEX reconstruye AMBOS índices automáticamente</text:p>
      <text:p text:style-name="Preformatted_20_Text">-- También reconstruye índices internos como la clave primaria (id_pedido)</text:p>
      <text:h text:style-name="Heading_20_2" text:outline-level="2">📊 Ejemplo visual del problema</text:h>
      <text:h text:style-name="Heading_20_3" text:outline-level="3">Antes de REINDEX (fragmentado):</text:h>
      <text:p text:style-name="Text_20_body">text</text:p>
      <text:p text:style-name="Preformatted_20_Text">Índice de fecha_pedido:</text:p>
      <text:p text:style-name="Preformatted_20_Text">[2024-01][hueco][2024-02][hueco][hueco][2024-01][2024-03][hueco]</text:p>
      <text:p text:style-name="Preformatted_20_Text"><text:s text:c="52"/>↑</text:p>
      <text:p text:style-name="Preformatted_20_Text"><text:s text:c="44"/>Datos desordenados</text:p>
      <text:h text:style-name="Heading_20_3" text:outline-level="3">Después de REINDEX (optimizado):</text:h>
      <text:p text:style-name="Text_20_body">text</text:p>
      <text:p text:style-name="Preformatted_20_Text">Índice de fecha_pedido:</text:p>
      <text:p text:style-name="Preformatted_20_Text">[2024-01][2024-01][2024-02][2024-02][2024-03][2024-03]</text:p>
      <text:p text:style-name="Preformatted_20_Text"><text:s text:c="20"/>↑</text:p>
      <text:p text:style-name="Preformatted_20_Text"><text:s text:c="12"/>Todo ordenado y compacto</text:p>
      <text:h text:style-name="Heading_20_2" text:outline-level="2">🚀 Cuándo usar REINDEX</text:h>
      <text:h text:style-name="Heading_20_3" text:outline-level="3">✅ <text:span text:style-name="Strong_20_Emphasis">DEBES usarlo cuando:</text:span></text:h>
      <text:p text:style-name="Text_20_body">sql</text:p>
      <text:p text:style-name="Preformatted_20_Text">-- 1. Los índices están corruptos (raro pero pasa)</text:p>
      <text:p text:style-name="Preformatted_20_Text">-- 2. Notas que las consultas se vuelven lentas gradualmente</text:p>
      <text:p text:style-name="Preformatted_20_Text">-- 3. Después de eliminar MUCHOS registros (ej: limpieza masiva)</text:p>
      <text:p text:style-name="Preformatted_20_Text">-- 4. Como mantenimiento mensual/trimestral</text:p>
      <text:p text:style-name="Preformatted_20_Text"/>
      <text:p text:style-name="Preformatted_20_Text">-- Señales de alerta:</text:p>
      <text:p text:style-name="Preformatted_20_Text">SELECT </text:p>
      <text:p text:style-name="Preformatted_20_Text"><text:s text:c="4"/>schemaname,</text:p>
      <text:p text:style-name="Preformatted_20_Text"><text:s text:c="4"/>tablename,</text:p>
      <text:p text:style-name="Preformatted_20_Text"><text:s text:c="4"/>indexname,</text:p>
      <text:p text:style-name="Preformatted_20_Text"><text:s text:c="4"/>idx_scan, <text:s text:c="7"/>-- Número de veces usado</text:p>
      <text:p text:style-name="Preformatted_20_Text"><text:s text:c="4"/>idx_tup_read, <text:s text:c="3"/>-- Tuplas leídas</text:p>
      <text:p text:style-name="Preformatted_20_Text"><text:s text:c="4"/>idx_tup_fetch <text:s text:c="3"/>-- Tuplas recuperadas</text:p>
      <text:p text:style-name="Preformatted_20_Text">FROM pg_stat_user_indexes</text:p>
      <text:p text:style-name="Preformatted_20_Text">WHERE tablename = 'pedidos';</text:p>
      <text:p text:style-name="Preformatted_20_Text">-- Si idx_scan es cero, el índice no se usa (quizás está corrupto o inútil)</text:p>
      <text:h text:style-name="Heading_20_3" text:outline-level="3">❌ <text:span text:style-name="Strong_20_Emphasis">NO debes usarlo cuando:</text:span></text:h>
      <text:p text:style-name="Text_20_body">sql</text:p>
      <text:p text:style-name="Preformatted_20_Text">-- 1. Hay muchos usuarios conectados (puede bloquear la tabla)</text:p>
      <text:p text:style-name="Preformatted_20_Text">-- 2. En horario pico (11:00-15:00, 19:00-23:00 para un restaurante)</text:p>
      <text:p text:style-name="Preformatted_20_Text">-- 3. Demasiado frecuente (diario es excesivo para un restaurante pequeño)</text:p>
      <text:h text:style-name="Heading_20_2" text:outline-level="2">🔐 Bloqueo y rendimiento</text:h>
      <text:h text:style-name="Heading_20_3" text:outline-level="3">Niveles de bloqueo:</text:h>
      <text:p text:style-name="Text_20_body">sql</text:p>
      <text:p text:style-name="Preformatted_20_Text"><text:soft-page-break/>-- REINDEX normal (BLOQUEA LA TABLA POR COMPLETO)</text:p>
      <text:p text:style-name="Preformatted_20_Text">REINDEX TABLE restaurante.pedidos;</text:p>
      <text:p text:style-name="Preformatted_20_Text">-- Durante la operación: NADIE puede leer ni escribir en pedidos</text:p>
      <text:p text:style-name="Preformatted_20_Text">-- Duración típica: 1-5 segundos para tablas pequeñas</text:p>
      <text:p text:style-name="Preformatted_20_Text"/>
      <text:p text:style-name="Preformatted_20_Text">-- Alternativa CONCURRENTE (PostgreSQL 12+)</text:p>
      <text:p text:style-name="Preformatted_20_Text">REINDEX TABLE CONCURRENTLY restaurante.pedidos;</text:p>
      <text:p text:style-name="Preformatted_20_Text">-- Permite lectura/escritura durante la operación</text:p>
      <text:p text:style-name="Preformatted_20_Text">-- PERO: Toma más tiempo (5-10 segundos)</text:p>
      <text:h text:style-name="Heading_20_2" text:outline-level="2">📈 Ejemplo práctico en un restaurante</text:h>
      <text:p text:style-name="Text_20_body">sql</text:p>
      <text:p text:style-name="Preformatted_20_Text">-- Escenario: 3 meses de operación, 5000 pedidos</text:p>
      <text:p text:style-name="Preformatted_20_Text">-- Los índices se han fragmentado por actualizaciones frecuentes de estado</text:p>
      <text:p text:style-name="Preformatted_20_Text"/>
      <text:p text:style-name="Preformatted_20_Text">-- ANTES del REINDEX:</text:p>
      <text:p text:style-name="Preformatted_20_Text">EXPLAIN ANALYZE SELECT * FROM pedidos </text:p>
      <text:p text:style-name="Preformatted_20_Text">WHERE fecha_pedido &gt; '2026-05-01' AND estado = 'entregado';</text:p>
      <text:p text:style-name="Preformatted_20_Text">-- Tiempo: 850 ms <text:s/>😟</text:p>
      <text:p text:style-name="Preformatted_20_Text"/>
      <text:p text:style-name="Preformatted_20_Text">-- Ejecutar mantenimiento (ideal a las 3 AM)</text:p>
      <text:p text:style-name="Preformatted_20_Text">REINDEX TABLE restaurante.pedidos;</text:p>
      <text:p text:style-name="Preformatted_20_Text"/>
      <text:p text:style-name="Preformatted_20_Text">-- DESPUÉS del REINDEX:</text:p>
      <text:p text:style-name="Preformatted_20_Text">-- Tiempo: 120 ms <text:s/>😊 (7 veces más rápido!)</text:p>
      <text:h text:style-name="Heading_20_2" text:outline-level="2">🛠️ Formas alternativas de REINDEX</text:h>
      <text:p text:style-name="Text_20_body">sql</text:p>
      <text:p text:style-name="Preformatted_20_Text">-- 1. Reindexar un índice específico</text:p>
      <text:p text:style-name="Preformatted_20_Text">REINDEX INDEX idx_pedidos_fecha;</text:p>
      <text:p text:style-name="Preformatted_20_Text"/>
      <text:p text:style-name="Preformatted_20_Text">-- 2. Reindexar TODO el esquema</text:p>
      <text:p text:style-name="Preformatted_20_Text">REINDEX SCHEMA restaurante;</text:p>
      <text:p text:style-name="Preformatted_20_Text"/>
      <text:p text:style-name="Preformatted_20_Text">-- 3. Reindexar TODO el sistema (raro en producción)</text:p>
      <text:p text:style-name="Preformatted_20_Text">REINDEX DATABASE restaurante_db;</text:p>
      <text:p text:style-name="Preformatted_20_Text"/>
      <text:p text:style-name="Preformatted_20_Text">-- 4. Verificar si necesita REINDEX</text:p>
      <text:p text:style-name="Preformatted_20_Text">SELECT </text:p>
      <text:p text:style-name="Preformatted_20_Text"><text:s text:c="4"/>relname,</text:p>
      <text:p text:style-name="Preformatted_20_Text"><text:s text:c="4"/>pg_size_pretty(pg_relation_size(oid)) as index_size,</text:p>
      <text:p text:style-name="Preformatted_20_Text"><text:s text:c="4"/>pg_stat_get_blocks_fetched(oid) as blocks_fetched,</text:p>
      <text:p text:style-name="Preformatted_20_Text"><text:s text:c="4"/>pg_stat_get_blocks_hit(oid) as blocks_hit</text:p>
      <text:p text:style-name="Preformatted_20_Text">FROM pg_class </text:p>
      <text:p text:style-name="Preformatted_20_Text">WHERE relname LIKE 'idx_pedidos%';</text:p>
      <text:p text:style-name="Preformatted_20_Text">-- Si blocks_hit es bajo (&lt; 90%), necesita REINDEX</text:p>
      <text:h text:style-name="Heading_20_2" text:outline-level="2">📋 Mejores prácticas para tu restaurante</text:h>
      <text:p text:style-name="Text_20_body">sql</text:p>
      <text:p text:style-name="Preformatted_20_Text">-- Crear script de mantenimiento semanal</text:p>
      <text:p text:style-name="Preformatted_20_Text">CREATE OR REPLACE FUNCTION mantenimiento_semanal()</text:p>
      <text:p text:style-name="Preformatted_20_Text">RETURNS TEXT AS $$</text:p>
      <text:p text:style-name="Preformatted_20_Text">DECLARE</text:p>
      <text:p text:style-name="Preformatted_20_Text"><text:s text:c="4"/>inicio TIMESTAMP;</text:p>
      <text:p text:style-name="Preformatted_20_Text"><text:soft-page-break/>BEGIN</text:p>
      <text:p text:style-name="Preformatted_20_Text"><text:s text:c="4"/>inicio := clock_timestamp();</text:p>
      <text:p text:style-name="Preformatted_20_Text"><text:s text:c="4"/></text:p>
      <text:p text:style-name="Preformatted_20_Text"><text:s text:c="4"/>-- Para tablas pequeñas (&lt; 10,000 registros)</text:p>
      <text:p text:style-name="Preformatted_20_Text"><text:s text:c="4"/>REINDEX TABLE restaurante.pedidos;</text:p>
      <text:p text:style-name="Preformatted_20_Text"><text:s text:c="4"/>REINDEX TABLE restaurante.detalles_pedido;</text:p>
      <text:p text:style-name="Preformatted_20_Text"><text:s text:c="4"/></text:p>
      <text:p text:style-name="Preformatted_20_Text"><text:s text:c="4"/>-- Vacuum para limpiar espacio</text:p>
      <text:p text:style-name="Preformatted_20_Text"><text:s text:c="4"/>VACUUM ANALYZE restaurante.pedidos;</text:p>
      <text:p text:style-name="Preformatted_20_Text"><text:s text:c="4"/></text:p>
      <text:p text:style-name="Preformatted_20_Text"><text:s text:c="4"/>RETURN format('Mantenimiento completado en %s', </text:p>
      <text:p text:style-name="Preformatted_20_Text"><text:s text:c="18"/>clock_timestamp() - inicio);</text:p>
      <text:p text:style-name="Preformatted_20_Text">END;</text:p>
      <text:p text:style-name="Preformatted_20_Text">$$ LANGUAGE plpgsql;</text:p>
      <text:p text:style-name="Preformatted_20_Text"/>
      <text:p text:style-name="Preformatted_20_Text">-- Programar con pg_cron (extensión)</text:p>
      <text:p text:style-name="Preformatted_20_Text">-- Ejecutar cada domingo a las 3:00 AM</text:p>
      <text:p text:style-name="Preformatted_20_Text">SELECT cron.schedule('maintenance', '0 3 * * 0', </text:p>
      <text:p text:style-name="Preformatted_20_Text"><text:s text:c="21"/>'SELECT mantenimiento_semanal();');</text:p>
      <text:h text:style-name="Heading_20_2" text:outline-level="2">🎯 Resumen</text:h>
      <text:p text:style-name="Text_20_body"><text:span text:style-name="Strong_20_Emphasis"><text:span text:style-name="Source_20_Text">REINDEX TABLE restaurante.pedidos;</text:span></text:span> =</text:p>
      <text:list xml:id="list2679331551" text:style-name="L5">
        <text:list-item>
          <text:p text:style-name="Text_20_body">🔧 <text:span text:style-name="Strong_20_Emphasis">Herramienta de mantenimiento</text:span> que optimiza índices</text:p>
        </text:list-item>
        <text:list-item>
          <text:p text:style-name="Text_20_body">📈 <text:span text:style-name="Strong_20_Emphasis">Mejora rendimiento</text:span> de consultas hasta 7x</text:p>
        </text:list-item>
        <text:list-item>
          <text:p text:style-name="Text_20_body">⏰ <text:span text:style-name="Strong_20_Emphasis">Hacerlo</text:span> semanal/mensualmente, en horas de poco uso</text:p>
        </text:list-item>
        <text:list-item>
          <text:p text:style-name="Text_20_body">⚠️ <text:span text:style-name="Strong_20_Emphasis">Cuidado</text:span> con el bloqueo en horas pico</text:p>
        </text:list-item>
        <text:list-item>
          <text:p text:style-name="Text_20_body">✅ <text:span text:style-name="Strong_20_Emphasis">Esencial</text:span> para mantener la base de datos "como nueva"</text:p>
        </text:list-item>
      </text:list>
      <text:p text:style-name="Text_20_body">Para un restaurante pequeño, con ejecutarlo <text:span text:style-name="Strong_20_Emphasis">una vez al mes</text:span> o <text:span text:style-name="Strong_20_Emphasis">después de limpiar pedidos antiguos</text:span> es más que suficiente.</text:p>
      <text:p text:style-name="Text_20_body">porque no sacas en detalles_pedido el precio del producto. Tenemos que memorizar el precio del producto?</text:p>
      <text:h text:style-name="Heading_20_1" text:outline-level="1">¡Excelente observación! 🎯</text:h>
      <text:h text:style-name="Heading_20_2" text:outline-level="2">El problema que señalas es REAL y muy importante</text:h>
      <text:p text:style-name="Text_20_body">En mi diseño original, <text:span text:style-name="Source_20_Text">detalles_pedido</text:span> tiene <text:span text:style-name="Source_20_Text">precio_unitario</text:span> como un campo que se debe llenar manualmente:</text:p>
      <text:p text:style-name="Text_20_body">sql</text:p>
      <text:p text:style-name="Preformatted_20_Text">-- Mi diseño original (CON problema)</text:p>
      <text:p text:style-name="Preformatted_20_Text">CREATE TABLE detalles_pedido (</text:p>
      <text:p text:style-name="Preformatted_20_Text"><text:s text:c="4"/>id_detalle SERIAL PRIMARY KEY,</text:p>
      <text:p text:style-name="Preformatted_20_Text"><text:s text:c="4"/>id_pedido INT REFERENCES pedidos(id_pedido),</text:p>
      <text:p text:style-name="Preformatted_20_Text"><text:s text:c="4"/>id_producto INT REFERENCES productos(id_producto),</text:p>
      <text:p text:style-name="Preformatted_20_Text"><text:s text:c="4"/>cantidad INT NOT NULL,</text:p>
      <text:p text:style-name="Preformatted_20_Text"><text:s text:c="4"/>precio_unitario DECIMAL(10,2) NOT NULL, -- ❌ Hay que escribirlo manualmente</text:p>
      <text:p text:style-name="Preformatted_20_Text"><text:soft-page-break/><text:s text:c="4"/>subtotal DECIMAL(10,2) GENERATED ALWAYS AS (cantidad * precio_unitario) STORED</text:p>
      <text:p text:style-name="Preformatted_20_Text">);</text:p>
      <text:h text:style-name="Heading_20_2" text:outline-level="2">🤔 ¿Por qué es un problema?</text:h>
      <text:p text:style-name="Text_20_body">sql</text:p>
      <text:p text:style-name="Preformatted_20_Text">-- Escenario del mundo real:</text:p>
      <text:p text:style-name="Preformatted_20_Text">-- 1. El precio del Lomo Saltado sube de $12 a $14</text:p>
      <text:p text:style-name="Preformatted_20_Text">UPDATE productos SET precio = 14 WHERE nombre = 'Lomo Saltado';</text:p>
      <text:p text:style-name="Preformatted_20_Text"/>
      <text:p text:style-name="Preformatted_20_Text">-- 2. Problema: Los pedidos ANTIGUOS ahora muestran precio incorrecto</text:p>
      <text:p text:style-name="Preformatted_20_Text">SELECT * FROM detalles_pedido WHERE id_producto = 3;</text:p>
      <text:p text:style-name="Preformatted_20_Text">-- El precio_unitario sigue siendo $12 (el precio al momento del pedido)</text:p>
      <text:p text:style-name="Preformatted_20_Text">-- PERO si consultamos el precio actual del producto es $14</text:p>
      <text:p text:style-name="Preformatted_20_Text"/>
      <text:p text:style-name="Preformatted_20_Text">-- 3. ¡Registro histórico incorrecto!</text:p>
      <text:p text:style-name="Preformatted_20_Text">-- No sabemos si ese pedido se pagó a $12 o a $14</text:p>
      <text:h text:style-name="Heading_20_2" text:outline-level="2">✅ La solución correcta (2 enfoques)</text:h>
      <text:h text:style-name="Heading_20_3" text:outline-level="3">Enfoque 1: Guardar precio histórico (RECOMENDADO)</text:h>
      <text:p text:style-name="Text_20_body">sql</text:p>
      <text:p text:style-name="Preformatted_20_Text">-- Guardar el precio del momento del pedido usando TRIGGER</text:p>
      <text:p text:style-name="Preformatted_20_Text">CREATE TABLE detalles_pedido (</text:p>
      <text:p text:style-name="Preformatted_20_Text"><text:s text:c="4"/>id_detalle SERIAL PRIMARY KEY,</text:p>
      <text:p text:style-name="Preformatted_20_Text"><text:s text:c="4"/>id_pedido INT REFERENCES pedidos(id_pedido),</text:p>
      <text:p text:style-name="Preformatted_20_Text"><text:s text:c="4"/>id_producto INT REFERENCES productos(id_producto),</text:p>
      <text:p text:style-name="Preformatted_20_Text"><text:s text:c="4"/>cantidad INT NOT NULL CHECK (cantidad &gt; 0),</text:p>
      <text:p text:style-name="Preformatted_20_Text"><text:s text:c="4"/>precio_unitario DECIMAL(10,2), -- Puede ser NULL si no se especifica</text:p>
      <text:p text:style-name="Preformatted_20_Text"><text:s text:c="4"/>subtotal DECIMAL(10,2) GENERATED ALWAYS AS (cantidad * precio_unitario) STORED</text:p>
      <text:p text:style-name="Preformatted_20_Text">);</text:p>
      <text:p text:style-name="Preformatted_20_Text"/>
      <text:p text:style-name="Preformatted_20_Text">-- TRIGGER que captura el precio actual automáticamente</text:p>
      <text:p text:style-name="Preformatted_20_Text">CREATE OR REPLACE FUNCTION obtener_precio_producto()</text:p>
      <text:p text:style-name="Preformatted_20_Text">RETURNS TRIGGER AS $$</text:p>
      <text:p text:style-name="Preformatted_20_Text">BEGIN</text:p>
      <text:p text:style-name="Preformatted_20_Text"><text:s text:c="4"/>-- Si no se especificó precio_unitario, usar el precio actual</text:p>
      <text:p text:style-name="Preformatted_20_Text"><text:s text:c="4"/>IF NEW.precio_unitario IS NULL THEN</text:p>
      <text:p text:style-name="Preformatted_20_Text"><text:s text:c="8"/>SELECT precio INTO NEW.precio_unitario</text:p>
      <text:p text:style-name="Preformatted_20_Text"><text:s text:c="8"/>FROM productos</text:p>
      <text:p text:style-name="Preformatted_20_Text"><text:s text:c="8"/>WHERE id_producto = NEW.id_producto;</text:p>
      <text:p text:style-name="Preformatted_20_Text"><text:s text:c="4"/>END IF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CREATE TRIGGER trg_precio_producto</text:p>
      <text:p text:style-name="Preformatted_20_Text">BEFORE INSERT ON detalles_pedido</text:p>
      <text:p text:style-name="Preformatted_20_Text">FOR EACH ROW</text:p>
      <text:p text:style-name="Preformatted_20_Text">EXECUTE FUNCTION obtener_precio_producto();</text:p>
      <text:p text:style-name="Preformatted_20_Text"/>
      <text:p text:style-name="Preformatted_20_Text">-- Ahora puedes insertar sin especificar precio</text:p>
      <text:p text:style-name="Preformatted_20_Text">INSERT INTO detalles_pedido (id_pedido, id_producto, cantidad) </text:p>
      <text:p text:style-name="Preformatted_20_Text">VALUES (1, 3, 2); -- Automáticamente captura el precio actual ($12)</text:p>
      <text:h text:style-name="Heading_20_3" text:outline-level="3"><text:soft-page-break/>Enfoque 2: No guardar precio (SIMPLE pero limitado)</text:h>
      <text:p text:style-name="Text_20_body">sql</text:p>
      <text:p text:style-name="Preformatted_20_Text">-- Sin campo precio_unitario, calcular todo en tiempo real</text:p>
      <text:p text:style-name="Preformatted_20_Text">CREATE TABLE detalles_pedido (</text:p>
      <text:p text:style-name="Preformatted_20_Text"><text:s text:c="4"/>id_detalle SERIAL PRIMARY KEY,</text:p>
      <text:p text:style-name="Preformatted_20_Text"><text:s text:c="4"/>id_pedido INT REFERENCES pedidos(id_pedido),</text:p>
      <text:p text:style-name="Preformatted_20_Text"><text:s text:c="4"/>id_producto INT REFERENCES productos(id_producto),</text:p>
      <text:p text:style-name="Preformatted_20_Text"><text:s text:c="4"/>cantidad INT NOT NULL,</text:p>
      <text:p text:style-name="Preformatted_20_Text"><text:s text:c="4"/>subtotal DECIMAL(10,2) GENERATED ALWAYS AS (cantidad * (SELECT precio FROM productos WHERE id_producto = id_producto)) STORED -- ❌ NO FUNCIONA así</text:p>
      <text:p text:style-name="Preformatted_20_Text">);</text:p>
      <text:p text:style-name="Preformatted_20_Text"/>
      <text:p text:style-name="Preformatted_20_Text">-- En su lugar, usar VISTA</text:p>
      <text:p text:style-name="Preformatted_20_Text">CREATE VIEW v_detalles_pedido AS</text:p>
      <text:p text:style-name="Preformatted_20_Text">SELECT </text:p>
      <text:p text:style-name="Preformatted_20_Text"><text:s text:c="4"/>dp.id_detalle,</text:p>
      <text:p text:style-name="Preformatted_20_Text"><text:s text:c="4"/>dp.id_pedido,</text:p>
      <text:p text:style-name="Preformatted_20_Text"><text:s text:c="4"/>dp.id_producto,</text:p>
      <text:p text:style-name="Preformatted_20_Text"><text:s text:c="4"/>dp.cantidad,</text:p>
      <text:p text:style-name="Preformatted_20_Text"><text:s text:c="4"/>p.precio AS precio_actual,</text:p>
      <text:p text:style-name="Preformatted_20_Text"><text:s text:c="4"/>dp.cantidad * p.precio AS subtotal</text:p>
      <text:p text:style-name="Preformatted_20_Text">FROM detalles_pedido dp</text:p>
      <text:p text:style-name="Preformatted_20_Text">JOIN productos p ON dp.id_producto = p.id_producto;</text:p>
      <text:p text:style-name="Preformatted_20_Text"/>
      <text:p text:style-name="Preformatted_20_Text">-- ⚠️ PROBLEMA: Si el precio cambia, los pedidos antiguos se recalcularían mal</text:p>
      <text:h text:style-name="Heading_20_2" text:outline-level="2">🏆 La solución profesional (usada en sistemas reales)</text:h>
      <text:p text:style-name="Text_20_body">sql</text:p>
      <text:p text:style-name="Preformatted_20_Text">-- Tabla de precios históricos (lo más profesional)</text:p>
      <text:p text:style-name="Preformatted_20_Text">CREATE TABLE precios_historicos (</text:p>
      <text:p text:style-name="Preformatted_20_Text"><text:s text:c="4"/>id_precio SERIAL PRIMARY KEY,</text:p>
      <text:p text:style-name="Preformatted_20_Text"><text:s text:c="4"/>id_producto INT REFERENCES productos(id_producto),</text:p>
      <text:p text:style-name="Preformatted_20_Text"><text:s text:c="4"/>precio DECIMAL(10,2) NOT NULL,</text:p>
      <text:p text:style-name="Preformatted_20_Text"><text:s text:c="4"/>fecha_inicio DATE NOT NULL DEFAULT CURRENT_DATE,</text:p>
      <text:p text:style-name="Preformatted_20_Text"><text:s text:c="4"/>fecha_fin DATE DEFAULT '9999-12-31'</text:p>
      <text:p text:style-name="Preformatted_20_Text">);</text:p>
      <text:p text:style-name="Preformatted_20_Text"/>
      <text:p text:style-name="Preformatted_20_Text">-- Tabla de detalles de pedido CORRECTA</text:p>
      <text:p text:style-name="Preformatted_20_Text">CREATE TABLE detalles_pedido (</text:p>
      <text:p text:style-name="Preformatted_20_Text"><text:s text:c="4"/>id_detalle SERIAL PRIMARY KEY,</text:p>
      <text:p text:style-name="Preformatted_20_Text"><text:s text:c="4"/>id_pedido INT REFERENCES pedidos(id_pedido),</text:p>
      <text:p text:style-name="Preformatted_20_Text"><text:s text:c="4"/>id_producto INT REFERENCES productos(id_producto),</text:p>
      <text:p text:style-name="Preformatted_20_Text"><text:s text:c="4"/>id_precio INT REFERENCES precios_historicos(id_precio), -- ← Clave histórica</text:p>
      <text:p text:style-name="Preformatted_20_Text"><text:s text:c="4"/>cantidad INT NOT NULL,</text:p>
      <text:p text:style-name="Preformatted_20_Text"><text:s text:c="4"/>subtotal DECIMAL(10,2) GENERATED ALWAYS AS (cantidad * (SELECT precio FROM precios_historicos WHERE id_precio = id_precio)) STORED</text:p>
      <text:p text:style-name="Preformatted_20_Text">);</text:p>
      <text:p text:style-name="Preformatted_20_Text"/>
      <text:p text:style-name="Preformatted_20_Text">-- Trigger para asignar automáticamente el precio histórico correcto</text:p>
      <text:p text:style-name="Preformatted_20_Text">CREATE OR REPLACE FUNCTION asignar_precio_historico()</text:p>
      <text:p text:style-name="Preformatted_20_Text">RETURNS TRIGGER AS $$</text:p>
      <text:p text:style-name="Preformatted_20_Text">DECLARE</text:p>
      <text:p text:style-name="Preformatted_20_Text"><text:s text:c="4"/>v_precio_id INT;</text:p>
      <text:p text:style-name="Preformatted_20_Text">BEGIN</text:p>
      <text:p text:style-name="Preformatted_20_Text"><text:s text:c="4"/>-- Buscar el precio vigente en la fecha del pedido</text:p>
      <text:p text:style-name="Preformatted_20_Text"><text:s text:c="4"/>SELECT ph.id_precio INTO v_precio_id</text:p>
      <text:p text:style-name="Preformatted_20_Text"><text:s text:c="4"/>FROM precios_historicos ph</text:p>
      <text:p text:style-name="Preformatted_20_Text"><text:soft-page-break/><text:s text:c="4"/>JOIN pedidos p ON p.id_pedido = NEW.id_pedido</text:p>
      <text:p text:style-name="Preformatted_20_Text"><text:s text:c="4"/>WHERE ph.id_producto = NEW.id_producto</text:p>
      <text:p text:style-name="Preformatted_20_Text"><text:s text:c="8"/>AND p.fecha_pedido BETWEEN ph.fecha_inicio AND COALESCE(ph.fecha_fin, '9999-12-31')</text:p>
      <text:p text:style-name="Preformatted_20_Text"><text:s text:c="4"/>LIMIT 1;</text:p>
      <text:p text:style-name="Preformatted_20_Text"><text:s text:c="4"/></text:p>
      <text:p text:style-name="Preformatted_20_Text"><text:s text:c="4"/>IF v_precio_id IS NULL THEN</text:p>
      <text:p text:style-name="Preformatted_20_Text"><text:s text:c="8"/>-- Si no hay histórico, usar el precio actual</text:p>
      <text:p text:style-name="Preformatted_20_Text"><text:s text:c="8"/>INSERT INTO precios_historicos (id_producto, precio, fecha_inicio)</text:p>
      <text:p text:style-name="Preformatted_20_Text"><text:s text:c="8"/>VALUES (NEW.id_producto, (SELECT precio FROM productos WHERE id_producto = NEW.id_producto), CURRENT_DATE)</text:p>
      <text:p text:style-name="Preformatted_20_Text"><text:s text:c="8"/>RETURNING id_precio INTO v_precio_id;</text:p>
      <text:p text:style-name="Preformatted_20_Text"><text:s text:c="4"/>END IF;</text:p>
      <text:p text:style-name="Preformatted_20_Text"><text:s text:c="4"/></text:p>
      <text:p text:style-name="Preformatted_20_Text"><text:s text:c="4"/>NEW.id_precio := v_precio_id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CREATE TRIGGER trg_asignar_precio_historico</text:p>
      <text:p text:style-name="Preformatted_20_Text">BEFORE INSERT ON detalles_pedido</text:p>
      <text:p text:style-name="Preformatted_20_Text">FOR EACH ROW</text:p>
      <text:p text:style-name="Preformatted_20_Text">EXECUTE FUNCTION asignar_precio_historico();</text:p>
      <text:p text:style-name="Preformatted_20_Text"/>
      <text:p text:style-name="Preformatted_20_Text">-- Manejo de cambios de precio (ejemplo)</text:p>
      <text:p text:style-name="Preformatted_20_Text">-- Cuando sube el precio del Lomo Saltado:</text:p>
      <text:p text:style-name="Preformatted_20_Text">UPDATE precios_historicos </text:p>
      <text:p text:style-name="Preformatted_20_Text">SET fecha_fin = '2026-05-07' </text:p>
      <text:p text:style-name="Preformatted_20_Text">WHERE id_producto = 3 AND fecha_fin = '9999-12-31';</text:p>
      <text:p text:style-name="Preformatted_20_Text"/>
      <text:p text:style-name="Preformatted_20_Text">INSERT INTO precios_historicos (id_producto, precio, fecha_inicio) </text:p>
      <text:p text:style-name="Preformatted_20_Text">VALUES (3, 14.00, '2026-05-08');</text:p>
      <text:h text:style-name="Heading_20_2" text:outline-level="2">📊 Comparativa de soluc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Enfoque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Uso recomendado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Campo manual</text:span> (mi original)</text:p>
          </table:table-cell>
          <table:table-cell table:style-name="Tabla1.A1" office:value-type="string">
            <text:p text:style-name="Table_20_Contents">Simple, flexible</text:p>
          </table:table-cell>
          <table:table-cell table:style-name="Tabla1.A1" office:value-type="string">
            <text:p text:style-name="Table_20_Contents">Error humano, inconsistencia</text:p>
          </table:table-cell>
          <table:table-cell table:style-name="Tabla1.A1" office:value-type="string">
            <text:p text:style-name="Table_20_Contents">❌ No recomendar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rigger automático</text:span></text:p>
          </table:table-cell>
          <table:table-cell table:style-name="Tabla1.A1" office:value-type="string">
            <text:p text:style-name="Table_20_Contents">Sencillo, confiable</text:p>
          </table:table-cell>
          <table:table-cell table:style-name="Tabla1.A1" office:value-type="string">
            <text:p text:style-name="Table_20_Contents">No guarda historial de precios</text:p>
          </table:table-cell>
          <table:table-cell table:style-name="Tabla1.A1" office:value-type="string">
            <text:p text:style-name="Table_20_Contents">✅ Restaurante pequeñ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abla histórica</text:span></text:p>
          </table:table-cell>
          <table:table-cell table:style-name="Tabla1.A1" office:value-type="string">
            <text:p text:style-name="Table_20_Contents">Perfecto, auditoría completa</text:p>
          </table:table-cell>
          <table:table-cell table:style-name="Tabla1.A1" office:value-type="string">
            <text:p text:style-name="Table_20_Contents">Más complejo</text:p>
          </table:table-cell>
          <table:table-cell table:style-name="Tabla1.A1" office:value-type="string">
            <text:p text:style-name="Table_20_Contents">🏢 Restaurante grande</text:p>
          </table:table-cell>
        </table:table-row>
      </table:table>
      <text:h text:style-name="Heading_20_2" text:outline-level="2">🎯 Solución SIMPLIFICADA para tu restaurante pequeño</text:h>
      <text:p text:style-name="Text_20_body">sql</text:p>
      <text:p text:style-name="Preformatted_20_Text">-- La mejor relación calidad-simplicidad</text:p>
      <text:p text:style-name="Preformatted_20_Text">CREATE TABLE detalles_pedido (</text:p>
      <text:p text:style-name="Preformatted_20_Text"><text:s text:c="4"/>id_detalle SERIAL PRIMARY KEY,</text:p>
      <text:p text:style-name="Preformatted_20_Text"><text:s text:c="4"/>id_pedido INT REFERENCES pedidos(id_pedido),</text:p>
      <text:p text:style-name="Preformatted_20_Text"><text:s text:c="4"/>id_producto INT REFERENCES productos(id_producto),</text:p>
      <text:p text:style-name="Preformatted_20_Text"><text:s text:c="4"/>cantidad INT NOT NULL,</text:p>
      <text:p text:style-name="Preformatted_20_Text"><text:s text:c="4"/>precio_unitario DECIMAL(10,2) NOT NULL, -- Se llena automáticamente</text:p>
      <text:p text:style-name="Preformatted_20_Text"><text:s text:c="4"/>subtotal DECIMAL(10,2) GENERATED ALWAYS AS (cantidad * precio_unitario) STORED</text:p>
      <text:p text:style-name="Preformatted_20_Text">);</text:p>
      <text:p text:style-name="Preformatted_20_Text"><text:soft-page-break/></text:p>
      <text:p text:style-name="Preformatted_20_Text">-- Trigger simple y efectivo</text:p>
      <text:p text:style-name="Preformatted_20_Text">CREATE OR REPLACE FUNCTION auto_precio()</text:p>
      <text:p text:style-name="Preformatted_20_Text">RETURNS TRIGGER AS $$</text:p>
      <text:p text:style-name="Preformatted_20_Text">BEGIN</text:p>
      <text:p text:style-name="Preformatted_20_Text"><text:s text:c="4"/>SELECT precio INTO NEW.precio_unitario</text:p>
      <text:p text:style-name="Preformatted_20_Text"><text:s text:c="4"/>FROM productos </text:p>
      <text:p text:style-name="Preformatted_20_Text"><text:s text:c="4"/>WHERE id_producto = NEW.id_producto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CREATE TRIGGER auto_precio_trigger</text:p>
      <text:p text:style-name="Preformatted_20_Text">BEFORE INSERT ON detalles_pedido</text:p>
      <text:p text:style-name="Preformatted_20_Text">FOR EACH ROW</text:p>
      <text:p text:style-name="Preformatted_20_Text">EXECUTE FUNCTION auto_precio();</text:p>
      <text:p text:style-name="Preformatted_20_Text"/>
      <text:p text:style-name="Preformatted_20_Text">-- Ahora puedes insertar así de simple:</text:p>
      <text:p text:style-name="Preformatted_20_Text">INSERT INTO detalles_pedido (id_pedido, id_producto, cantidad) </text:p>
      <text:p text:style-name="Preformatted_20_Text">VALUES (1, 3, 2); -- ✅ El precio se asigna automáticamente</text:p>
      <text:p text:style-name="Preformatted_20_Text"/>
      <text:p text:style-name="Preformatted_20_Text">-- Y consultar así:</text:p>
      <text:p text:style-name="Preformatted_20_Text">SELECT </text:p>
      <text:p text:style-name="Preformatted_20_Text"><text:s text:c="4"/>dp.id_detalle,</text:p>
      <text:p text:style-name="Preformatted_20_Text"><text:s text:c="4"/>p.nombre AS producto,</text:p>
      <text:p text:style-name="Preformatted_20_Text"><text:s text:c="4"/>dp.cantidad,</text:p>
      <text:p text:style-name="Preformatted_20_Text"><text:s text:c="4"/>dp.precio_unitario, <text:s/>-- Precio al momento del pedido</text:p>
      <text:p text:style-name="Preformatted_20_Text"><text:s text:c="4"/>dp.subtotal</text:p>
      <text:p text:style-name="Preformatted_20_Text">FROM detalles_pedido dp</text:p>
      <text:p text:style-name="Preformatted_20_Text">JOIN productos p ON dp.id_producto = p.id_producto;</text:p>
      <text:h text:style-name="Heading_20_2" text:outline-level="2">🎓 Lección aprendida</text:h>
      <text:p text:style-name="Text_20_body"><text:span text:style-name="Strong_20_Emphasis">NO</text:span> debes obligar al usuario a recordar/memorizar el precio. El sistema debe:</text:p>
      <text:list xml:id="list1146908882" text:style-name="L6">
        <text:list-item>
          <text:p text:style-name="Text_20_body">✅ <text:span text:style-name="Strong_20_Emphasis">Capturar automáticamente</text:span> el precio actual</text:p>
        </text:list-item>
        <text:list-item>
          <text:p text:style-name="Text_20_body">✅ <text:span text:style-name="Strong_20_Emphasis">Congelar el precio</text:span> en el momento del pedido</text:p>
        </text:list-item>
        <text:list-item>
          <text:p text:style-name="Text_20_body">✅ <text:span text:style-name="Strong_20_Emphasis">Permitir cambios</text:span> de precio sin afectar pedidos históricos</text:p>
        </text:list-item>
      </text:list>
      <text:p text:style-name="Text_20_body">¡Gracias por la observación! Esto mejora MUCHO el diseño original. 🙌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9:12:33.219573688</meta:creation-date>
    <dc:date>2026-05-14T19:15:37.886963688</dc:date>
    <meta:editing-duration>PT3M10S</meta:editing-duration>
    <meta:editing-cycles>1</meta:editing-cycles>
    <meta:document-statistic meta:table-count="1" meta:image-count="0" meta:object-count="0" meta:page-count="16" meta:paragraph-count="733" meta:word-count="3285" meta:character-count="25636" meta:non-whitespace-character-count="21881"/>
    <meta:generator>LibreOffice/7.3.7.2$Linux_X86_64 LibreOffice_project/30$Build-2</meta:generator>
  </office:meta>
</office:document-meta>
</file>